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ngXian" svg:font-family="DengXian"/>
    <style:font-face style:name="Microsoft YaHei" svg:font-family="&quot;Microsoft YaHei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48">
      <style:text-properties fo:font-size="12pt" style:font-size-asian="12pt" style:font-size-complex="12pt"/>
    </style:style>
    <style:style style:name="ce5" style:family="table-cell" style:parent-style-name="Default" style:data-style-name="N2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style:vertical-align="middle" fo:wrap-option="wrap"/>
      <style:text-properties fo:font-size="12pt" style:font-size-asian="12pt" style:font-size-complex="12pt"/>
    </style:style>
    <style:style style:name="ce8" style:family="table-cell" style:parent-style-name="Default" style:data-style-name="N1">
      <style:text-properties fo:font-size="12pt" style:font-size-asian="12pt" style:font-size-complex="12pt"/>
    </style:style>
    <style:style style:name="ce9" style:family="table-cell" style:parent-style-name="Default" style:data-style-name="N48"/>
    <style:style style:name="ce10" style:family="table-cell" style:parent-style-name="Default" style:data-style-name="N15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Microsoft YaHei" style:font-name-asian="Microsoft YaHei" style:font-name-complex="Microsoft YaHe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88383333333333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2.7305cm"/>
    </style:style>
    <style:style style:name="co8" style:family="table-column">
      <style:table-column-properties fo:break-before="auto" style:column-width="3.09033333333333cm"/>
    </style:style>
    <style:style style:name="co9" style:family="table-column">
      <style:table-column-properties fo:break-before="auto" style:column-width="2.7728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03" table:default-cell-style-name="ce2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style-name="ce2">
            <text:p>vector size</text:p>
          </table:table-cell>
          <table:table-cell office:value-type="string" table:style-name="ce2">
            <text:p>block size</text:p>
          </table:table-cell>
          <table:table-cell office:value-type="string" table:style-name="ce2">
            <text:p>data size</text:p>
          </table:table-cell>
          <table:table-cell office:value-type="string" table:style-name="ce2">
            <text:p>cyc</text:p>
          </table:table-cell>
          <table:table-cell office:value-type="string" table:style-name="ce2">
            <text:p>inst</text:p>
          </table:table-cell>
          <table:table-cell office:value-type="string" table:style-name="ce2">
            <text:p>uops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s std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cm std</text:p>
          </table:table-cell>
          <table:table-cell office:value-type="string" table:style-name="ce2">
            <text:p>cdm</text:p>
          </table:table-cell>
          <table:table-cell office:value-type="string" table:style-name="ce2">
            <text:p>cdm std</text:p>
          </table:table-cell>
          <table:table-cell office:value-type="string" table:style-name="ce2">
            <text:p>cps</text:p>
          </table:table-cell>
          <table:table-cell office:value-type="string" table:style-name="ce2">
            <text:p>ips</text:p>
          </table:table-cell>
          <table:table-cell office:value-type="string" table:style-name="ce2">
            <text:p>ipc</text:p>
          </table:table-cell>
          <table:table-cell office:value-type="string" table:style-name="ce2">
            <text:p>rss</text:p>
          </table:table-cell>
          <table:table-cell office:value-type="string" table:style-name="ce2">
            <text:p>expected time</text:p>
          </table:table-cell>
          <table:table-cell office:value-type="string" table:style-name="ce2">
            <text:p>real cps</text:p>
          </table:table-cell>
          <table:table-cell office:value-type="string" table:style-name="ce2">
            <text:p>real time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permute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34" table:style-name="ce3">
            <text:p>34</text:p>
          </table:table-cell>
          <table:table-cell office:value-type="float" office:value="48" table:style-name="ce3">
            <text:p>48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3125" table:formula="of:=[.E2]/[.D2]" table:style-name="ce4">
            <text:p>0.531</text:p>
          </table:table-cell>
          <table:table-cell office:value-type="float" office:value="0.75" table:formula="of:=[.F2]/[.D2]" table:style-name="ce4">
            <text:p>0.750</text:p>
          </table:table-cell>
          <table:table-cell office:value-type="float" office:value="1.411764705882353" table:formula="of:=[.F2]/[.E2]" table:style-name="ce4">
            <text:p>1.412</text:p>
          </table:table-cell>
          <table:table-cell office:value-type="float" office:value="0" table:formula="of:=[.H2]/[.D2]" table:style-name="ce4">
            <text:p>0.000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63" table:style-name="ce3">
            <text:p>63</text:p>
          </table:table-cell>
          <table:table-cell office:value-type="float" office:value="109" table:style-name="ce3">
            <text:p>109</text:p>
          </table:table-cell>
          <table:table-cell office:value-type="float" office:value="131" table:style-name="ce3">
            <text:p>131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921875" table:formula="of:=[.E3]/[.D3]" table:style-name="ce4">
            <text:p>0.492</text:p>
          </table:table-cell>
          <table:table-cell office:value-type="float" office:value="0.8515625" table:formula="of:=[.F3]/[.D3]" table:style-name="ce4">
            <text:p>0.852</text:p>
          </table:table-cell>
          <table:table-cell office:value-type="float" office:value="1.7301587301587302" table:formula="of:=[.F3]/[.E3]" table:style-name="ce4">
            <text:p>1.730</text:p>
          </table:table-cell>
          <table:table-cell office:value-type="float" office:value="3.125E-2" table:formula="of:=[.H3]/[.D3]" table:style-name="ce4">
            <text:p>0.031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136" table:style-name="ce3">
            <text:p>136</text:p>
          </table:table-cell>
          <table:table-cell office:value-type="float" office:value="264" table:style-name="ce3">
            <text:p>264</text:p>
          </table:table-cell>
          <table:table-cell office:value-type="float" office:value="332" table:style-name="ce3">
            <text:p>332</text:p>
          </table:table-cell>
          <table:table-cell office:value-type="float" office:value="12" table:style-name="ce3">
            <text:p>12</text:p>
          </table:table-cell>
          <table:table-cell office:value-type="float" office:value="10.6" table:style-name="ce3">
            <text:p>10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3125" table:formula="of:=[.E4]/[.D4]" table:style-name="ce4">
            <text:p>0.531</text:p>
          </table:table-cell>
          <table:table-cell office:value-type="float" office:value="1.03125" table:formula="of:=[.F4]/[.D4]" table:style-name="ce4">
            <text:p>1.031</text:p>
          </table:table-cell>
          <table:table-cell office:value-type="float" office:value="1.9411764705882353" table:formula="of:=[.F4]/[.E4]" table:style-name="ce4">
            <text:p>1.941</text:p>
          </table:table-cell>
          <table:table-cell office:value-type="float" office:value="4.6875E-2" table:formula="of:=[.H4]/[.D4]" table:style-name="ce4">
            <text:p>0.047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288" table:style-name="ce3">
            <text:p>288</text:p>
          </table:table-cell>
          <table:table-cell office:value-type="float" office:value="592" table:style-name="ce3">
            <text:p>592</text:p>
          </table:table-cell>
          <table:table-cell office:value-type="float" office:value="760" table:style-name="ce3">
            <text:p>760</text:p>
          </table:table-cell>
          <table:table-cell office:value-type="float" office:value="29" table:style-name="ce3">
            <text:p>29</text:p>
          </table:table-cell>
          <table:table-cell office:value-type="float" office:value="51.2" table:style-name="ce3">
            <text:p>51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625" table:formula="of:=[.E5]/[.D5]" table:style-name="ce4">
            <text:p>0.563</text:p>
          </table:table-cell>
          <table:table-cell office:value-type="float" office:value="1.15625" table:formula="of:=[.F5]/[.D5]" table:style-name="ce4">
            <text:p>1.156</text:p>
          </table:table-cell>
          <table:table-cell office:value-type="float" office:value="2.0555555555555554" table:formula="of:=[.F5]/[.E5]" table:style-name="ce4">
            <text:p>2.056</text:p>
          </table:table-cell>
          <table:table-cell office:value-type="float" office:value="5.6640625E-2" table:formula="of:=[.H5]/[.D5]" table:style-name="ce4">
            <text:p>0.057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588" table:style-name="ce3">
            <text:p>588</text:p>
          </table:table-cell>
          <table:table-cell office:value-type="float" office:value="1228" table:style-name="ce3">
            <text:p>1228</text:p>
          </table:table-cell>
          <table:table-cell office:value-type="float" office:value="1586" table:style-name="ce3">
            <text:p>1586</text:p>
          </table:table-cell>
          <table:table-cell office:value-type="float" office:value="81" table:style-name="ce3">
            <text:p>81</text:p>
          </table:table-cell>
          <table:table-cell office:value-type="float" office:value="8.6" table:style-name="ce3">
            <text:p>8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7421875" table:formula="of:=[.E6]/[.D6]" table:style-name="ce4">
            <text:p>0.574</text:p>
          </table:table-cell>
          <table:table-cell office:value-type="float" office:value="1.19921875" table:formula="of:=[.F6]/[.D6]" table:style-name="ce4">
            <text:p>1.199</text:p>
          </table:table-cell>
          <table:table-cell office:value-type="float" office:value="2.0884353741496597" table:formula="of:=[.F6]/[.E6]" table:style-name="ce4">
            <text:p>2.088</text:p>
          </table:table-cell>
          <table:table-cell office:value-type="float" office:value="7.91015625E-2" table:formula="of:=[.H6]/[.D6]" table:style-name="ce4">
            <text:p>0.079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1206" table:style-name="ce3">
            <text:p>1206</text:p>
          </table:table-cell>
          <table:table-cell office:value-type="float" office:value="2508" table:style-name="ce3">
            <text:p>2508</text:p>
          </table:table-cell>
          <table:table-cell office:value-type="float" office:value="3250" table:style-name="ce3">
            <text:p>3250</text:p>
          </table:table-cell>
          <table:table-cell office:value-type="float" office:value="211" table:style-name="ce3">
            <text:p>211</text:p>
          </table:table-cell>
          <table:table-cell office:value-type="float" office:value="7.7" table:style-name="ce3">
            <text:p>7.7</text:p>
          </table:table-cell>
          <table:table-cell office:value-type="float" office:value="3" table:style-name="ce3">
            <text:p>3</text:p>
          </table:table-cell>
          <table:table-cell office:value-type="float" office:value="1.9" table:style-name="ce3">
            <text:p>1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888671875" table:formula="of:=[.E7]/[.D7]" table:style-name="ce4">
            <text:p>0.589</text:p>
          </table:table-cell>
          <table:table-cell office:value-type="float" office:value="1.224609375" table:formula="of:=[.F7]/[.D7]" table:style-name="ce4">
            <text:p>1.225</text:p>
          </table:table-cell>
          <table:table-cell office:value-type="float" office:value="2.0796019900497513" table:formula="of:=[.F7]/[.E7]" table:style-name="ce4">
            <text:p>2.080</text:p>
          </table:table-cell>
          <table:table-cell office:value-type="float" office:value="0.10302734375" table:formula="of:=[.H7]/[.D7]" table:style-name="ce4">
            <text:p>0.103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4028" table:style-name="ce3">
            <text:p>4028</text:p>
          </table:table-cell>
          <table:table-cell office:value-type="float" office:value="4892" table:style-name="ce3">
            <text:p>4892</text:p>
          </table:table-cell>
          <table:table-cell office:value-type="float" office:value="6321" table:style-name="ce3">
            <text:p>6321</text:p>
          </table:table-cell>
          <table:table-cell office:value-type="float" office:value="2685" table:style-name="ce3">
            <text:p>2685</text:p>
          </table:table-cell>
          <table:table-cell office:value-type="float" office:value="77.400000000000006" table:style-name="ce3">
            <text:p>77.4</text:p>
          </table:table-cell>
          <table:table-cell office:value-type="float" office:value="289" table:style-name="ce3">
            <text:p>289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5.9" table:style-name="ce3">
            <text:p>5.9</text:p>
          </table:table-cell>
          <table:table-cell office:value-type="float" office:value="0.9833984375" table:formula="of:=[.E8]/[.D8]" table:style-name="ce4">
            <text:p>0.983</text:p>
          </table:table-cell>
          <table:table-cell office:value-type="float" office:value="1.1943359375" table:formula="of:=[.F8]/[.D8]" table:style-name="ce4">
            <text:p>1.194</text:p>
          </table:table-cell>
          <table:table-cell office:value-type="float" office:value="1.214498510427011" table:formula="of:=[.F8]/[.E8]" table:style-name="ce4">
            <text:p>1.214</text:p>
          </table:table-cell>
          <table:table-cell office:value-type="float" office:value="0.655517578125" table:formula="of:=[.H8]/[.D8]" table:style-name="ce4">
            <text:p>0.65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0" table:style-name="ce3"/>
          <table:table-cell table:number-columns-repeated="4" table:style-name="ce4"/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42" table:style-name="ce3">
            <text:p>42</text:p>
          </table:table-cell>
          <table:table-cell office:value-type="float" office:value="82" table:style-name="ce3">
            <text:p>82</text:p>
          </table:table-cell>
          <table:table-cell office:value-type="float" office:value="99" table:style-name="ce3">
            <text:p>9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5625" table:formula="of:=[.E10]/[.D10]" table:style-name="ce4">
            <text:p>0.656</text:p>
          </table:table-cell>
          <table:table-cell office:value-type="float" office:value="1.28125" table:formula="of:=[.F10]/[.D10]" table:style-name="ce4">
            <text:p>1.281</text:p>
          </table:table-cell>
          <table:table-cell office:value-type="float" office:value="1.9523809523809523" table:formula="of:=[.F10]/[.E10]" table:style-name="ce4">
            <text:p>1.952</text:p>
          </table:table-cell>
          <table:table-cell office:value-type="float" office:value="0" table:formula="of:=[.H10]/[.D10]" table:style-name="ce4">
            <text:p>0.000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28" table:style-name="ce3">
            <text:p>128</text:p>
          </table:table-cell>
          <table:table-cell office:value-type="float" office:value="96" table:style-name="ce3">
            <text:p>96</text:p>
          </table:table-cell>
          <table:table-cell office:value-type="float" office:value="198" table:style-name="ce3">
            <text:p>198</text:p>
          </table:table-cell>
          <table:table-cell office:value-type="float" office:value="249" table:style-name="ce3">
            <text:p>249</text:p>
          </table:table-cell>
          <table:table-cell office:value-type="float" office:value="1" table:style-name="ce3">
            <text:p>1</text:p>
          </table:table-cell>
          <table:table-cell office:value-type="float" office:value="1.4" table:style-name="ce3">
            <text:p>1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5" table:formula="of:=[.E11]/[.D11]" table:style-name="ce4">
            <text:p>0.750</text:p>
          </table:table-cell>
          <table:table-cell office:value-type="float" office:value="1.546875" table:formula="of:=[.F11]/[.D11]" table:style-name="ce4">
            <text:p>1.547</text:p>
          </table:table-cell>
          <table:table-cell office:value-type="float" office:value="2.0625" table:formula="of:=[.F11]/[.E11]" table:style-name="ce4">
            <text:p>2.063</text:p>
          </table:table-cell>
          <table:table-cell office:value-type="float" office:value="7.8125E-3" table:formula="of:=[.H11]/[.D11]" table:style-name="ce4">
            <text:p>0.008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64" table:style-name="ce2">
            <text:p>64</text:p>
          </table:table-cell>
          <table:table-cell office:value-type="float" office:value="256" table:style-name="ce3">
            <text:p>256</text:p>
          </table:table-cell>
          <table:table-cell office:value-type="float" office:value="201" table:style-name="ce3">
            <text:p>201</text:p>
          </table:table-cell>
          <table:table-cell office:value-type="float" office:value="422" table:style-name="ce3">
            <text:p>422</text:p>
          </table:table-cell>
          <table:table-cell office:value-type="float" office:value="537" table:style-name="ce3">
            <text:p>537</text:p>
          </table:table-cell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8515625" table:formula="of:=[.E12]/[.D12]" table:style-name="ce4">
            <text:p>0.785</text:p>
          </table:table-cell>
          <table:table-cell office:value-type="float" office:value="1.6484375" table:formula="of:=[.F12]/[.D12]" table:style-name="ce4">
            <text:p>1.648</text:p>
          </table:table-cell>
          <table:table-cell office:value-type="float" office:value="2.099502487562189" table:formula="of:=[.F12]/[.E12]" table:style-name="ce4">
            <text:p>2.100</text:p>
          </table:table-cell>
          <table:table-cell office:value-type="float" office:value="6.25E-2" table:formula="of:=[.H12]/[.D12]" table:style-name="ce4">
            <text:p>0.063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8" table:style-name="ce2">
            <text:p>128</text:p>
          </table:table-cell>
          <table:table-cell office:value-type="float" office:value="512" table:style-name="ce3">
            <text:p>512</text:p>
          </table:table-cell>
          <table:table-cell office:value-type="float" office:value="413" table:style-name="ce3">
            <text:p>413</text:p>
          </table:table-cell>
          <table:table-cell office:value-type="float" office:value="870" table:style-name="ce3">
            <text:p>870</text:p>
          </table:table-cell>
          <table:table-cell office:value-type="float" office:value="1113" table:style-name="ce3">
            <text:p>1113</text:p>
          </table:table-cell>
          <table:table-cell office:value-type="float" office:value="85" table:style-name="ce3">
            <text:p>85</text:p>
          </table:table-cell>
          <table:table-cell office:value-type="float" office:value="7.1" table:style-name="ce3">
            <text:p>7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06640625" table:formula="of:=[.E13]/[.D13]" table:style-name="ce4">
            <text:p>0.807</text:p>
          </table:table-cell>
          <table:table-cell office:value-type="float" office:value="1.69921875" table:formula="of:=[.F13]/[.D13]" table:style-name="ce4">
            <text:p>1.699</text:p>
          </table:table-cell>
          <table:table-cell office:value-type="float" office:value="2.1065375302663436" table:formula="of:=[.F13]/[.E13]" table:style-name="ce4">
            <text:p>2.107</text:p>
          </table:table-cell>
          <table:table-cell office:value-type="float" office:value="0.166015625" table:formula="of:=[.H13]/[.D13]" table:style-name="ce4">
            <text:p>0.16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6" table:style-name="ce2">
            <text:p>256</text:p>
          </table:table-cell>
          <table:table-cell office:value-type="float" office:value="1024" table:style-name="ce3">
            <text:p>1024</text:p>
          </table:table-cell>
          <table:table-cell office:value-type="float" office:value="836" table:style-name="ce3">
            <text:p>836</text:p>
          </table:table-cell>
          <table:table-cell office:value-type="float" office:value="1766" table:style-name="ce3">
            <text:p>1766</text:p>
          </table:table-cell>
          <table:table-cell office:value-type="float" office:value="2265" table:style-name="ce3">
            <text:p>2265</text:p>
          </table:table-cell>
          <table:table-cell office:value-type="float" office:value="218" table:style-name="ce3">
            <text:p>218</text:p>
          </table:table-cell>
          <table:table-cell office:value-type="float" office:value="7.4" table:style-name="ce3">
            <text:p>7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1640625" table:formula="of:=[.E14]/[.D14]" table:style-name="ce4">
            <text:p>0.816</text:p>
          </table:table-cell>
          <table:table-cell office:value-type="float" office:value="1.724609375" table:formula="of:=[.F14]/[.D14]" table:style-name="ce4">
            <text:p>1.725</text:p>
          </table:table-cell>
          <table:table-cell office:value-type="float" office:value="2.1124401913875599" table:formula="of:=[.F14]/[.E14]" table:style-name="ce4">
            <text:p>2.112</text:p>
          </table:table-cell>
          <table:table-cell office:value-type="float" office:value="0.212890625" table:formula="of:=[.H14]/[.D14]" table:style-name="ce4">
            <text:p>0.213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12" table:style-name="ce2">
            <text:p>512</text:p>
          </table:table-cell>
          <table:table-cell office:value-type="float" office:value="2048" table:style-name="ce3">
            <text:p>2048</text:p>
          </table:table-cell>
          <table:table-cell office:value-type="float" office:value="1843" table:style-name="ce3">
            <text:p>1843</text:p>
          </table:table-cell>
          <table:table-cell office:value-type="float" office:value="3878" table:style-name="ce3">
            <text:p>3878</text:p>
          </table:table-cell>
          <table:table-cell office:value-type="float" office:value="5049" table:style-name="ce3">
            <text:p>5049</text:p>
          </table:table-cell>
          <table:table-cell office:value-type="float" office:value="671" table:style-name="ce3">
            <text:p>671</text:p>
          </table:table-cell>
          <table:table-cell office:value-type="float" office:value="18.8" table:style-name="ce3">
            <text:p>18.8</text:p>
          </table:table-cell>
          <table:table-cell office:value-type="float" office:value="0" table:style-name="ce3">
            <text:p>0</text:p>
          </table:table-cell>
          <table:table-cell office:value-type="float" office:value="0.7" table:style-name="ce11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9990234375" table:formula="of:=[.E15]/[.D15]" table:style-name="ce4">
            <text:p>0.900</text:p>
          </table:table-cell>
          <table:table-cell office:value-type="float" office:value="1.8935546875" table:formula="of:=[.F15]/[.D15]" table:style-name="ce4">
            <text:p>1.894</text:p>
          </table:table-cell>
          <table:table-cell office:value-type="float" office:value="2.1041779706999457" table:formula="of:=[.F15]/[.E15]" table:style-name="ce4">
            <text:p>2.104</text:p>
          </table:table-cell>
          <table:table-cell office:value-type="float" office:value="0.32763671875" table:formula="of:=[.H15]/[.D15]" table:style-name="ce4">
            <text:p>0.328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0" table:style-name="ce3"/>
          <table:table-cell table:number-columns-repeated="4" table:style-name="ce4"/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depermute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35" table:style-name="ce3">
            <text:p>35</text:p>
          </table:table-cell>
          <table:table-cell office:value-type="float" office:value="48" table:style-name="ce3">
            <text:p>48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46875" table:formula="of:=[.E18]/[.D18]" table:style-name="ce4">
            <text:p>0.547</text:p>
          </table:table-cell>
          <table:table-cell office:value-type="float" office:value="0.75" table:formula="of:=[.F18]/[.D18]" table:style-name="ce4">
            <text:p>0.750</text:p>
          </table:table-cell>
          <table:table-cell office:value-type="float" office:value="1.3714285714285714" table:formula="of:=[.F18]/[.E18]" table:style-name="ce4">
            <text:p>1.371</text:p>
          </table:table-cell>
          <table:table-cell office:value-type="float" office:value="0" table:formula="of:=[.H18]/[.D18]" table:style-name="ce4">
            <text:p>0.000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64" table:style-name="ce3">
            <text:p>64</text:p>
          </table:table-cell>
          <table:table-cell office:value-type="float" office:value="106" table:style-name="ce3">
            <text:p>106</text:p>
          </table:table-cell>
          <table:table-cell office:value-type="float" office:value="127" table:style-name="ce3">
            <text:p>127</text:p>
          </table:table-cell>
          <table:table-cell office:value-type="float" office:value="4" table:style-name="ce3">
            <text:p>4</text:p>
          </table:table-cell>
          <table:table-cell office:value-type="float" office:value="3.3" table:style-name="ce3">
            <text:p>3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" table:formula="of:=[.E19]/[.D19]" table:style-name="ce4">
            <text:p>0.500</text:p>
          </table:table-cell>
          <table:table-cell office:value-type="float" office:value="0.828125" table:formula="of:=[.F19]/[.D19]" table:style-name="ce4">
            <text:p>0.828</text:p>
          </table:table-cell>
          <table:table-cell office:value-type="float" office:value="1.65625" table:formula="of:=[.F19]/[.E19]" table:style-name="ce4">
            <text:p>1.656</text:p>
          </table:table-cell>
          <table:table-cell office:value-type="float" office:value="3.125E-2" table:formula="of:=[.H19]/[.D19]" table:style-name="ce4">
            <text:p>0.031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135" table:style-name="ce3">
            <text:p>135</text:p>
          </table:table-cell>
          <table:table-cell office:value-type="float" office:value="267" table:style-name="ce3">
            <text:p>267</text:p>
          </table:table-cell>
          <table:table-cell office:value-type="float" office:value="336" table:style-name="ce3">
            <text:p>336</text:p>
          </table:table-cell>
          <table:table-cell office:value-type="float" office:value="5" table:style-name="ce3">
            <text:p>5</text:p>
          </table:table-cell>
          <table:table-cell office:value-type="float" office:value="11.6" table:style-name="ce3">
            <text:p>11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2734375" table:formula="of:=[.E20]/[.D20]" table:style-name="ce4">
            <text:p>0.527</text:p>
          </table:table-cell>
          <table:table-cell office:value-type="float" office:value="1.04296875" table:formula="of:=[.F20]/[.D20]" table:style-name="ce4">
            <text:p>1.043</text:p>
          </table:table-cell>
          <table:table-cell office:value-type="float" office:value="1.9777777777777779" table:formula="of:=[.F20]/[.E20]" table:style-name="ce4">
            <text:p>1.978</text:p>
          </table:table-cell>
          <table:table-cell office:value-type="float" office:value="1.953125E-2" table:formula="of:=[.H20]/[.D20]" table:style-name="ce4">
            <text:p>0.020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291" table:style-name="ce3">
            <text:p>291</text:p>
          </table:table-cell>
          <table:table-cell office:value-type="float" office:value="605" table:style-name="ce3">
            <text:p>605</text:p>
          </table:table-cell>
          <table:table-cell office:value-type="float" office:value="778" table:style-name="ce3">
            <text:p>778</text:p>
          </table:table-cell>
          <table:table-cell office:value-type="float" office:value="8" table:style-name="ce3">
            <text:p>8</text:p>
          </table:table-cell>
          <table:table-cell office:value-type="float" office:value="56.9" table:style-name="ce3">
            <text:p>5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68359375" table:formula="of:=[.E21]/[.D21]" table:style-name="ce4">
            <text:p>0.568</text:p>
          </table:table-cell>
          <table:table-cell office:value-type="float" office:value="1.181640625" table:formula="of:=[.F21]/[.D21]" table:style-name="ce4">
            <text:p>1.182</text:p>
          </table:table-cell>
          <table:table-cell office:value-type="float" office:value="2.0790378006872854" table:formula="of:=[.F21]/[.E21]" table:style-name="ce4">
            <text:p>2.079</text:p>
          </table:table-cell>
          <table:table-cell office:value-type="float" office:value="1.5625E-2" table:formula="of:=[.H21]/[.D21]" table:style-name="ce4">
            <text:p>0.01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598" table:style-name="ce3">
            <text:p>598</text:p>
          </table:table-cell>
          <table:table-cell office:value-type="float" office:value="1200" table:style-name="ce3">
            <text:p>1200</text:p>
          </table:table-cell>
          <table:table-cell office:value-type="float" office:value="1697" table:style-name="ce3">
            <text:p>1697</text:p>
          </table:table-cell>
          <table:table-cell office:value-type="float" office:value="7" table:style-name="ce3">
            <text:p>7</text:p>
          </table:table-cell>
          <table:table-cell office:value-type="float" office:value="13.5" table:style-name="ce3">
            <text:p>13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83984375" table:formula="of:=[.E22]/[.D22]" table:style-name="ce4">
            <text:p>0.584</text:p>
          </table:table-cell>
          <table:table-cell office:value-type="float" office:value="1.171875" table:formula="of:=[.F22]/[.D22]" table:style-name="ce4">
            <text:p>1.172</text:p>
          </table:table-cell>
          <table:table-cell office:value-type="float" office:value="2.0066889632107023" table:formula="of:=[.F22]/[.E22]" table:style-name="ce4">
            <text:p>2.007</text:p>
          </table:table-cell>
          <table:table-cell office:value-type="float" office:value="6.8359375E-3" table:formula="of:=[.H22]/[.D22]" table:style-name="ce4">
            <text:p>0.007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1222" table:style-name="ce3">
            <text:p>1222</text:p>
          </table:table-cell>
          <table:table-cell office:value-type="float" office:value="2478" table:style-name="ce3">
            <text:p>2478</text:p>
          </table:table-cell>
          <table:table-cell office:value-type="float" office:value="3489" table:style-name="ce3">
            <text:p>3489</text:p>
          </table:table-cell>
          <table:table-cell office:value-type="float" office:value="33" table:style-name="ce3">
            <text:p>33</text:p>
          </table:table-cell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66796875" table:formula="of:=[.E23]/[.D23]" table:style-name="ce4">
            <text:p>0.597</text:p>
          </table:table-cell>
          <table:table-cell office:value-type="float" office:value="1.2099609375" table:formula="of:=[.F23]/[.D23]" table:style-name="ce4">
            <text:p>1.210</text:p>
          </table:table-cell>
          <table:table-cell office:value-type="float" office:value="2.0278232405891981" table:formula="of:=[.F23]/[.E23]" table:style-name="ce4">
            <text:p>2.028</text:p>
          </table:table-cell>
          <table:table-cell office:value-type="float" office:value="1.611328125E-2" table:formula="of:=[.H23]/[.D23]" table:style-name="ce4">
            <text:p>0.01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6234" table:style-name="ce3">
            <text:p>6234</text:p>
          </table:table-cell>
          <table:table-cell office:value-type="float" office:value="5627" table:style-name="ce3">
            <text:p>5627</text:p>
          </table:table-cell>
          <table:table-cell office:value-type="float" office:value="8147" table:style-name="ce3">
            <text:p>8147</text:p>
          </table:table-cell>
          <table:table-cell office:value-type="float" office:value="4171" table:style-name="ce3">
            <text:p>4171</text:p>
          </table:table-cell>
          <table:table-cell office:value-type="float" office:value="104.5" table:style-name="ce3">
            <text:p>104.5</text:p>
          </table:table-cell>
          <table:table-cell office:value-type="float" office:value="381" table:style-name="ce3">
            <text:p>381</text:p>
          </table:table-cell>
          <table:table-cell office:value-type="float" office:value="10.6" table:style-name="ce3">
            <text:p>10.6</text:p>
          </table:table-cell>
          <table:table-cell office:value-type="float" office:value="18" table:style-name="ce3">
            <text:p>18</text:p>
          </table:table-cell>
          <table:table-cell office:value-type="float" office:value="7.5" table:style-name="ce3">
            <text:p>7.5</text:p>
          </table:table-cell>
          <table:table-cell office:value-type="float" office:value="1.52197265625" table:formula="of:=[.E24]/[.D24]" table:style-name="ce4">
            <text:p>1.522</text:p>
          </table:table-cell>
          <table:table-cell office:value-type="float" office:value="1.373779296875" table:formula="of:=[.F24]/[.D24]" table:style-name="ce4">
            <text:p>1.374</text:p>
          </table:table-cell>
          <table:table-cell office:value-type="float" office:value="0.90263073468078281" table:formula="of:=[.F24]/[.E24]" table:style-name="ce4">
            <text:p>0.903</text:p>
          </table:table-cell>
          <table:table-cell office:value-type="float" office:value="1.018310546875" table:formula="of:=[.H24]/[.D24]" table:style-name="ce4">
            <text:p>1.018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style-name="ce2"/>
          <table:table-cell table:style-name="ce6"/>
          <table:table-cell table:number-columns-repeated="9" table:style-name="ce2"/>
          <table:table-cell table:number-columns-repeated="2" table:style-name="ce3"/>
          <table:table-cell table:number-columns-repeated="4" table:style-name="ce4"/>
          <table:table-cell table:number-columns-repeated="4" table:style-name="ce3"/>
          <table:table-cell table:number-columns-repeated="16363"/>
        </table:table-row>
        <table:table-row table:style-name="ro1">
          <table:table-cell office:value-type="string" table:style-name="ce2">
            <text:p>fir cores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7" table:style-name="ce3">
            <text:p>17</text:p>
          </table:table-cell>
          <table:table-cell office:value-type="float" office:value="39" table:style-name="ce3">
            <text:p>39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65625" table:formula="of:=[.E26]/[.D26]" table:style-name="ce4">
            <text:p>0.266</text:p>
          </table:table-cell>
          <table:table-cell office:value-type="float" office:value="0.609375" table:formula="of:=[.F26]/[.D26]" table:style-name="ce4">
            <text:p>0.609</text:p>
          </table:table-cell>
          <table:table-cell office:value-type="float" office:value="2.2941176470588234" table:formula="of:=[.F26]/[.E26]" table:style-name="ce4">
            <text:p>2.294</text:p>
          </table:table-cell>
          <table:table-cell office:value-type="float" office:value="0" table:formula="of:=[.H26]/[.D26]" table:style-name="ce4">
            <text:p>0.000</text:p>
          </table:table-cell>
          <table:table-cell table:number-columns-repeated="2" table:style-name="ce2"/>
          <table:table-cell table:number-columns-repeated="2" table:style-name="ce3"/>
          <table:table-cell table:number-columns-repeated="16363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30" table:style-name="ce3">
            <text:p>30</text:p>
          </table:table-cell>
          <table:table-cell office:value-type="float" office:value="71" table:style-name="ce3">
            <text:p>71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34375" table:formula="of:=[.E27]/[.D27]" table:style-name="ce4">
            <text:p>0.234</text:p>
          </table:table-cell>
          <table:table-cell office:value-type="float" office:value="0.5546875" table:formula="of:=[.F27]/[.D27]" table:style-name="ce4">
            <text:p>0.555</text:p>
          </table:table-cell>
          <table:table-cell office:value-type="float" office:value="2.3666666666666667" table:formula="of:=[.F27]/[.E27]" table:style-name="ce4">
            <text:p>2.367</text:p>
          </table:table-cell>
          <table:table-cell office:value-type="float" office:value="0" table:formula="of:=[.H27]/[.D27]" table:style-name="ce4">
            <text:p>0.000</text:p>
          </table:table-cell>
          <table:table-cell table:number-columns-repeated="2" table:style-name="ce2"/>
          <table:table-cell table:number-columns-repeated="2" table:style-name="ce3"/>
          <table:table-cell table:number-columns-repeated="16363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56" table:style-name="ce3">
            <text:p>56</text:p>
          </table:table-cell>
          <table:table-cell office:value-type="float" office:value="135" table:style-name="ce3">
            <text:p>135</text:p>
          </table:table-cell>
          <table:table-cell office:value-type="float" office:value="167" table:style-name="ce3">
            <text:p>16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1875" table:formula="of:=[.E28]/[.D28]" table:style-name="ce4">
            <text:p>0.219</text:p>
          </table:table-cell>
          <table:table-cell office:value-type="float" office:value="0.52734375" table:formula="of:=[.F28]/[.D28]" table:style-name="ce4">
            <text:p>0.527</text:p>
          </table:table-cell>
          <table:table-cell office:value-type="float" office:value="2.4107142857142856" table:formula="of:=[.F28]/[.E28]" table:style-name="ce4">
            <text:p>2.411</text:p>
          </table:table-cell>
          <table:table-cell office:value-type="float" office:value="0" table:formula="of:=[.H28]/[.D28]" table:style-name="ce4">
            <text:p>0.000</text:p>
          </table:table-cell>
          <table:table-cell table:number-columns-repeated="2" table:style-name="ce2"/>
          <table:table-cell table:number-columns-repeated="2" table:style-name="ce3"/>
          <table:table-cell table:number-columns-repeated="16363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107" table:style-name="ce3">
            <text:p>107</text:p>
          </table:table-cell>
          <table:table-cell office:value-type="float" office:value="263" table:style-name="ce3">
            <text:p>263</text:p>
          </table:table-cell>
          <table:table-cell office:value-type="float" office:value="327" table:style-name="ce3">
            <text:p>3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08984375" table:formula="of:=[.E29]/[.D29]" table:style-name="ce4">
            <text:p>0.209</text:p>
          </table:table-cell>
          <table:table-cell office:value-type="float" office:value="0.513671875" table:formula="of:=[.F29]/[.D29]" table:style-name="ce4">
            <text:p>0.514</text:p>
          </table:table-cell>
          <table:table-cell office:value-type="float" office:value="2.457943925233645" table:formula="of:=[.F29]/[.E29]" table:style-name="ce4">
            <text:p>2.458</text:p>
          </table:table-cell>
          <table:table-cell office:value-type="float" office:value="0" table:formula="of:=[.H29]/[.D29]" table:style-name="ce4">
            <text:p>0.000</text:p>
          </table:table-cell>
          <table:table-cell table:number-columns-repeated="2" table:style-name="ce2"/>
          <table:table-cell table:number-columns-repeated="2" table:style-name="ce3"/>
          <table:table-cell table:number-columns-repeated="16363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208" table:style-name="ce3">
            <text:p>208</text:p>
          </table:table-cell>
          <table:table-cell office:value-type="float" office:value="519" table:style-name="ce3">
            <text:p>519</text:p>
          </table:table-cell>
          <table:table-cell office:value-type="float" office:value="647" table:style-name="ce3">
            <text:p>6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03125" table:formula="of:=[.E30]/[.D30]" table:style-name="ce4">
            <text:p>0.203</text:p>
          </table:table-cell>
          <table:table-cell office:value-type="float" office:value="0.5068359375" table:formula="of:=[.F30]/[.D30]" table:style-name="ce4">
            <text:p>0.507</text:p>
          </table:table-cell>
          <table:table-cell office:value-type="float" office:value="2.4951923076923075" table:formula="of:=[.F30]/[.E30]" table:style-name="ce4">
            <text:p>2.495</text:p>
          </table:table-cell>
          <table:table-cell office:value-type="float" office:value="0" table:formula="of:=[.H30]/[.D30]" table:style-name="ce4">
            <text:p>0.000</text:p>
          </table:table-cell>
          <table:table-cell table:number-columns-repeated="2" table:style-name="ce2"/>
          <table:table-cell table:number-columns-repeated="2" table:style-name="ce3"/>
          <table:table-cell table:number-columns-repeated="16363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410" table:style-name="ce3">
            <text:p>410</text:p>
          </table:table-cell>
          <table:table-cell office:value-type="float" office:value="1031" table:style-name="ce3">
            <text:p>1031</text:p>
          </table:table-cell>
          <table:table-cell office:value-type="float" office:value="1287" table:style-name="ce3">
            <text:p>12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001953125" table:formula="of:=[.E31]/[.D31]" table:style-name="ce4">
            <text:p>0.200</text:p>
          </table:table-cell>
          <table:table-cell office:value-type="float" office:value="0.50341796875" table:formula="of:=[.F31]/[.D31]" table:style-name="ce4">
            <text:p>0.503</text:p>
          </table:table-cell>
          <table:table-cell office:value-type="float" office:value="2.5146341463414634" table:formula="of:=[.F31]/[.E31]" table:style-name="ce4">
            <text:p>2.515</text:p>
          </table:table-cell>
          <table:table-cell office:value-type="float" office:value="0" table:formula="of:=[.H31]/[.D31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1098" table:style-name="ce3">
            <text:p>1098</text:p>
          </table:table-cell>
          <table:table-cell office:value-type="float" office:value="2062" table:style-name="ce3">
            <text:p>2062</text:p>
          </table:table-cell>
          <table:table-cell office:value-type="float" office:value="2576" table:style-name="ce3">
            <text:p>2576</text:p>
          </table:table-cell>
          <table:table-cell office:value-type="float" office:value="462" table:style-name="ce3">
            <text:p>462</text:p>
          </table:table-cell>
          <table:table-cell office:value-type="float" office:value="31.3" table:style-name="ce3">
            <text:p>31.3</text:p>
          </table:table-cell>
          <table:table-cell office:value-type="float" office:value="59" table:style-name="ce3">
            <text:p>59</text:p>
          </table:table-cell>
          <table:table-cell office:value-type="float" office:value="3.6" table:style-name="ce3">
            <text:p>3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6806640625" table:formula="of:=[.E32]/[.D32]" table:style-name="ce4">
            <text:p>0.268</text:p>
          </table:table-cell>
          <table:table-cell office:value-type="float" office:value="0.50341796875" table:formula="of:=[.F32]/[.D32]" table:style-name="ce4">
            <text:p>0.503</text:p>
          </table:table-cell>
          <table:table-cell office:value-type="float" office:value="1.8779599271402549" table:formula="of:=[.F32]/[.E32]" table:style-name="ce4">
            <text:p>1.878</text:p>
          </table:table-cell>
          <table:table-cell office:value-type="float" office:value="0.11279296875" table:formula="of:=[.H32]/[.D32]" table:style-name="ce4">
            <text:p>0.113</text:p>
          </table:table-cell>
          <table:table-cell table:number-columns-repeated="2" table:style-name="ce2"/>
          <table:table-cell table:style-name="ce3"/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0" table:style-name="ce3"/>
          <table:table-cell table:number-columns-repeated="4" table:style-name="ce4"/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29" table:style-name="ce3">
            <text:p>29</text:p>
          </table:table-cell>
          <table:table-cell office:value-type="float" office:value="68" table:style-name="ce3">
            <text:p>68</text:p>
          </table:table-cell>
          <table:table-cell office:value-type="float" office:value="84" table:style-name="ce3">
            <text:p>8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53125" table:formula="of:=[.E34]/[.D34]" table:style-name="ce4">
            <text:p>0.453</text:p>
          </table:table-cell>
          <table:table-cell office:value-type="float" office:value="1.0625" table:formula="of:=[.F34]/[.D34]" table:style-name="ce4">
            <text:p>1.063</text:p>
          </table:table-cell>
          <table:table-cell office:value-type="float" office:value="2.3448275862068964" table:formula="of:=[.F34]/[.E34]" table:style-name="ce4">
            <text:p>2.345</text:p>
          </table:table-cell>
          <table:table-cell office:value-type="float" office:value="0" table:formula="of:=[.H34]/[.D34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28" table:style-name="ce3">
            <text:p>128</text:p>
          </table:table-cell>
          <table:table-cell office:value-type="float" office:value="54" table:style-name="ce3">
            <text:p>54</text:p>
          </table:table-cell>
          <table:table-cell office:value-type="float" office:value="132" table:style-name="ce3">
            <text:p>132</text:p>
          </table:table-cell>
          <table:table-cell office:value-type="float" office:value="164" table:style-name="ce3">
            <text:p>1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21875" table:formula="of:=[.E35]/[.D35]" table:style-name="ce4">
            <text:p>0.422</text:p>
          </table:table-cell>
          <table:table-cell office:value-type="float" office:value="1.03125" table:formula="of:=[.F35]/[.D35]" table:style-name="ce4">
            <text:p>1.031</text:p>
          </table:table-cell>
          <table:table-cell office:value-type="float" office:value="2.4444444444444446" table:formula="of:=[.F35]/[.E35]" table:style-name="ce4">
            <text:p>2.444</text:p>
          </table:table-cell>
          <table:table-cell office:value-type="float" office:value="0" table:formula="of:=[.H35]/[.D35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64" table:style-name="ce2">
            <text:p>64</text:p>
          </table:table-cell>
          <table:table-cell office:value-type="float" office:value="256" table:style-name="ce3">
            <text:p>256</text:p>
          </table:table-cell>
          <table:table-cell office:value-type="float" office:value="105" table:style-name="ce3">
            <text:p>105</text:p>
          </table:table-cell>
          <table:table-cell office:value-type="float" office:value="260" table:style-name="ce3">
            <text:p>260</text:p>
          </table:table-cell>
          <table:table-cell office:value-type="float" office:value="324" table:style-name="ce3">
            <text:p>3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1015625" table:formula="of:=[.E36]/[.D36]" table:style-name="ce4">
            <text:p>0.410</text:p>
          </table:table-cell>
          <table:table-cell office:value-type="float" office:value="1.015625" table:formula="of:=[.F36]/[.D36]" table:style-name="ce4">
            <text:p>1.016</text:p>
          </table:table-cell>
          <table:table-cell office:value-type="float" office:value="2.4761904761904763" table:formula="of:=[.F36]/[.E36]" table:style-name="ce4">
            <text:p>2.476</text:p>
          </table:table-cell>
          <table:table-cell office:value-type="float" office:value="0" table:formula="of:=[.H36]/[.D36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8" table:style-name="ce2">
            <text:p>128</text:p>
          </table:table-cell>
          <table:table-cell office:value-type="float" office:value="512" table:style-name="ce3">
            <text:p>512</text:p>
          </table:table-cell>
          <table:table-cell office:value-type="float" office:value="205" table:style-name="ce3">
            <text:p>205</text:p>
          </table:table-cell>
          <table:table-cell office:value-type="float" office:value="516" table:style-name="ce3">
            <text:p>516</text:p>
          </table:table-cell>
          <table:table-cell office:value-type="float" office:value="644" table:style-name="ce3">
            <text:p>6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00390625" table:formula="of:=[.E37]/[.D37]" table:style-name="ce4">
            <text:p>0.400</text:p>
          </table:table-cell>
          <table:table-cell office:value-type="float" office:value="1.0078125" table:formula="of:=[.F37]/[.D37]" table:style-name="ce4">
            <text:p>1.008</text:p>
          </table:table-cell>
          <table:table-cell office:value-type="float" office:value="2.5170731707317073" table:formula="of:=[.F37]/[.E37]" table:style-name="ce4">
            <text:p>2.517</text:p>
          </table:table-cell>
          <table:table-cell office:value-type="float" office:value="0" table:formula="of:=[.H37]/[.D37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6" table:style-name="ce2">
            <text:p>256</text:p>
          </table:table-cell>
          <table:table-cell office:value-type="float" office:value="1024" table:style-name="ce3">
            <text:p>1024</text:p>
          </table:table-cell>
          <table:table-cell office:value-type="float" office:value="406" table:style-name="ce3">
            <text:p>406</text:p>
          </table:table-cell>
          <table:table-cell office:value-type="float" office:value="1028" table:style-name="ce3">
            <text:p>1028</text:p>
          </table:table-cell>
          <table:table-cell office:value-type="float" office:value="1284" table:style-name="ce3">
            <text:p>128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396484375" table:formula="of:=[.E38]/[.D38]" table:style-name="ce4">
            <text:p>0.396</text:p>
          </table:table-cell>
          <table:table-cell office:value-type="float" office:value="1.00390625" table:formula="of:=[.F38]/[.D38]" table:style-name="ce4">
            <text:p>1.004</text:p>
          </table:table-cell>
          <table:table-cell office:value-type="float" office:value="2.5320197044334973" table:formula="of:=[.F38]/[.E38]" table:style-name="ce4">
            <text:p>2.532</text:p>
          </table:table-cell>
          <table:table-cell office:value-type="float" office:value="0" table:formula="of:=[.H38]/[.D38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12" table:style-name="ce2">
            <text:p>512</text:p>
          </table:table-cell>
          <table:table-cell office:value-type="float" office:value="2048" table:style-name="ce3">
            <text:p>2048</text:p>
          </table:table-cell>
          <table:table-cell office:value-type="float" office:value="807" table:style-name="ce3">
            <text:p>807</text:p>
          </table:table-cell>
          <table:table-cell office:value-type="float" office:value="2054" table:style-name="ce3">
            <text:p>2054</text:p>
          </table:table-cell>
          <table:table-cell office:value-type="float" office:value="2567" table:style-name="ce3">
            <text:p>2567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39404296875" table:formula="of:=[.E39]/[.D39]" table:style-name="ce4">
            <text:p>0.394</text:p>
          </table:table-cell>
          <table:table-cell office:value-type="float" office:value="1.0029296875" table:formula="of:=[.F39]/[.D39]" table:style-name="ce4">
            <text:p>1.003</text:p>
          </table:table-cell>
          <table:table-cell office:value-type="float" office:value="2.5452292441140023" table:formula="of:=[.F39]/[.E39]" table:style-name="ce4">
            <text:p>2.545</text:p>
          </table:table-cell>
          <table:table-cell office:value-type="float" office:value="0" table:formula="of:=[.H39]/[.D39]" table:style-name="ce4">
            <text:p>0.000</text:p>
          </table:table-cell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0" table:style-name="ce3"/>
          <table:table-cell table:number-columns-repeated="4" table:style-name="ce4"/>
          <table:table-cell table:number-columns-repeated="2" table:style-name="ce2"/>
          <table:table-cell table:style-name="ce3"/>
          <table:table-cell table:number-columns-repeated="16364"/>
        </table:table-row>
        <table:table-row table:style-name="ro1">
          <table:table-cell office:value-type="string" table:style-name="ce2">
            <text:p>part sol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35" table:style-name="ce3">
            <text:p>35</text:p>
          </table:table-cell>
          <table:table-cell office:value-type="float" office:value="29" table:style-name="ce3">
            <text:p>2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46875" table:formula="of:=[.E41]/[.D41]" table:style-name="ce4">
            <text:p>0.547</text:p>
          </table:table-cell>
          <table:table-cell office:value-type="float" office:value="0.453125" table:formula="of:=[.F41]/[.D41]" table:style-name="ce4">
            <text:p>0.453</text:p>
          </table:table-cell>
          <table:table-cell office:value-type="float" office:value="0.82857142857142863" table:formula="of:=[.F41]/[.E41]" table:style-name="ce4">
            <text:p>0.829</text:p>
          </table:table-cell>
          <table:table-cell office:value-type="float" office:value="0" table:formula="of:=[.H41]/[.D41]" table:style-name="ce4">
            <text:p>0.000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77" table:style-name="ce3">
            <text:p>77</text:p>
          </table:table-cell>
          <table:table-cell office:value-type="float" office:value="61" table:style-name="ce3">
            <text:p>61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015625" table:formula="of:=[.E42]/[.D42]" table:style-name="ce4">
            <text:p>0.602</text:p>
          </table:table-cell>
          <table:table-cell office:value-type="float" office:value="0.4765625" table:formula="of:=[.F42]/[.D42]" table:style-name="ce4">
            <text:p>0.477</text:p>
          </table:table-cell>
          <table:table-cell office:value-type="float" office:value="0.79220779220779225" table:formula="of:=[.F42]/[.E42]" table:style-name="ce4">
            <text:p>0.792</text:p>
          </table:table-cell>
          <table:table-cell office:value-type="float" office:value="0" table:formula="of:=[.H42]/[.D42]" table:style-name="ce4">
            <text:p>0.000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160" table:style-name="ce3">
            <text:p>160</text:p>
          </table:table-cell>
          <table:table-cell office:value-type="float" office:value="125" table:style-name="ce3">
            <text:p>125</text:p>
          </table:table-cell>
          <table:table-cell office:value-type="float" office:value="157" table:style-name="ce3">
            <text:p>157</text:p>
          </table:table-cell>
          <table:table-cell office:value-type="float" office:value="39" table:style-name="ce3">
            <text:p>3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25" table:formula="of:=[.E43]/[.D43]" table:style-name="ce4">
            <text:p>0.625</text:p>
          </table:table-cell>
          <table:table-cell office:value-type="float" office:value="0.48828125" table:formula="of:=[.F43]/[.D43]" table:style-name="ce4">
            <text:p>0.488</text:p>
          </table:table-cell>
          <table:table-cell office:value-type="float" office:value="0.78125" table:formula="of:=[.F43]/[.E43]" table:style-name="ce4">
            <text:p>0.781</text:p>
          </table:table-cell>
          <table:table-cell office:value-type="float" office:value="0.15234375" table:formula="of:=[.H43]/[.D43]" table:style-name="ce4">
            <text:p>0.152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326" table:style-name="ce3">
            <text:p>326</text:p>
          </table:table-cell>
          <table:table-cell office:value-type="float" office:value="253" table:style-name="ce3">
            <text:p>253</text:p>
          </table:table-cell>
          <table:table-cell office:value-type="float" office:value="317" table:style-name="ce3">
            <text:p>317</text:p>
          </table:table-cell>
          <table:table-cell office:value-type="float" office:value="176" table:style-name="ce3">
            <text:p>176</text:p>
          </table:table-cell>
          <table:table-cell office:value-type="float" office:value="0.46" table:style-name="ce3">
            <text:p>0.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3671875" table:formula="of:=[.E44]/[.D44]" table:style-name="ce4">
            <text:p>0.637</text:p>
          </table:table-cell>
          <table:table-cell office:value-type="float" office:value="0.494140625" table:formula="of:=[.F44]/[.D44]" table:style-name="ce4">
            <text:p>0.494</text:p>
          </table:table-cell>
          <table:table-cell office:value-type="float" office:value="0.7760736196319018" table:formula="of:=[.F44]/[.E44]" table:style-name="ce4">
            <text:p>0.776</text:p>
          </table:table-cell>
          <table:table-cell office:value-type="float" office:value="0.34375" table:formula="of:=[.H44]/[.D44]" table:style-name="ce4">
            <text:p>0.344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673" table:style-name="ce3">
            <text:p>673</text:p>
          </table:table-cell>
          <table:table-cell office:value-type="float" office:value="509" table:style-name="ce3">
            <text:p>509</text:p>
          </table:table-cell>
          <table:table-cell office:value-type="float" office:value="637" table:style-name="ce3">
            <text:p>637</text:p>
          </table:table-cell>
          <table:table-cell office:value-type="float" office:value="466" table:style-name="ce3">
            <text:p>466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572265625" table:formula="of:=[.E45]/[.D45]" table:style-name="ce4">
            <text:p>0.657</text:p>
          </table:table-cell>
          <table:table-cell office:value-type="float" office:value="0.4970703125" table:formula="of:=[.F45]/[.D45]" table:style-name="ce4">
            <text:p>0.497</text:p>
          </table:table-cell>
          <table:table-cell office:value-type="float" office:value="0.75631500742942048" table:formula="of:=[.F45]/[.E45]" table:style-name="ce4">
            <text:p>0.756</text:p>
          </table:table-cell>
          <table:table-cell office:value-type="float" office:value="0.455078125" table:formula="of:=[.H45]/[.D45]" table:style-name="ce4">
            <text:p>0.455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1363" table:style-name="ce3">
            <text:p>1363</text:p>
          </table:table-cell>
          <table:table-cell office:value-type="float" office:value="1021" table:style-name="ce3">
            <text:p>1021</text:p>
          </table:table-cell>
          <table:table-cell office:value-type="float" office:value="1277" table:style-name="ce3">
            <text:p>1277</text:p>
          </table:table-cell>
          <table:table-cell office:value-type="float" office:value="1019" table:style-name="ce3">
            <text:p>1019</text:p>
          </table:table-cell>
          <table:table-cell office:value-type="float" office:value="1.78" table:style-name="ce3">
            <text:p>1.7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6552734375" table:formula="of:=[.E46]/[.D46]" table:style-name="ce4">
            <text:p>0.666</text:p>
          </table:table-cell>
          <table:table-cell office:value-type="float" office:value="0.49853515625" table:formula="of:=[.F46]/[.D46]" table:style-name="ce4">
            <text:p>0.499</text:p>
          </table:table-cell>
          <table:table-cell office:value-type="float" office:value="0.74908290535583277" table:formula="of:=[.F46]/[.E46]" table:style-name="ce4">
            <text:p>0.749</text:p>
          </table:table-cell>
          <table:table-cell office:value-type="float" office:value="0.49755859375" table:formula="of:=[.H46]/[.D46]" table:style-name="ce4">
            <text:p>0.498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2763" table:style-name="ce3">
            <text:p>2763</text:p>
          </table:table-cell>
          <table:table-cell office:value-type="float" office:value="2045" table:style-name="ce3">
            <text:p>2045</text:p>
          </table:table-cell>
          <table:table-cell office:value-type="float" office:value="2557" table:style-name="ce3">
            <text:p>2557</text:p>
          </table:table-cell>
          <table:table-cell office:value-type="float" office:value="2153" table:style-name="ce3">
            <text:p>2153</text:p>
          </table:table-cell>
          <table:table-cell office:value-type="float" office:value="1.74" table:style-name="ce3">
            <text:p>1.74</text:p>
          </table:table-cell>
          <table:table-cell office:value-type="float" office:value="50" table:style-name="ce3">
            <text:p>50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74560546875" table:formula="of:=[.E47]/[.D47]" table:style-name="ce4">
            <text:p>0.675</text:p>
          </table:table-cell>
          <table:table-cell office:value-type="float" office:value="0.499267578125" table:formula="of:=[.F47]/[.D47]" table:style-name="ce4">
            <text:p>0.499</text:p>
          </table:table-cell>
          <table:table-cell office:value-type="float" office:value="0.74013753166847629" table:formula="of:=[.F47]/[.E47]" table:style-name="ce4">
            <text:p>0.740</text:p>
          </table:table-cell>
          <table:table-cell office:value-type="float" office:value="0.525634765625" table:formula="of:=[.H47]/[.D47]" table:style-name="ce4">
            <text:p>0.52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4" table:style-name="ce4"/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75" table:style-name="ce3">
            <text:p>75</text:p>
          </table:table-cell>
          <table:table-cell office:value-type="float" office:value="61" table:style-name="ce3">
            <text:p>61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71875" table:formula="of:=[.E49]/[.D49]" table:style-name="ce4">
            <text:p>1.172</text:p>
          </table:table-cell>
          <table:table-cell office:value-type="float" office:value="0.953125" table:formula="of:=[.F49]/[.D49]" table:style-name="ce4">
            <text:p>0.953</text:p>
          </table:table-cell>
          <table:table-cell office:value-type="float" office:value="0.81333333333333335" table:formula="of:=[.F49]/[.E49]" table:style-name="ce4">
            <text:p>0.813</text:p>
          </table:table-cell>
          <table:table-cell office:value-type="float" office:value="0" table:formula="of:=[.H49]/[.D49]" table:style-name="ce4">
            <text:p>0.000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28" table:style-name="ce3">
            <text:p>128</text:p>
          </table:table-cell>
          <table:table-cell office:value-type="float" office:value="160" table:style-name="ce3">
            <text:p>160</text:p>
          </table:table-cell>
          <table:table-cell office:value-type="float" office:value="125" table:style-name="ce3">
            <text:p>125</text:p>
          </table:table-cell>
          <table:table-cell office:value-type="float" office:value="157" table:style-name="ce3">
            <text:p>157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5" table:formula="of:=[.E50]/[.D50]" table:style-name="ce4">
            <text:p>1.250</text:p>
          </table:table-cell>
          <table:table-cell office:value-type="float" office:value="0.9765625" table:formula="of:=[.F50]/[.D50]" table:style-name="ce4">
            <text:p>0.977</text:p>
          </table:table-cell>
          <table:table-cell office:value-type="float" office:value="0.78125" table:formula="of:=[.F50]/[.E50]" table:style-name="ce4">
            <text:p>0.781</text:p>
          </table:table-cell>
          <table:table-cell office:value-type="float" office:value="0.3046875" table:formula="of:=[.H50]/[.D50]" table:style-name="ce4">
            <text:p>0.305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64" table:style-name="ce2">
            <text:p>64</text:p>
          </table:table-cell>
          <table:table-cell office:value-type="float" office:value="256" table:style-name="ce3">
            <text:p>256</text:p>
          </table:table-cell>
          <table:table-cell office:value-type="float" office:value="329" table:style-name="ce3">
            <text:p>329</text:p>
          </table:table-cell>
          <table:table-cell office:value-type="float" office:value="253" table:style-name="ce3">
            <text:p>253</text:p>
          </table:table-cell>
          <table:table-cell office:value-type="float" office:value="317" table:style-name="ce3">
            <text:p>317</text:p>
          </table:table-cell>
          <table:table-cell office:value-type="float" office:value="183" table:style-name="ce3">
            <text:p>183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8515625" table:formula="of:=[.E51]/[.D51]" table:style-name="ce4">
            <text:p>1.285</text:p>
          </table:table-cell>
          <table:table-cell office:value-type="float" office:value="0.98828125" table:formula="of:=[.F51]/[.D51]" table:style-name="ce4">
            <text:p>0.988</text:p>
          </table:table-cell>
          <table:table-cell office:value-type="float" office:value="0.76899696048632216" table:formula="of:=[.F51]/[.E51]" table:style-name="ce4">
            <text:p>0.769</text:p>
          </table:table-cell>
          <table:table-cell office:value-type="float" office:value="0.71484375" table:formula="of:=[.H51]/[.D51]" table:style-name="ce4">
            <text:p>0.715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8" table:style-name="ce2">
            <text:p>128</text:p>
          </table:table-cell>
          <table:table-cell office:value-type="float" office:value="512" table:style-name="ce3">
            <text:p>512</text:p>
          </table:table-cell>
          <table:table-cell office:value-type="float" office:value="664" table:style-name="ce3">
            <text:p>664</text:p>
          </table:table-cell>
          <table:table-cell office:value-type="float" office:value="509" table:style-name="ce3">
            <text:p>509</text:p>
          </table:table-cell>
          <table:table-cell office:value-type="float" office:value="637" table:style-name="ce3">
            <text:p>637</text:p>
          </table:table-cell>
          <table:table-cell office:value-type="float" office:value="451" table:style-name="ce3">
            <text:p>451</text:p>
          </table:table-cell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96875" table:formula="of:=[.E52]/[.D52]" table:style-name="ce4">
            <text:p>1.297</text:p>
          </table:table-cell>
          <table:table-cell office:value-type="float" office:value="0.994140625" table:formula="of:=[.F52]/[.D52]" table:style-name="ce4">
            <text:p>0.994</text:p>
          </table:table-cell>
          <table:table-cell office:value-type="float" office:value="0.76656626506024095" table:formula="of:=[.F52]/[.E52]" table:style-name="ce4">
            <text:p>0.767</text:p>
          </table:table-cell>
          <table:table-cell office:value-type="float" office:value="0.880859375" table:formula="of:=[.H52]/[.D52]" table:style-name="ce4">
            <text:p>0.881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6" table:style-name="ce2">
            <text:p>256</text:p>
          </table:table-cell>
          <table:table-cell office:value-type="float" office:value="1024" table:style-name="ce3">
            <text:p>1024</text:p>
          </table:table-cell>
          <table:table-cell office:value-type="float" office:value="1359" table:style-name="ce3">
            <text:p>1359</text:p>
          </table:table-cell>
          <table:table-cell office:value-type="float" office:value="1021" table:style-name="ce3">
            <text:p>1021</text:p>
          </table:table-cell>
          <table:table-cell office:value-type="float" office:value="1277" table:style-name="ce3">
            <text:p>1277</text:p>
          </table:table-cell>
          <table:table-cell office:value-type="float" office:value="1013" table:style-name="ce3">
            <text:p>1013</text:p>
          </table:table-cell>
          <table:table-cell office:value-type="float" office:value="8.1999999999999993" table:style-name="ce3">
            <text:p>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3271484375" table:formula="of:=[.E53]/[.D53]" table:style-name="ce4">
            <text:p>1.327</text:p>
          </table:table-cell>
          <table:table-cell office:value-type="float" office:value="0.9970703125" table:formula="of:=[.F53]/[.D53]" table:style-name="ce4">
            <text:p>0.997</text:p>
          </table:table-cell>
          <table:table-cell office:value-type="float" office:value="0.7512877115526122" table:formula="of:=[.F53]/[.E53]" table:style-name="ce4">
            <text:p>0.751</text:p>
          </table:table-cell>
          <table:table-cell office:value-type="float" office:value="0.9892578125" table:formula="of:=[.H53]/[.D53]" table:style-name="ce4">
            <text:p>0.989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12" table:style-name="ce2">
            <text:p>512</text:p>
          </table:table-cell>
          <table:table-cell office:value-type="float" office:value="2048" table:style-name="ce3">
            <text:p>2048</text:p>
          </table:table-cell>
          <table:table-cell office:value-type="float" office:value="2738" table:style-name="ce3">
            <text:p>2738</text:p>
          </table:table-cell>
          <table:table-cell office:value-type="float" office:value="2045" table:style-name="ce3">
            <text:p>2045</text:p>
          </table:table-cell>
          <table:table-cell office:value-type="float" office:value="2557" table:style-name="ce3">
            <text:p>2557</text:p>
          </table:table-cell>
          <table:table-cell office:value-type="float" office:value="2139" table:style-name="ce3">
            <text:p>2139</text:p>
          </table:table-cell>
          <table:table-cell office:value-type="float" office:value="0.3" table:style-name="ce3">
            <text:p>0.3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3369140625" table:formula="of:=[.E54]/[.D54]" table:style-name="ce4">
            <text:p>1.337</text:p>
          </table:table-cell>
          <table:table-cell office:value-type="float" office:value="0.99853515625" table:formula="of:=[.F54]/[.D54]" table:style-name="ce4">
            <text:p>0.999</text:p>
          </table:table-cell>
          <table:table-cell office:value-type="float" office:value="0.74689554419284154" table:formula="of:=[.F54]/[.E54]" table:style-name="ce4">
            <text:p>0.747</text:p>
          </table:table-cell>
          <table:table-cell office:value-type="float" office:value="1.04443359375" table:formula="of:=[.H54]/[.D54]" table:style-name="ce4">
            <text:p>1.044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table:style-name="ce6"/>
          <table:table-cell table:number-columns-repeated="11" table:style-name="ce2"/>
          <table:table-cell table:number-columns-repeated="4" table:style-name="ce4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homo sol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72" table:style-name="ce3">
            <text:p>72</text:p>
          </table:table-cell>
          <table:table-cell office:value-type="float" office:value="67" table:style-name="ce3">
            <text:p>67</text:p>
          </table:table-cell>
          <table:table-cell office:value-type="float" office:value="95" table:style-name="ce3">
            <text:p>95</text:p>
          </table:table-cell>
          <table:table-cell office:value-type="float" office:value="14" table:style-name="ce3">
            <text:p>14</text:p>
          </table:table-cell>
          <table:table-cell office:value-type="float" office:value="0.44" table:style-name="ce3">
            <text:p>0.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25" table:formula="of:=[.E56]/[.D56]" table:style-name="ce4">
            <text:p>1.125</text:p>
          </table:table-cell>
          <table:table-cell office:value-type="float" office:value="1.046875" table:formula="of:=[.F56]/[.D56]" table:style-name="ce4">
            <text:p>1.047</text:p>
          </table:table-cell>
          <table:table-cell office:value-type="float" office:value="0.93055555555555558" table:formula="of:=[.F56]/[.E56]" table:style-name="ce4">
            <text:p>0.931</text:p>
          </table:table-cell>
          <table:table-cell office:value-type="float" office:value="0.21875" table:formula="of:=[.H56]/[.D56]" table:style-name="ce4">
            <text:p>0.219</text:p>
          </table:table-cell>
          <table:table-cell table:style-name="ce5"/>
          <table:table-cell table:number-columns-repeated="1636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89" table:style-name="ce3">
            <text:p>89</text:p>
          </table:table-cell>
          <table:table-cell office:value-type="float" office:value="107" table:style-name="ce3">
            <text:p>107</text:p>
          </table:table-cell>
          <table:table-cell office:value-type="float" office:value="166" table:style-name="ce3">
            <text:p>166</text:p>
          </table:table-cell>
          <table:table-cell office:value-type="float" office:value="16" table:style-name="ce3">
            <text:p>16</text:p>
          </table:table-cell>
          <table:table-cell office:value-type="float" office:value="4.3499999999999996" table:style-name="ce3">
            <text:p>4.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953125" table:formula="of:=[.E57]/[.D57]" table:style-name="ce4">
            <text:p>0.695</text:p>
          </table:table-cell>
          <table:table-cell office:value-type="float" office:value="0.8359375" table:formula="of:=[.F57]/[.D57]" table:style-name="ce4">
            <text:p>0.836</text:p>
          </table:table-cell>
          <table:table-cell office:value-type="float" office:value="1.202247191011236" table:formula="of:=[.F57]/[.E57]" table:style-name="ce4">
            <text:p>1.202</text:p>
          </table:table-cell>
          <table:table-cell office:value-type="float" office:value="0.125" table:formula="of:=[.H57]/[.D57]" table:style-name="ce4">
            <text:p>0.125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138" table:style-name="ce3">
            <text:p>138</text:p>
          </table:table-cell>
          <table:table-cell office:value-type="float" office:value="205" table:style-name="ce3">
            <text:p>205</text:p>
          </table:table-cell>
          <table:table-cell office:value-type="float" office:value="328" table:style-name="ce3">
            <text:p>328</text:p>
          </table:table-cell>
          <table:table-cell office:value-type="float" office:value="25" table:style-name="ce3">
            <text:p>25</text:p>
          </table:table-cell>
          <table:table-cell office:value-type="float" office:value="16.89" table:style-name="ce3">
            <text:p>16.89</text:p>
          </table:table-cell>
          <table:table-cell office:value-type="float" office:value="0" table:style-name="ce3">
            <text:p>0</text:p>
          </table:table-cell>
          <table:table-cell office:value-type="float" office:value="0.03" table:style-name="ce3">
            <text:p>0.0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390625" table:formula="of:=[.E58]/[.D58]" table:style-name="ce4">
            <text:p>0.539</text:p>
          </table:table-cell>
          <table:table-cell office:value-type="float" office:value="0.80078125" table:formula="of:=[.F58]/[.D58]" table:style-name="ce4">
            <text:p>0.801</text:p>
          </table:table-cell>
          <table:table-cell office:value-type="float" office:value="1.4855072463768115" table:formula="of:=[.F58]/[.E58]" table:style-name="ce4">
            <text:p>1.486</text:p>
          </table:table-cell>
          <table:table-cell office:value-type="float" office:value="9.765625E-2" table:formula="of:=[.H58]/[.D58]" table:style-name="ce4">
            <text:p>0.098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237" table:style-name="ce3">
            <text:p>237</text:p>
          </table:table-cell>
          <table:table-cell office:value-type="float" office:value="397" table:style-name="ce3">
            <text:p>397</text:p>
          </table:table-cell>
          <table:table-cell office:value-type="float" office:value="648" table:style-name="ce3">
            <text:p>648</text:p>
          </table:table-cell>
          <table:table-cell office:value-type="float" office:value="31" table:style-name="ce3">
            <text:p>31</text:p>
          </table:table-cell>
          <table:table-cell office:value-type="float" office:value="57.82" table:style-name="ce3">
            <text:p>57.8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62890625" table:formula="of:=[.E59]/[.D59]" table:style-name="ce4">
            <text:p>0.463</text:p>
          </table:table-cell>
          <table:table-cell office:value-type="float" office:value="0.775390625" table:formula="of:=[.F59]/[.D59]" table:style-name="ce4">
            <text:p>0.775</text:p>
          </table:table-cell>
          <table:table-cell office:value-type="float" office:value="1.6751054852320675" table:formula="of:=[.F59]/[.E59]" table:style-name="ce4">
            <text:p>1.675</text:p>
          </table:table-cell>
          <table:table-cell office:value-type="float" office:value="6.0546875E-2" table:formula="of:=[.H59]/[.D59]" table:style-name="ce4">
            <text:p>0.061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455" table:style-name="ce3">
            <text:p>455</text:p>
          </table:table-cell>
          <table:table-cell office:value-type="float" office:value="783" table:style-name="ce3">
            <text:p>783</text:p>
          </table:table-cell>
          <table:table-cell office:value-type="float" office:value="1290" table:style-name="ce3">
            <text:p>1290</text:p>
          </table:table-cell>
          <table:table-cell office:value-type="float" office:value="27" table:style-name="ce3">
            <text:p>27</text:p>
          </table:table-cell>
          <table:table-cell office:value-type="float" office:value="8.15" table:style-name="ce3">
            <text:p>8.15</text:p>
          </table:table-cell>
          <table:table-cell office:value-type="float" office:value="0" table:style-name="ce3">
            <text:p>0</text:p>
          </table:table-cell>
          <table:table-cell office:value-type="float" office:value="0.13" table:style-name="ce3">
            <text:p>0.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443359375" table:formula="of:=[.E60]/[.D60]" table:style-name="ce4">
            <text:p>0.444</text:p>
          </table:table-cell>
          <table:table-cell office:value-type="float" office:value="0.7646484375" table:formula="of:=[.F60]/[.D60]" table:style-name="ce4">
            <text:p>0.765</text:p>
          </table:table-cell>
          <table:table-cell office:value-type="float" office:value="1.720879120879121" table:formula="of:=[.F60]/[.E60]" table:style-name="ce4">
            <text:p>1.721</text:p>
          </table:table-cell>
          <table:table-cell office:value-type="float" office:value="2.63671875E-2" table:formula="of:=[.H60]/[.D60]" table:style-name="ce4">
            <text:p>0.026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860" table:style-name="ce3">
            <text:p>860</text:p>
          </table:table-cell>
          <table:table-cell office:value-type="float" office:value="1440" table:style-name="ce3">
            <text:p>1440</text:p>
          </table:table-cell>
          <table:table-cell office:value-type="float" office:value="2330" table:style-name="ce3">
            <text:p>2330</text:p>
          </table:table-cell>
          <table:table-cell office:value-type="float" office:value="82" table:style-name="ce3">
            <text:p>82</text:p>
          </table:table-cell>
          <table:table-cell office:value-type="float" office:value="38.68" table:style-name="ce3">
            <text:p>38.68</text:p>
          </table:table-cell>
          <table:table-cell office:value-type="float" office:value="265" table:style-name="ce3">
            <text:p>265</text:p>
          </table:table-cell>
          <table:table-cell office:value-type="float" office:value="8.77" table:style-name="ce3">
            <text:p>8.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19921875" table:formula="of:=[.E61]/[.D61]" table:style-name="ce4">
            <text:p>0.420</text:p>
          </table:table-cell>
          <table:table-cell office:value-type="float" office:value="0.703125" table:formula="of:=[.F61]/[.D61]" table:style-name="ce4">
            <text:p>0.703</text:p>
          </table:table-cell>
          <table:table-cell office:value-type="float" office:value="1.6744186046511629" table:formula="of:=[.F61]/[.E61]" table:style-name="ce4">
            <text:p>1.674</text:p>
          </table:table-cell>
          <table:table-cell office:value-type="float" office:value="4.00390625E-2" table:formula="of:=[.H61]/[.D61]" table:style-name="ce4">
            <text:p>0.040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3144" table:style-name="ce3">
            <text:p>3144</text:p>
          </table:table-cell>
          <table:table-cell office:value-type="float" office:value="2040" table:style-name="ce3">
            <text:p>2040</text:p>
          </table:table-cell>
          <table:table-cell office:value-type="float" office:value="3540" table:style-name="ce3">
            <text:p>3540</text:p>
          </table:table-cell>
          <table:table-cell office:value-type="float" office:value="2559" table:style-name="ce3">
            <text:p>2559</text:p>
          </table:table-cell>
          <table:table-cell office:value-type="float" office:value="33.99" table:style-name="ce3">
            <text:p>33.99</text:p>
          </table:table-cell>
          <table:table-cell office:value-type="float" office:value="754" table:style-name="ce3">
            <text:p>754</text:p>
          </table:table-cell>
          <table:table-cell office:value-type="float" office:value="1.78" table:style-name="ce3">
            <text:p>1.7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67578125" table:formula="of:=[.E62]/[.D62]" table:style-name="ce4">
            <text:p>0.768</text:p>
          </table:table-cell>
          <table:table-cell office:value-type="float" office:value="0.498046875" table:formula="of:=[.F62]/[.D62]" table:style-name="ce4">
            <text:p>0.498</text:p>
          </table:table-cell>
          <table:table-cell office:value-type="float" office:value="0.64885496183206104" table:formula="of:=[.F62]/[.E62]" table:style-name="ce4">
            <text:p>0.649</text:p>
          </table:table-cell>
          <table:table-cell office:value-type="float" office:value="0.624755859375" table:formula="of:=[.H62]/[.D62]" table:style-name="ce4">
            <text:p>0.625</text:p>
          </table:table-cell>
          <table:table-cell table:style-name="ce3"/>
          <table:table-cell table:number-columns-repeated="16366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4" table:style-name="ce4"/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68" table:style-name="ce3">
            <text:p>68</text:p>
          </table:table-cell>
          <table:table-cell office:value-type="float" office:value="93" table:style-name="ce3">
            <text:p>93</text:p>
          </table:table-cell>
          <table:table-cell office:value-type="float" office:value="149" table:style-name="ce3">
            <text:p>149</text:p>
          </table:table-cell>
          <table:table-cell office:value-type="float" office:value="7" table:style-name="ce3">
            <text:p>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625" table:formula="of:=[.E64]/[.D64]" table:style-name="ce4">
            <text:p>1.063</text:p>
          </table:table-cell>
          <table:table-cell office:value-type="float" office:value="1.453125" table:formula="of:=[.F64]/[.D64]" table:style-name="ce4">
            <text:p>1.453</text:p>
          </table:table-cell>
          <table:table-cell office:value-type="float" office:value="1.3676470588235294" table:formula="of:=[.F64]/[.E64]" table:style-name="ce4">
            <text:p>1.368</text:p>
          </table:table-cell>
          <table:table-cell office:value-type="float" office:value="0.109375" table:formula="of:=[.H64]/[.D64]" table:style-name="ce4">
            <text:p>0.109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28" table:style-name="ce3">
            <text:p>128</text:p>
          </table:table-cell>
          <table:table-cell office:value-type="float" office:value="116" table:style-name="ce3">
            <text:p>116</text:p>
          </table:table-cell>
          <table:table-cell office:value-type="float" office:value="190" table:style-name="ce3">
            <text:p>190</text:p>
          </table:table-cell>
          <table:table-cell office:value-type="float" office:value="310" table:style-name="ce3">
            <text:p>310</text:p>
          </table:table-cell>
          <table:table-cell office:value-type="float" office:value="7" table:style-name="ce3">
            <text:p>7</text:p>
          </table:table-cell>
          <table:table-cell office:value-type="float" office:value="1.7" table:style-name="ce3">
            <text:p>1.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0625" table:formula="of:=[.E65]/[.D65]" table:style-name="ce4">
            <text:p>0.906</text:p>
          </table:table-cell>
          <table:table-cell office:value-type="float" office:value="1.484375" table:formula="of:=[.F65]/[.D65]" table:style-name="ce4">
            <text:p>1.484</text:p>
          </table:table-cell>
          <table:table-cell office:value-type="float" office:value="1.6379310344827587" table:formula="of:=[.F65]/[.E65]" table:style-name="ce4">
            <text:p>1.638</text:p>
          </table:table-cell>
          <table:table-cell office:value-type="float" office:value="5.46875E-2" table:formula="of:=[.H65]/[.D65]" table:style-name="ce4">
            <text:p>0.055</text:p>
          </table:table-cell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64" table:style-name="ce2">
            <text:p>64</text:p>
          </table:table-cell>
          <table:table-cell office:value-type="float" office:value="256" table:style-name="ce3">
            <text:p>256</text:p>
          </table:table-cell>
          <table:table-cell office:value-type="float" office:value="217" table:style-name="ce3">
            <text:p>217</text:p>
          </table:table-cell>
          <table:table-cell office:value-type="float" office:value="383" table:style-name="ce3">
            <text:p>383</text:p>
          </table:table-cell>
          <table:table-cell office:value-type="float" office:value="631" table:style-name="ce3">
            <text:p>631</text:p>
          </table:table-cell>
          <table:table-cell office:value-type="float" office:value="6" table:style-name="ce3">
            <text:p>6</text:p>
          </table:table-cell>
          <table:table-cell office:value-type="float" office:value="1.4" table:style-name="ce3">
            <text:p>1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4765625" table:formula="of:=[.E66]/[.D66]" table:style-name="ce4">
            <text:p>0.848</text:p>
          </table:table-cell>
          <table:table-cell office:value-type="float" office:value="1.49609375" table:formula="of:=[.F66]/[.D66]" table:style-name="ce4">
            <text:p>1.496</text:p>
          </table:table-cell>
          <table:table-cell office:value-type="float" office:value="1.7649769585253456" table:formula="of:=[.F66]/[.E66]" table:style-name="ce4">
            <text:p>1.765</text:p>
          </table:table-cell>
          <table:table-cell office:value-type="float" office:value="2.34375E-2" table:formula="of:=[.H66]/[.D66]" table:style-name="ce4">
            <text:p>0.023</text:p>
          </table:table-cell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8" table:style-name="ce2">
            <text:p>128</text:p>
          </table:table-cell>
          <table:table-cell office:value-type="float" office:value="512" table:style-name="ce3">
            <text:p>512</text:p>
          </table:table-cell>
          <table:table-cell office:value-type="float" office:value="428" table:style-name="ce3">
            <text:p>428</text:p>
          </table:table-cell>
          <table:table-cell office:value-type="float" office:value="766" table:style-name="ce3">
            <text:p>766</text:p>
          </table:table-cell>
          <table:table-cell office:value-type="float" office:value="1270" table:style-name="ce3">
            <text:p>1270</text:p>
          </table:table-cell>
          <table:table-cell office:value-type="float" office:value="7" table:style-name="ce3">
            <text:p>7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359375" table:formula="of:=[.E67]/[.D67]" table:style-name="ce4">
            <text:p>0.836</text:p>
          </table:table-cell>
          <table:table-cell office:value-type="float" office:value="1.49609375" table:formula="of:=[.F67]/[.D67]" table:style-name="ce4">
            <text:p>1.496</text:p>
          </table:table-cell>
          <table:table-cell office:value-type="float" office:value="1.7897196261682242" table:formula="of:=[.F67]/[.E67]" table:style-name="ce4">
            <text:p>1.790</text:p>
          </table:table-cell>
          <table:table-cell office:value-type="float" office:value="1.3671875E-2" table:formula="of:=[.H67]/[.D67]" table:style-name="ce4">
            <text:p>0.014</text:p>
          </table:table-cell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6" table:style-name="ce2">
            <text:p>256</text:p>
          </table:table-cell>
          <table:table-cell office:value-type="float" office:value="1024" table:style-name="ce3">
            <text:p>1024</text:p>
          </table:table-cell>
          <table:table-cell office:value-type="float" office:value="782" table:style-name="ce3">
            <text:p>782</text:p>
          </table:table-cell>
          <table:table-cell office:value-type="float" office:value="1378" table:style-name="ce3">
            <text:p>1378</text:p>
          </table:table-cell>
          <table:table-cell office:value-type="float" office:value="2317" table:style-name="ce3">
            <text:p>2317</text:p>
          </table:table-cell>
          <table:table-cell office:value-type="float" office:value="22" table:style-name="ce3">
            <text:p>22</text:p>
          </table:table-cell>
          <table:table-cell office:value-type="float" office:value="1.6" table:style-name="ce3">
            <text:p>1.6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63671875" table:formula="of:=[.E68]/[.D68]" table:style-name="ce4">
            <text:p>0.764</text:p>
          </table:table-cell>
          <table:table-cell office:value-type="float" office:value="1.345703125" table:formula="of:=[.F68]/[.D68]" table:style-name="ce4">
            <text:p>1.346</text:p>
          </table:table-cell>
          <table:table-cell office:value-type="float" office:value="1.7621483375959079" table:formula="of:=[.F68]/[.E68]" table:style-name="ce4">
            <text:p>1.762</text:p>
          </table:table-cell>
          <table:table-cell office:value-type="float" office:value="2.1484375E-2" table:formula="of:=[.H68]/[.D68]" table:style-name="ce4">
            <text:p>0.021</text:p>
          </table:table-cell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12" table:style-name="ce2">
            <text:p>512</text:p>
          </table:table-cell>
          <table:table-cell office:value-type="float" office:value="2048" table:style-name="ce3">
            <text:p>2048</text:p>
          </table:table-cell>
          <table:table-cell office:value-type="float" office:value="1167" table:style-name="ce3">
            <text:p>1167</text:p>
          </table:table-cell>
          <table:table-cell office:value-type="float" office:value="2024" table:style-name="ce3">
            <text:p>2024</text:p>
          </table:table-cell>
          <table:table-cell office:value-type="float" office:value="3522" table:style-name="ce3">
            <text:p>3522</text:p>
          </table:table-cell>
          <table:table-cell office:value-type="float" office:value="53" table:style-name="ce3">
            <text:p>53</text:p>
          </table:table-cell>
          <table:table-cell office:value-type="float" office:value="41.9" table:style-name="ce3">
            <text:p>41.9</text:p>
          </table:table-cell>
          <table:table-cell office:value-type="float" office:value="70" table:style-name="ce3">
            <text:p>70</text:p>
          </table:table-cell>
          <table:table-cell office:value-type="float" office:value="9.1" table:style-name="ce3">
            <text:p>9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6982421875" table:formula="of:=[.E69]/[.D69]" table:style-name="ce4">
            <text:p>0.570</text:p>
          </table:table-cell>
          <table:table-cell office:value-type="float" office:value="0.98828125" table:formula="of:=[.F69]/[.D69]" table:style-name="ce4">
            <text:p>0.988</text:p>
          </table:table-cell>
          <table:table-cell office:value-type="float" office:value="1.7343616109682947" table:formula="of:=[.F69]/[.E69]" table:style-name="ce4">
            <text:p>1.734</text:p>
          </table:table-cell>
          <table:table-cell office:value-type="float" office:value="2.587890625E-2" table:formula="of:=[.H69]/[.D69]" table:style-name="ce4">
            <text:p>0.026</text:p>
          </table:table-cell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number-columns-repeated="5" table:style-name="ce3"/>
          <table:table-cell table:number-columns-repeated="4" table:style-name="ce4"/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cr forward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44" table:style-name="ce3">
            <text:p>44</text:p>
          </table:table-cell>
          <table:table-cell office:value-type="float" office:value="51" table:style-name="ce3">
            <text:p>51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875" table:formula="of:=[.E71]/[.D71]" table:style-name="ce4">
            <text:p>0.688</text:p>
          </table:table-cell>
          <table:table-cell office:value-type="float" office:value="0.796875" table:formula="of:=[.F71]/[.D71]" table:style-name="ce4">
            <text:p>0.797</text:p>
          </table:table-cell>
          <table:table-cell office:value-type="float" office:value="1.1590909090909092" table:formula="of:=[.F71]/[.E71]" table:style-name="ce4">
            <text:p>1.159</text:p>
          </table:table-cell>
          <table:table-cell office:value-type="float" office:value="0" table:formula="of:=[.H71]/[.D71]" table:style-name="ce4">
            <text:p>0.000</text:p>
          </table:table-cell>
          <table:table-cell table:style-name="ce3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87" table:style-name="ce3">
            <text:p>87</text:p>
          </table:table-cell>
          <table:table-cell office:value-type="float" office:value="156" table:style-name="ce3">
            <text:p>156</text:p>
          </table:table-cell>
          <table:table-cell office:value-type="float" office:value="195" table:style-name="ce3">
            <text:p>195</text:p>
          </table:table-cell>
          <table:table-cell office:value-type="float" office:value="2" table:style-name="ce3">
            <text:p>2</text:p>
          </table:table-cell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796875" table:formula="of:=[.E72]/[.D72]" table:style-name="ce4">
            <text:p>0.680</text:p>
          </table:table-cell>
          <table:table-cell office:value-type="float" office:value="1.21875" table:formula="of:=[.F72]/[.D72]" table:style-name="ce4">
            <text:p>1.219</text:p>
          </table:table-cell>
          <table:table-cell office:value-type="float" office:value="1.7931034482758621" table:formula="of:=[.F72]/[.E72]" table:style-name="ce4">
            <text:p>1.793</text:p>
          </table:table-cell>
          <table:table-cell office:value-type="float" office:value="1.5625E-2" table:formula="of:=[.H72]/[.D72]" table:style-name="ce4">
            <text:p>0.01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136" table:style-name="ce3">
            <text:p>136</text:p>
          </table:table-cell>
          <table:table-cell office:value-type="float" office:value="291" table:style-name="ce3">
            <text:p>291</text:p>
          </table:table-cell>
          <table:table-cell office:value-type="float" office:value="370" table:style-name="ce3">
            <text:p>370</text:p>
          </table:table-cell>
          <table:table-cell office:value-type="float" office:value="3" table:style-name="ce3">
            <text:p>3</text:p>
          </table:table-cell>
          <table:table-cell office:value-type="float" office:value="2.2200000000000002" table:style-name="ce3">
            <text:p>2.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3125" table:formula="of:=[.E73]/[.D73]" table:style-name="ce4">
            <text:p>0.531</text:p>
          </table:table-cell>
          <table:table-cell office:value-type="float" office:value="1.13671875" table:formula="of:=[.F73]/[.D73]" table:style-name="ce4">
            <text:p>1.137</text:p>
          </table:table-cell>
          <table:table-cell office:value-type="float" office:value="2.1397058823529411" table:formula="of:=[.F73]/[.E73]" table:style-name="ce4">
            <text:p>2.140</text:p>
          </table:table-cell>
          <table:table-cell office:value-type="float" office:value="1.171875E-2" table:formula="of:=[.H73]/[.D73]" table:style-name="ce4">
            <text:p>0.012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272" table:style-name="ce3">
            <text:p>272</text:p>
          </table:table-cell>
          <table:table-cell office:value-type="float" office:value="581" table:style-name="ce3">
            <text:p>581</text:p>
          </table:table-cell>
          <table:table-cell office:value-type="float" office:value="814" table:style-name="ce3">
            <text:p>814</text:p>
          </table:table-cell>
          <table:table-cell office:value-type="float" office:value="32" table:style-name="ce3">
            <text:p>32</text:p>
          </table:table-cell>
          <table:table-cell office:value-type="float" office:value="10.4" table:style-name="ce3">
            <text:p>10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3125" table:formula="of:=[.E74]/[.D74]" table:style-name="ce4">
            <text:p>0.531</text:p>
          </table:table-cell>
          <table:table-cell office:value-type="float" office:value="1.134765625" table:formula="of:=[.F74]/[.D74]" table:style-name="ce4">
            <text:p>1.135</text:p>
          </table:table-cell>
          <table:table-cell office:value-type="float" office:value="2.1360294117647061" table:formula="of:=[.F74]/[.E74]" table:style-name="ce4">
            <text:p>2.136</text:p>
          </table:table-cell>
          <table:table-cell office:value-type="float" office:value="6.25E-2" table:formula="of:=[.H74]/[.D74]" table:style-name="ce4">
            <text:p>0.063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538" table:style-name="ce3">
            <text:p>538</text:p>
          </table:table-cell>
          <table:table-cell office:value-type="float" office:value="1179" table:style-name="ce3">
            <text:p>1179</text:p>
          </table:table-cell>
          <table:table-cell office:value-type="float" office:value="1715" table:style-name="ce3">
            <text:p>1715</text:p>
          </table:table-cell>
          <table:table-cell office:value-type="float" office:value="47" table:style-name="ce3">
            <text:p>47</text:p>
          </table:table-cell>
          <table:table-cell office:value-type="float" office:value="3.5" table:style-name="ce3">
            <text:p>3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25390625" table:formula="of:=[.E75]/[.D75]" table:style-name="ce4">
            <text:p>0.525</text:p>
          </table:table-cell>
          <table:table-cell office:value-type="float" office:value="1.1513671875" table:formula="of:=[.F75]/[.D75]" table:style-name="ce4">
            <text:p>1.151</text:p>
          </table:table-cell>
          <table:table-cell office:value-type="float" office:value="2.1914498141263938" table:formula="of:=[.F75]/[.E75]" table:style-name="ce4">
            <text:p>2.191</text:p>
          </table:table-cell>
          <table:table-cell office:value-type="float" office:value="4.58984375E-2" table:formula="of:=[.H75]/[.D75]" table:style-name="ce4">
            <text:p>0.046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1087" table:style-name="ce3">
            <text:p>1087</text:p>
          </table:table-cell>
          <table:table-cell office:value-type="float" office:value="1531" table:style-name="ce3">
            <text:p>1531</text:p>
          </table:table-cell>
          <table:table-cell office:value-type="float" office:value="3590" table:style-name="ce3">
            <text:p>3590</text:p>
          </table:table-cell>
          <table:table-cell office:value-type="float" office:value="57" table:style-name="ce3">
            <text:p>57</text:p>
          </table:table-cell>
          <table:table-cell office:value-type="float" office:value="2.6" table:style-name="ce3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3076171875" table:formula="of:=[.E76]/[.D76]" table:style-name="ce4">
            <text:p>0.531</text:p>
          </table:table-cell>
          <table:table-cell office:value-type="float" office:value="0.74755859375" table:formula="of:=[.F76]/[.D76]" table:style-name="ce4">
            <text:p>0.748</text:p>
          </table:table-cell>
          <table:table-cell office:value-type="float" office:value="1.408463661453542" table:formula="of:=[.F76]/[.E76]" table:style-name="ce4">
            <text:p>1.408</text:p>
          </table:table-cell>
          <table:table-cell office:value-type="float" office:value="2.783203125E-2" table:formula="of:=[.H76]/[.D76]" table:style-name="ce4">
            <text:p>0.028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2302" table:style-name="ce3">
            <text:p>2302</text:p>
          </table:table-cell>
          <table:table-cell office:value-type="float" office:value="3068" table:style-name="ce3">
            <text:p>3068</text:p>
          </table:table-cell>
          <table:table-cell office:value-type="float" office:value="7179" table:style-name="ce3">
            <text:p>7179</text:p>
          </table:table-cell>
          <table:table-cell office:value-type="float" office:value="267" table:style-name="ce3">
            <text:p>267</text:p>
          </table:table-cell>
          <table:table-cell office:value-type="float" office:value="27.9" table:style-name="ce3">
            <text:p>27.9</text:p>
          </table:table-cell>
          <table:table-cell office:value-type="float" office:value="23" table:style-name="ce3">
            <text:p>23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6201171875" table:formula="of:=[.E77]/[.D77]" table:style-name="ce4">
            <text:p>0.562</text:p>
          </table:table-cell>
          <table:table-cell office:value-type="float" office:value="0.7490234375" table:formula="of:=[.F77]/[.D77]" table:style-name="ce4">
            <text:p>0.749</text:p>
          </table:table-cell>
          <table:table-cell office:value-type="float" office:value="1.3327541268462206" table:formula="of:=[.F77]/[.E77]" table:style-name="ce4">
            <text:p>1.333</text:p>
          </table:table-cell>
          <table:table-cell office:value-type="float" office:value="6.5185546875E-2" table:formula="of:=[.H77]/[.D77]" table:style-name="ce4">
            <text:p>0.065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4" table:style-name="ce4"/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67" table:style-name="ce3">
            <text:p>67</text:p>
          </table:table-cell>
          <table:table-cell office:value-type="float" office:value="83" table:style-name="ce3">
            <text:p>83</text:p>
          </table:table-cell>
          <table:table-cell office:value-type="float" office:value="110" table:style-name="ce3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46875" table:formula="of:=[.E79]/[.D79]" table:style-name="ce4">
            <text:p>1.047</text:p>
          </table:table-cell>
          <table:table-cell office:value-type="float" office:value="1.296875" table:formula="of:=[.F79]/[.D79]" table:style-name="ce4">
            <text:p>1.297</text:p>
          </table:table-cell>
          <table:table-cell office:value-type="float" office:value="1.2388059701492538" table:formula="of:=[.F79]/[.E79]" table:style-name="ce4">
            <text:p>1.239</text:p>
          </table:table-cell>
          <table:table-cell office:value-type="float" office:value="0" table:formula="of:=[.H79]/[.D79]" table:style-name="ce4">
            <text:p>0.000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28" table:style-name="ce3">
            <text:p>128</text:p>
          </table:table-cell>
          <table:table-cell office:value-type="float" office:value="120" table:style-name="ce3">
            <text:p>120</text:p>
          </table:table-cell>
          <table:table-cell office:value-type="float" office:value="228" table:style-name="ce3">
            <text:p>228</text:p>
          </table:table-cell>
          <table:table-cell office:value-type="float" office:value="288" table:style-name="ce3">
            <text:p>288</text:p>
          </table:table-cell>
          <table:table-cell office:value-type="float" office:value="2" table:style-name="ce3">
            <text:p>2</text:p>
          </table:table-cell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375" table:formula="of:=[.E80]/[.D80]" table:style-name="ce4">
            <text:p>0.938</text:p>
          </table:table-cell>
          <table:table-cell office:value-type="float" office:value="1.78125" table:formula="of:=[.F80]/[.D80]" table:style-name="ce4">
            <text:p>1.781</text:p>
          </table:table-cell>
          <table:table-cell office:value-type="float" office:value="1.9" table:formula="of:=[.F80]/[.E80]" table:style-name="ce4">
            <text:p>1.900</text:p>
          </table:table-cell>
          <table:table-cell office:value-type="float" office:value="1.5625E-2" table:formula="of:=[.H80]/[.D80]" table:style-name="ce4">
            <text:p>0.016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64" table:style-name="ce2">
            <text:p>64</text:p>
          </table:table-cell>
          <table:table-cell office:value-type="float" office:value="256" table:style-name="ce3">
            <text:p>256</text:p>
          </table:table-cell>
          <table:table-cell office:value-type="float" office:value="235" table:style-name="ce3">
            <text:p>235</text:p>
          </table:table-cell>
          <table:table-cell office:value-type="float" office:value="463" table:style-name="ce12">
            <text:p>463</text:p>
          </table:table-cell>
          <table:table-cell office:value-type="float" office:value="663" table:style-name="ce3">
            <text:p>66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1796875" table:formula="of:=[.E81]/[.D81]" table:style-name="ce4">
            <text:p>0.918</text:p>
          </table:table-cell>
          <table:table-cell office:value-type="float" office:value="1.80859375" table:formula="of:=[.F81]/[.D81]" table:style-name="ce4">
            <text:p>1.809</text:p>
          </table:table-cell>
          <table:table-cell office:value-type="float" office:value="1.9702127659574469" table:formula="of:=[.F81]/[.E81]" table:style-name="ce4">
            <text:p>1.970</text:p>
          </table:table-cell>
          <table:table-cell office:value-type="float" office:value="1.5625E-2" table:formula="of:=[.H81]/[.D81]" table:style-name="ce4">
            <text:p>0.016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8" table:style-name="ce2">
            <text:p>128</text:p>
          </table:table-cell>
          <table:table-cell office:value-type="float" office:value="512" table:style-name="ce3">
            <text:p>512</text:p>
          </table:table-cell>
          <table:table-cell office:value-type="float" office:value="470" table:style-name="ce12">
            <text:p>470</text:p>
          </table:table-cell>
          <table:table-cell office:value-type="float" office:value="953" table:style-name="ce3">
            <text:p>953</text:p>
          </table:table-cell>
          <table:table-cell office:value-type="float" office:value="1433" table:style-name="ce3">
            <text:p>1433</text:p>
          </table:table-cell>
          <table:table-cell office:value-type="float" office:value="36" table:style-name="ce3">
            <text:p>36</text:p>
          </table:table-cell>
          <table:table-cell office:value-type="float" office:value="2.5" table:style-name="ce3">
            <text:p>2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1796875" table:formula="of:=[.E82]/[.D82]" table:style-name="ce4">
            <text:p>0.918</text:p>
          </table:table-cell>
          <table:table-cell office:value-type="float" office:value="1.861328125" table:formula="of:=[.F82]/[.D82]" table:style-name="ce4">
            <text:p>1.861</text:p>
          </table:table-cell>
          <table:table-cell office:value-type="float" office:value="2.027659574468085" table:formula="of:=[.F82]/[.E82]" table:style-name="ce4">
            <text:p>2.028</text:p>
          </table:table-cell>
          <table:table-cell office:value-type="float" office:value="7.03125E-2" table:formula="of:=[.H82]/[.D82]" table:style-name="ce4">
            <text:p>0.070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6" table:style-name="ce2">
            <text:p>256</text:p>
          </table:table-cell>
          <table:table-cell office:value-type="float" office:value="1024" table:style-name="ce3">
            <text:p>1024</text:p>
          </table:table-cell>
          <table:table-cell office:value-type="float" office:value="933" table:style-name="ce3">
            <text:p>933</text:p>
          </table:table-cell>
          <table:table-cell office:value-type="float" office:value="1931" table:style-name="ce3">
            <text:p>1931</text:p>
          </table:table-cell>
          <table:table-cell office:value-type="float" office:value="2971" table:style-name="ce3">
            <text:p>2971</text:p>
          </table:table-cell>
          <table:table-cell office:value-type="float" office:value="52" table:style-name="ce3">
            <text:p>52</text:p>
          </table:table-cell>
          <table:table-cell office:value-type="float" office:value="4.2" table:style-name="ce3">
            <text:p>4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111328125" table:formula="of:=[.E83]/[.D83]" table:style-name="ce4">
            <text:p>0.911</text:p>
          </table:table-cell>
          <table:table-cell office:value-type="float" office:value="1.8857421875" table:formula="of:=[.F83]/[.D83]" table:style-name="ce4">
            <text:p>1.886</text:p>
          </table:table-cell>
          <table:table-cell office:value-type="float" office:value="2.069667738478028" table:formula="of:=[.F83]/[.E83]" table:style-name="ce4">
            <text:p>2.070</text:p>
          </table:table-cell>
          <table:table-cell office:value-type="float" office:value="5.078125E-2" table:formula="of:=[.H83]/[.D83]" table:style-name="ce4">
            <text:p>0.051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12" table:style-name="ce2">
            <text:p>512</text:p>
          </table:table-cell>
          <table:table-cell office:value-type="float" office:value="2048" table:style-name="ce3">
            <text:p>2048</text:p>
          </table:table-cell>
          <table:table-cell office:value-type="float" office:value="1875" table:style-name="ce3">
            <text:p>1875</text:p>
          </table:table-cell>
          <table:table-cell office:value-type="float" office:value="3051" table:style-name="ce3">
            <text:p>3051</text:p>
          </table:table-cell>
          <table:table-cell office:value-type="float" office:value="6125" table:style-name="ce3">
            <text:p>6125</text:p>
          </table:table-cell>
          <table:table-cell office:value-type="float" office:value="66" table:style-name="ce3">
            <text:p>66</text:p>
          </table:table-cell>
          <table:table-cell office:value-type="float" office:value="4.2" table:style-name="ce3">
            <text:p>4.2</text:p>
          </table:table-cell>
          <table:table-cell office:value-type="float" office:value="0" table:style-name="ce3">
            <text:p>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1552734375" table:formula="of:=[.E84]/[.D84]" table:style-name="ce4">
            <text:p>0.916</text:p>
          </table:table-cell>
          <table:table-cell office:value-type="float" office:value="1.48974609375" table:formula="of:=[.F84]/[.D84]" table:style-name="ce4">
            <text:p>1.490</text:p>
          </table:table-cell>
          <table:table-cell office:value-type="float" office:value="1.6272" table:formula="of:=[.F84]/[.E84]" table:style-name="ce4">
            <text:p>1.627</text:p>
          </table:table-cell>
          <table:table-cell office:value-type="float" office:value="3.22265625E-2" table:formula="of:=[.H84]/[.D84]" table:style-name="ce4">
            <text:p>0.032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number-columns-repeated="9" table:style-name="ce2"/>
          <table:table-cell table:number-columns-repeated="4" table:style-name="ce3"/>
          <table:table-cell table:number-columns-repeated="4" table:style-name="ce4"/>
          <table:table-cell table:number-columns-repeated="2" table:style-name="ce3"/>
          <table:table-cell table:number-columns-repeated="16365"/>
        </table:table-row>
        <table:table-row table:style-name="ro1">
          <table:table-cell office:value-type="string" table:style-name="ce2">
            <text:p>cr backward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89" table:style-name="ce3">
            <text:p>89</text:p>
          </table:table-cell>
          <table:table-cell office:value-type="float" office:value="59" table:style-name="ce3">
            <text:p>59</text:p>
          </table:table-cell>
          <table:table-cell office:value-type="float" office:value="84" table:style-name="ce3">
            <text:p>84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390625" table:formula="of:=[.E86]/[.D86]" table:style-name="ce4">
            <text:p>1.391</text:p>
          </table:table-cell>
          <table:table-cell office:value-type="float" office:value="0.921875" table:formula="of:=[.F86]/[.D86]" table:style-name="ce4">
            <text:p>0.922</text:p>
          </table:table-cell>
          <table:table-cell office:value-type="float" office:value="0.6629213483146067" table:formula="of:=[.F86]/[.E86]" table:style-name="ce4">
            <text:p>0.663</text:p>
          </table:table-cell>
          <table:table-cell office:value-type="float" office:value="0.3125" table:formula="of:=[.H86]/[.D86]" table:style-name="ce4">
            <text:p>0.313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100" table:style-name="ce3">
            <text:p>100</text:p>
          </table:table-cell>
          <table:table-cell office:value-type="float" office:value="94" table:style-name="ce3">
            <text:p>94</text:p>
          </table:table-cell>
          <table:table-cell office:value-type="float" office:value="131" table:style-name="ce3">
            <text:p>131</text:p>
          </table:table-cell>
          <table:table-cell office:value-type="float" office:value="24" table:style-name="ce3">
            <text:p>24</text:p>
          </table:table-cell>
          <table:table-cell office:value-type="float" office:value="2.5" table:style-name="ce3">
            <text:p>2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8125" table:formula="of:=[.E87]/[.D87]" table:style-name="ce4">
            <text:p>0.781</text:p>
          </table:table-cell>
          <table:table-cell office:value-type="float" office:value="0.734375" table:formula="of:=[.F87]/[.D87]" table:style-name="ce4">
            <text:p>0.734</text:p>
          </table:table-cell>
          <table:table-cell office:value-type="float" office:value="0.94" table:formula="of:=[.F87]/[.E87]" table:style-name="ce4">
            <text:p>0.940</text:p>
          </table:table-cell>
          <table:table-cell office:value-type="float" office:value="0.1875" table:formula="of:=[.H87]/[.D87]" table:style-name="ce4">
            <text:p>0.188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125" table:style-name="ce3">
            <text:p>125</text:p>
          </table:table-cell>
          <table:table-cell office:value-type="float" office:value="170" table:style-name="ce3">
            <text:p>170</text:p>
          </table:table-cell>
          <table:table-cell office:value-type="float" office:value="229" table:style-name="ce3">
            <text:p>229</text:p>
          </table:table-cell>
          <table:table-cell office:value-type="float" office:value="43" table:style-name="ce3">
            <text:p>43</text:p>
          </table:table-cell>
          <table:table-cell office:value-type="float" office:value="3.01" table:style-name="ce3">
            <text:p>3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8828125" table:formula="of:=[.E88]/[.D88]" table:style-name="ce4">
            <text:p>0.488</text:p>
          </table:table-cell>
          <table:table-cell office:value-type="float" office:value="0.6640625" table:formula="of:=[.F88]/[.D88]" table:style-name="ce4">
            <text:p>0.664</text:p>
          </table:table-cell>
          <table:table-cell office:value-type="float" office:value="1.36" table:formula="of:=[.F88]/[.E88]" table:style-name="ce4">
            <text:p>1.360</text:p>
          </table:table-cell>
          <table:table-cell office:value-type="float" office:value="0.16796875" table:formula="of:=[.H88]/[.D88]" table:style-name="ce4">
            <text:p>0.168</text:p>
          </table:table-cell>
          <table:table-cell table:number-columns-repeated="2" table:style-name="ce3"/>
          <table:table-cell table:number-columns-repeated="1636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180" table:style-name="ce3">
            <text:p>180</text:p>
          </table:table-cell>
          <table:table-cell office:value-type="float" office:value="328" table:style-name="ce3">
            <text:p>328</text:p>
          </table:table-cell>
          <table:table-cell office:value-type="float" office:value="426" table:style-name="ce3">
            <text:p>426</text:p>
          </table:table-cell>
          <table:table-cell office:value-type="float" office:value="42" table:style-name="ce3">
            <text:p>42</text:p>
          </table:table-cell>
          <table:table-cell office:value-type="float" office:value="3.73" table:style-name="ce3">
            <text:p>3.7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3515625" table:formula="of:=[.E89]/[.D89]" table:style-name="ce4">
            <text:p>0.352</text:p>
          </table:table-cell>
          <table:table-cell office:value-type="float" office:value="0.640625" table:formula="of:=[.F89]/[.D89]" table:style-name="ce4">
            <text:p>0.641</text:p>
          </table:table-cell>
          <table:table-cell office:value-type="float" office:value="1.8222222222222222" table:formula="of:=[.F89]/[.E89]" table:style-name="ce4">
            <text:p>1.822</text:p>
          </table:table-cell>
          <table:table-cell office:value-type="float" office:value="8.203125E-2" table:formula="of:=[.H89]/[.D89]" table:style-name="ce4">
            <text:p>0.082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337" table:style-name="ce3">
            <text:p>337</text:p>
          </table:table-cell>
          <table:table-cell office:value-type="float" office:value="735" table:style-name="ce3">
            <text:p>735</text:p>
          </table:table-cell>
          <table:table-cell office:value-type="float" office:value="963" table:style-name="ce3">
            <text:p>963</text:p>
          </table:table-cell>
          <table:table-cell office:value-type="float" office:value="45" table:style-name="ce3">
            <text:p>45</text:p>
          </table:table-cell>
          <table:table-cell office:value-type="float" office:value="8.34" table:style-name="ce3">
            <text:p>8.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3291015625" table:formula="of:=[.E90]/[.D90]" table:style-name="ce4">
            <text:p>0.329</text:p>
          </table:table-cell>
          <table:table-cell office:value-type="float" office:value="0.7177734375" table:formula="of:=[.F90]/[.D90]" table:style-name="ce4">
            <text:p>0.718</text:p>
          </table:table-cell>
          <table:table-cell office:value-type="float" office:value="2.1810089020771515" table:formula="of:=[.F90]/[.E90]" table:style-name="ce4">
            <text:p>2.181</text:p>
          </table:table-cell>
          <table:table-cell office:value-type="float" office:value="4.39453125E-2" table:formula="of:=[.H90]/[.D90]" table:style-name="ce4">
            <text:p>0.044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690" table:style-name="ce3">
            <text:p>690</text:p>
          </table:table-cell>
          <table:table-cell office:value-type="float" office:value="1520" table:style-name="ce3">
            <text:p>1520</text:p>
          </table:table-cell>
          <table:table-cell office:value-type="float" office:value="1878" table:style-name="ce3">
            <text:p>1878</text:p>
          </table:table-cell>
          <table:table-cell office:value-type="float" office:value="44" table:style-name="ce3">
            <text:p>44</text:p>
          </table:table-cell>
          <table:table-cell office:value-type="float" office:value="9.24" table:style-name="ce3">
            <text:p>9.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3369140625" table:formula="of:=[.E91]/[.D91]" table:style-name="ce4">
            <text:p>0.337</text:p>
          </table:table-cell>
          <table:table-cell office:value-type="float" office:value="0.7421875" table:formula="of:=[.F91]/[.D91]" table:style-name="ce4">
            <text:p>0.742</text:p>
          </table:table-cell>
          <table:table-cell office:value-type="float" office:value="2.2028985507246377" table:formula="of:=[.F91]/[.E91]" table:style-name="ce4">
            <text:p>2.203</text:p>
          </table:table-cell>
          <table:table-cell office:value-type="float" office:value="2.1484375E-2" table:formula="of:=[.H91]/[.D91]" table:style-name="ce4">
            <text:p>0.021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2499" table:style-name="ce3">
            <text:p>2499</text:p>
          </table:table-cell>
          <table:table-cell office:value-type="float" office:value="2937" table:style-name="ce3">
            <text:p>2937</text:p>
          </table:table-cell>
          <table:table-cell office:value-type="float" office:value="3775" table:style-name="ce3">
            <text:p>3775</text:p>
          </table:table-cell>
          <table:table-cell office:value-type="float" office:value="1627" table:style-name="ce3">
            <text:p>1627</text:p>
          </table:table-cell>
          <table:table-cell office:value-type="float" office:value="40.450000000000003" table:style-name="ce3">
            <text:p>40.45</text:p>
          </table:table-cell>
          <table:table-cell office:value-type="float" office:value="206" table:style-name="ce3">
            <text:p>206</text:p>
          </table:table-cell>
          <table:table-cell office:value-type="float" office:value="10.87" table:style-name="ce3">
            <text:p>10.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10107421875" table:formula="of:=[.E92]/[.D92]" table:style-name="ce4">
            <text:p>0.610</text:p>
          </table:table-cell>
          <table:table-cell office:value-type="float" office:value="0.717041015625" table:formula="of:=[.F92]/[.D92]" table:style-name="ce4">
            <text:p>0.717</text:p>
          </table:table-cell>
          <table:table-cell office:value-type="float" office:value="1.1752701080432173" table:formula="of:=[.F92]/[.E92]" table:style-name="ce4">
            <text:p>1.175</text:p>
          </table:table-cell>
          <table:table-cell office:value-type="float" office:value="0.397216796875" table:formula="of:=[.H92]/[.D92]" table:style-name="ce4">
            <text:p>0.397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4" table:style-name="ce4"/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75" table:style-name="ce3">
            <text:p>75</text:p>
          </table:table-cell>
          <table:table-cell office:value-type="float" office:value="81" table:style-name="ce3">
            <text:p>81</text:p>
          </table:table-cell>
          <table:table-cell office:value-type="float" office:value="113" table:style-name="ce3">
            <text:p>113</text:p>
          </table:table-cell>
          <table:table-cell office:value-type="float" office:value="17" table:style-name="ce3">
            <text:p>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71875" table:formula="of:=[.E94]/[.D94]" table:style-name="ce4">
            <text:p>1.172</text:p>
          </table:table-cell>
          <table:table-cell office:value-type="float" office:value="1.265625" table:formula="of:=[.F94]/[.D94]" table:style-name="ce4">
            <text:p>1.266</text:p>
          </table:table-cell>
          <table:table-cell office:value-type="float" office:value="1.08" table:formula="of:=[.F94]/[.E94]" table:style-name="ce4">
            <text:p>1.080</text:p>
          </table:table-cell>
          <table:table-cell office:value-type="float" office:value="0.265625" table:formula="of:=[.H94]/[.D94]" table:style-name="ce4">
            <text:p>0.266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28" table:style-name="ce3">
            <text:p>128</text:p>
          </table:table-cell>
          <table:table-cell office:value-type="float" office:value="96" table:style-name="ce3">
            <text:p>96</text:p>
          </table:table-cell>
          <table:table-cell office:value-type="float" office:value="156" table:style-name="ce3">
            <text:p>156</text:p>
          </table:table-cell>
          <table:table-cell office:value-type="float" office:value="211" table:style-name="ce3">
            <text:p>211</text:p>
          </table:table-cell>
          <table:table-cell office:value-type="float" office:value="27" table:style-name="ce3">
            <text:p>2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5" table:formula="of:=[.E95]/[.D95]" table:style-name="ce4">
            <text:p>0.750</text:p>
          </table:table-cell>
          <table:table-cell office:value-type="float" office:value="1.21875" table:formula="of:=[.F95]/[.D95]" table:style-name="ce4">
            <text:p>1.219</text:p>
          </table:table-cell>
          <table:table-cell office:value-type="float" office:value="1.625" table:formula="of:=[.F95]/[.E95]" table:style-name="ce4">
            <text:p>1.625</text:p>
          </table:table-cell>
          <table:table-cell office:value-type="float" office:value="0.2109375" table:formula="of:=[.H95]/[.D95]" table:style-name="ce4">
            <text:p>0.211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64" table:style-name="ce2">
            <text:p>64</text:p>
          </table:table-cell>
          <table:table-cell office:value-type="float" office:value="256" table:style-name="ce3">
            <text:p>256</text:p>
          </table:table-cell>
          <table:table-cell office:value-type="float" office:value="164" table:style-name="ce3">
            <text:p>164</text:p>
          </table:table-cell>
          <table:table-cell office:value-type="float" office:value="321" table:style-name="ce3">
            <text:p>321</text:p>
          </table:table-cell>
          <table:table-cell office:value-type="float" office:value="416" table:style-name="ce3">
            <text:p>416</text:p>
          </table:table-cell>
          <table:table-cell office:value-type="float" office:value="20" table:style-name="ce3">
            <text:p>20</text:p>
          </table:table-cell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40625" table:formula="of:=[.E96]/[.D96]" table:style-name="ce4">
            <text:p>0.641</text:p>
          </table:table-cell>
          <table:table-cell office:value-type="float" office:value="1.25390625" table:formula="of:=[.F96]/[.D96]" table:style-name="ce4">
            <text:p>1.254</text:p>
          </table:table-cell>
          <table:table-cell office:value-type="float" office:value="1.9573170731707317" table:formula="of:=[.F96]/[.E96]" table:style-name="ce4">
            <text:p>1.957</text:p>
          </table:table-cell>
          <table:table-cell office:value-type="float" office:value="7.8125E-2" table:formula="of:=[.H96]/[.D96]" table:style-name="ce4">
            <text:p>0.078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8" table:style-name="ce2">
            <text:p>128</text:p>
          </table:table-cell>
          <table:table-cell office:value-type="float" office:value="512" table:style-name="ce3">
            <text:p>512</text:p>
          </table:table-cell>
          <table:table-cell office:value-type="float" office:value="316" table:style-name="ce3">
            <text:p>316</text:p>
          </table:table-cell>
          <table:table-cell office:value-type="float" office:value="709" table:style-name="ce3">
            <text:p>709</text:p>
          </table:table-cell>
          <table:table-cell office:value-type="float" office:value="928" table:style-name="ce3">
            <text:p>928</text:p>
          </table:table-cell>
          <table:table-cell office:value-type="float" office:value="25" table:style-name="ce3">
            <text:p>25</text:p>
          </table:table-cell>
          <table:table-cell office:value-type="float" office:value="4.3" table:style-name="ce3">
            <text:p>4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171875" table:formula="of:=[.E97]/[.D97]" table:style-name="ce4">
            <text:p>0.617</text:p>
          </table:table-cell>
          <table:table-cell office:value-type="float" office:value="1.384765625" table:formula="of:=[.F97]/[.D97]" table:style-name="ce4">
            <text:p>1.385</text:p>
          </table:table-cell>
          <table:table-cell office:value-type="float" office:value="2.2436708860759493" table:formula="of:=[.F97]/[.E97]" table:style-name="ce4">
            <text:p>2.244</text:p>
          </table:table-cell>
          <table:table-cell office:value-type="float" office:value="4.8828125E-2" table:formula="of:=[.H97]/[.D97]" table:style-name="ce4">
            <text:p>0.049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6" table:style-name="ce2">
            <text:p>256</text:p>
          </table:table-cell>
          <table:table-cell office:value-type="float" office:value="1024" table:style-name="ce3">
            <text:p>1024</text:p>
          </table:table-cell>
          <table:table-cell office:value-type="float" office:value="634" table:style-name="ce3">
            <text:p>634</text:p>
          </table:table-cell>
          <table:table-cell office:value-type="float" office:value="1423" table:style-name="ce3">
            <text:p>1423</text:p>
          </table:table-cell>
          <table:table-cell office:value-type="float" office:value="1845" table:style-name="ce3">
            <text:p>1845</text:p>
          </table:table-cell>
          <table:table-cell office:value-type="float" office:value="25" table:style-name="ce3">
            <text:p>25</text:p>
          </table:table-cell>
          <table:table-cell office:value-type="float" office:value="3.1" table:style-name="ce3">
            <text:p>3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19140625" table:formula="of:=[.E98]/[.D98]" table:style-name="ce4">
            <text:p>0.619</text:p>
          </table:table-cell>
          <table:table-cell office:value-type="float" office:value="1.3896484375" table:formula="of:=[.F98]/[.D98]" table:style-name="ce4">
            <text:p>1.390</text:p>
          </table:table-cell>
          <table:table-cell office:value-type="float" office:value="2.2444794952681386" table:formula="of:=[.F98]/[.E98]" table:style-name="ce4">
            <text:p>2.244</text:p>
          </table:table-cell>
          <table:table-cell office:value-type="float" office:value="2.44140625E-2" table:formula="of:=[.H98]/[.D98]" table:style-name="ce4">
            <text:p>0.024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12" table:style-name="ce2">
            <text:p>512</text:p>
          </table:table-cell>
          <table:table-cell office:value-type="float" office:value="2048" table:style-name="ce3">
            <text:p>2048</text:p>
          </table:table-cell>
          <table:table-cell office:value-type="float" office:value="1726" table:style-name="ce3">
            <text:p>1726</text:p>
          </table:table-cell>
          <table:table-cell office:value-type="float" office:value="3624" table:style-name="ce3">
            <text:p>3624</text:p>
          </table:table-cell>
          <table:table-cell office:value-type="float" office:value="4778" table:style-name="ce3">
            <text:p>4778</text:p>
          </table:table-cell>
          <table:table-cell office:value-type="float" office:value="70" table:style-name="ce3">
            <text:p>70</text:p>
          </table:table-cell>
          <table:table-cell office:value-type="float" office:value="82.5" table:style-name="ce3">
            <text:p>82.5</text:p>
          </table:table-cell>
          <table:table-cell office:value-type="float" office:value="1" table:style-name="ce3">
            <text:p>1</text:p>
          </table:table-cell>
          <table:table-cell office:value-type="float" office:value="1.6" table:style-name="ce3">
            <text:p>1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427734375" table:formula="of:=[.E99]/[.D99]" table:style-name="ce4">
            <text:p>0.843</text:p>
          </table:table-cell>
          <table:table-cell office:value-type="float" office:value="1.76953125" table:formula="of:=[.F99]/[.D99]" table:style-name="ce4">
            <text:p>1.770</text:p>
          </table:table-cell>
          <table:table-cell office:value-type="float" office:value="2.0996523754345309" table:formula="of:=[.F99]/[.E99]" table:style-name="ce4">
            <text:p>2.100</text:p>
          </table:table-cell>
          <table:table-cell office:value-type="float" office:value="3.41796875E-2" table:formula="of:=[.H99]/[.D99]" table:style-name="ce4">
            <text:p>0.034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4" table:style-name="ce4"/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iir ph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74" table:style-name="ce3">
            <text:p>174</text:p>
          </table:table-cell>
          <table:table-cell office:value-type="float" office:value="176" table:style-name="ce3">
            <text:p>176</text:p>
          </table:table-cell>
          <table:table-cell office:value-type="float" office:value="209" table:style-name="ce3">
            <text:p>209</text:p>
          </table:table-cell>
          <table:table-cell office:value-type="float" office:value="85" table:style-name="ce3">
            <text:p>85</text:p>
          </table:table-cell>
          <table:table-cell office:value-type="float" office:value="0.26" table:style-name="ce3">
            <text:p>0.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71875" table:formula="of:=[.E101]/[.D101]" table:style-name="ce4">
            <text:p>2.719</text:p>
          </table:table-cell>
          <table:table-cell office:value-type="float" office:value="2.75" table:formula="of:=[.F101]/[.D101]" table:style-name="ce4">
            <text:p>2.750</text:p>
          </table:table-cell>
          <table:table-cell office:value-type="float" office:value="1.0114942528735633" table:formula="of:=[.F101]/[.E101]" table:style-name="ce4">
            <text:p>1.011</text:p>
          </table:table-cell>
          <table:table-cell office:value-type="float" office:value="1.328125" table:formula="of:=[.H101]/[.D101]" table:style-name="ce4">
            <text:p>1.328</text:p>
          </table:table-cell>
          <table:table-cell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290" table:style-name="ce3">
            <text:p>290</text:p>
          </table:table-cell>
          <table:table-cell office:value-type="float" office:value="383" table:style-name="ce3">
            <text:p>383</text:p>
          </table:table-cell>
          <table:table-cell office:value-type="float" office:value="487" table:style-name="ce3">
            <text:p>487</text:p>
          </table:table-cell>
          <table:table-cell office:value-type="float" office:value="156" table:style-name="ce3">
            <text:p>156</text:p>
          </table:table-cell>
          <table:table-cell office:value-type="float" office:value="8.9600000000000009" table:style-name="ce3">
            <text:p>8.9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65625" table:formula="of:=[.E102]/[.D102]" table:style-name="ce4">
            <text:p>2.266</text:p>
          </table:table-cell>
          <table:table-cell office:value-type="float" office:value="2.9921875" table:formula="of:=[.F102]/[.D102]" table:style-name="ce4">
            <text:p>2.992</text:p>
          </table:table-cell>
          <table:table-cell office:value-type="float" office:value="1.3206896551724139" table:formula="of:=[.F102]/[.E102]" table:style-name="ce4">
            <text:p>1.321</text:p>
          </table:table-cell>
          <table:table-cell office:value-type="float" office:value="1.21875" table:formula="of:=[.H102]/[.D102]" table:style-name="ce4">
            <text:p>1.219</text:p>
          </table:table-cell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559" table:style-name="ce3">
            <text:p>559</text:p>
          </table:table-cell>
          <table:table-cell office:value-type="float" office:value="949" table:style-name="ce3">
            <text:p>949</text:p>
          </table:table-cell>
          <table:table-cell office:value-type="float" office:value="1285" table:style-name="ce3">
            <text:p>1285</text:p>
          </table:table-cell>
          <table:table-cell office:value-type="float" office:value="226" table:style-name="ce3">
            <text:p>226</text:p>
          </table:table-cell>
          <table:table-cell office:value-type="float" office:value="35.25" table:style-name="ce3">
            <text:p>35.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18359375" table:formula="of:=[.E103]/[.D103]" table:style-name="ce4">
            <text:p>2.184</text:p>
          </table:table-cell>
          <table:table-cell office:value-type="float" office:value="3.70703125" table:formula="of:=[.F103]/[.D103]" table:style-name="ce4">
            <text:p>3.707</text:p>
          </table:table-cell>
          <table:table-cell office:value-type="float" office:value="1.6976744186046511" table:formula="of:=[.F103]/[.E103]" table:style-name="ce4">
            <text:p>1.698</text:p>
          </table:table-cell>
          <table:table-cell office:value-type="float" office:value="0.8828125" table:formula="of:=[.H103]/[.D103]" table:style-name="ce4">
            <text:p>0.883</text:p>
          </table:table-cell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1201" table:style-name="ce3">
            <text:p>1201</text:p>
          </table:table-cell>
          <table:table-cell office:value-type="float" office:value="2073" table:style-name="ce3">
            <text:p>2073</text:p>
          </table:table-cell>
          <table:table-cell office:value-type="float" office:value="2868" table:style-name="ce3">
            <text:p>2868</text:p>
          </table:table-cell>
          <table:table-cell office:value-type="float" office:value="321" table:style-name="ce3">
            <text:p>321</text:p>
          </table:table-cell>
          <table:table-cell office:value-type="float" office:value="241.6" table:style-name="ce3">
            <text:p>241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345703125" table:formula="of:=[.E104]/[.D104]" table:style-name="ce4">
            <text:p>2.346</text:p>
          </table:table-cell>
          <table:table-cell office:value-type="float" office:value="4.048828125" table:formula="of:=[.F104]/[.D104]" table:style-name="ce4">
            <text:p>4.049</text:p>
          </table:table-cell>
          <table:table-cell office:value-type="float" office:value="1.7260616153205661" table:formula="of:=[.F104]/[.E104]" table:style-name="ce4">
            <text:p>1.726</text:p>
          </table:table-cell>
          <table:table-cell office:value-type="float" office:value="0.626953125" table:formula="of:=[.H104]/[.D104]" table:style-name="ce4">
            <text:p>0.627</text:p>
          </table:table-cell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2455" table:style-name="ce3">
            <text:p>2455</text:p>
          </table:table-cell>
          <table:table-cell office:value-type="float" office:value="4283" table:style-name="ce3">
            <text:p>4283</text:p>
          </table:table-cell>
          <table:table-cell office:value-type="float" office:value="6102" table:style-name="ce3">
            <text:p>6102</text:p>
          </table:table-cell>
          <table:table-cell office:value-type="float" office:value="601" table:style-name="ce3">
            <text:p>601</text:p>
          </table:table-cell>
          <table:table-cell office:value-type="float" office:value="18.79" table:style-name="ce3">
            <text:p>18.79</text:p>
          </table:table-cell>
          <table:table-cell office:value-type="float" office:value="5" table:style-name="ce3">
            <text:p>5</text:p>
          </table:table-cell>
          <table:table-cell office:value-type="float" office:value="4.7300000000000004" table:style-name="ce3">
            <text:p>4.7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3974609375" table:formula="of:=[.E105]/[.D105]" table:style-name="ce4">
            <text:p>2.397</text:p>
          </table:table-cell>
          <table:table-cell office:value-type="float" office:value="4.1826171875" table:formula="of:=[.F105]/[.D105]" table:style-name="ce4">
            <text:p>4.183</text:p>
          </table:table-cell>
          <table:table-cell office:value-type="float" office:value="1.744602851323829" table:formula="of:=[.F105]/[.E105]" table:style-name="ce4">
            <text:p>1.745</text:p>
          </table:table-cell>
          <table:table-cell office:value-type="float" office:value="0.5869140625" table:formula="of:=[.H105]/[.D105]" table:style-name="ce4">
            <text:p>0.587</text:p>
          </table:table-cell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5990" table:style-name="ce3">
            <text:p>5990</text:p>
          </table:table-cell>
          <table:table-cell office:value-type="float" office:value="8758" table:style-name="ce3">
            <text:p>8758</text:p>
          </table:table-cell>
          <table:table-cell office:value-type="float" office:value="12501" table:style-name="ce3">
            <text:p>12501</text:p>
          </table:table-cell>
          <table:table-cell office:value-type="float" office:value="3023" table:style-name="ce3">
            <text:p>3023</text:p>
          </table:table-cell>
          <table:table-cell office:value-type="float" office:value="129.4" table:style-name="ce3">
            <text:p>129.4</text:p>
          </table:table-cell>
          <table:table-cell office:value-type="float" office:value="307" table:style-name="ce3">
            <text:p>307</text:p>
          </table:table-cell>
          <table:table-cell office:value-type="float" office:value="7.37" table:style-name="ce3">
            <text:p>7.37</text:p>
          </table:table-cell>
          <table:table-cell office:value-type="float" office:value="38" table:style-name="ce3">
            <text:p>38</text:p>
          </table:table-cell>
          <table:table-cell office:value-type="float" office:value="10.07" table:style-name="ce3">
            <text:p>10.07</text:p>
          </table:table-cell>
          <table:table-cell office:value-type="float" office:value="2.9248046875" table:formula="of:=[.E106]/[.D106]" table:style-name="ce4">
            <text:p>2.925</text:p>
          </table:table-cell>
          <table:table-cell office:value-type="float" office:value="4.2763671875" table:formula="of:=[.F106]/[.D106]" table:style-name="ce4">
            <text:p>4.276</text:p>
          </table:table-cell>
          <table:table-cell office:value-type="float" office:value="1.4621035058430718" table:formula="of:=[.F106]/[.E106]" table:style-name="ce4">
            <text:p>1.462</text:p>
          </table:table-cell>
          <table:table-cell office:value-type="float" office:value="1.47607421875" table:formula="of:=[.H106]/[.D106]" table:style-name="ce4">
            <text:p>1.476</text:p>
          </table:table-cell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15313" table:style-name="ce3">
            <text:p>15313</text:p>
          </table:table-cell>
          <table:table-cell office:value-type="float" office:value="15956" table:style-name="ce3">
            <text:p>15956</text:p>
          </table:table-cell>
          <table:table-cell office:value-type="float" office:value="22550" table:style-name="ce3">
            <text:p>22550</text:p>
          </table:table-cell>
          <table:table-cell office:value-type="float" office:value="8421" table:style-name="ce3">
            <text:p>8421</text:p>
          </table:table-cell>
          <table:table-cell office:value-type="float" office:value="435.31" table:style-name="ce3">
            <text:p>435.31</text:p>
          </table:table-cell>
          <table:table-cell office:value-type="float" office:value="1504" table:style-name="ce3">
            <text:p>1504</text:p>
          </table:table-cell>
          <table:table-cell office:value-type="float" office:value="18.53" table:style-name="ce3">
            <text:p>18.53</text:p>
          </table:table-cell>
          <table:table-cell office:value-type="float" office:value="308" table:style-name="ce3">
            <text:p>308</text:p>
          </table:table-cell>
          <table:table-cell office:value-type="float" office:value="110.23" table:style-name="ce3">
            <text:p>110.23</text:p>
          </table:table-cell>
          <table:table-cell office:value-type="float" office:value="3.738525390625" table:formula="of:=[.E107]/[.D107]" table:style-name="ce4">
            <text:p>3.739</text:p>
          </table:table-cell>
          <table:table-cell office:value-type="float" office:value="3.8955078125" table:formula="of:=[.F107]/[.D107]" table:style-name="ce4">
            <text:p>3.896</text:p>
          </table:table-cell>
          <table:table-cell office:value-type="float" office:value="1.0419904656174492" table:formula="of:=[.F107]/[.E107]" table:style-name="ce4">
            <text:p>1.042</text:p>
          </table:table-cell>
          <table:table-cell office:value-type="float" office:value="2.055908203125" table:formula="of:=[.H107]/[.D107]" table:style-name="ce4">
            <text:p>2.056</text:p>
          </table:table-cell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number-columns-repeated="6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office:value-type="string" table:style-name="ce2">
            <text:p>iir cr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200" table:style-name="ce3">
            <text:p>200</text:p>
          </table:table-cell>
          <table:table-cell office:value-type="float" office:value="183" table:style-name="ce3">
            <text:p>183</text:p>
          </table:table-cell>
          <table:table-cell office:value-type="float" office:value="212" table:style-name="ce3">
            <text:p>212</text:p>
          </table:table-cell>
          <table:table-cell office:value-type="float" office:value="110" table:style-name="ce3">
            <text:p>11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125" table:formula="of:=[.E109]/[.D109]" table:style-name="ce4">
            <text:p>3.125</text:p>
          </table:table-cell>
          <table:table-cell office:value-type="float" office:value="2.859375" table:formula="of:=[.F109]/[.D109]" table:style-name="ce4">
            <text:p>2.859</text:p>
          </table:table-cell>
          <table:table-cell office:value-type="float" office:value="0.91500000000000004" table:formula="of:=[.F109]/[.E109]" table:style-name="ce4">
            <text:p>0.915</text:p>
          </table:table-cell>
          <table:table-cell office:value-type="float" office:value="1.71875" table:formula="of:=[.H109]/[.D109]" table:style-name="ce4">
            <text:p>1.719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8" table:style-name="ce3">
            <text:p>128</text:p>
          </table:table-cell>
          <table:table-cell office:value-type="float" office:value="294" table:style-name="ce3">
            <text:p>294</text:p>
          </table:table-cell>
          <table:table-cell office:value-type="float" office:value="403" table:style-name="ce3">
            <text:p>403</text:p>
          </table:table-cell>
          <table:table-cell office:value-type="float" office:value="490" table:style-name="ce3">
            <text:p>490</text:p>
          </table:table-cell>
          <table:table-cell office:value-type="float" office:value="152" table:style-name="ce3">
            <text:p>152</text:p>
          </table:table-cell>
          <table:table-cell office:value-type="float" office:value="11.9" table:style-name="ce3">
            <text:p>11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96875" table:formula="of:=[.E110]/[.D110]" table:style-name="ce4">
            <text:p>2.297</text:p>
          </table:table-cell>
          <table:table-cell office:value-type="float" office:value="3.1484375" table:formula="of:=[.F110]/[.D110]" table:style-name="ce4">
            <text:p>3.148</text:p>
          </table:table-cell>
          <table:table-cell office:value-type="float" office:value="1.370748299319728" table:formula="of:=[.F110]/[.E110]" table:style-name="ce4">
            <text:p>1.371</text:p>
          </table:table-cell>
          <table:table-cell office:value-type="float" office:value="1.1875" table:formula="of:=[.H110]/[.D110]" table:style-name="ce4">
            <text:p>1.18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256" table:style-name="ce3">
            <text:p>256</text:p>
          </table:table-cell>
          <table:table-cell office:value-type="float" office:value="512" table:style-name="ce3">
            <text:p>512</text:p>
          </table:table-cell>
          <table:table-cell office:value-type="float" office:value="966" table:style-name="ce3">
            <text:p>966</text:p>
          </table:table-cell>
          <table:table-cell office:value-type="float" office:value="1255" table:style-name="ce3">
            <text:p>1255</text:p>
          </table:table-cell>
          <table:table-cell office:value-type="float" office:value="164" table:style-name="ce3">
            <text:p>164</text:p>
          </table:table-cell>
          <table:table-cell office:value-type="float" office:value="43.31" table:style-name="ce3">
            <text:p>43.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[.E111]/[.D111]" table:style-name="ce4">
            <text:p>2.000</text:p>
          </table:table-cell>
          <table:table-cell office:value-type="float" office:value="3.7734375" table:formula="of:=[.F111]/[.D111]" table:style-name="ce4">
            <text:p>3.773</text:p>
          </table:table-cell>
          <table:table-cell office:value-type="float" office:value="1.88671875" table:formula="of:=[.F111]/[.E111]" table:style-name="ce4">
            <text:p>1.887</text:p>
          </table:table-cell>
          <table:table-cell office:value-type="float" office:value="0.640625" table:formula="of:=[.H111]/[.D111]" table:style-name="ce4">
            <text:p>0.641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512" table:style-name="ce3">
            <text:p>512</text:p>
          </table:table-cell>
          <table:table-cell office:value-type="float" office:value="1044" table:style-name="ce3">
            <text:p>1044</text:p>
          </table:table-cell>
          <table:table-cell office:value-type="float" office:value="2064" table:style-name="ce3">
            <text:p>2064</text:p>
          </table:table-cell>
          <table:table-cell office:value-type="float" office:value="2752" table:style-name="ce3">
            <text:p>2752</text:p>
          </table:table-cell>
          <table:table-cell office:value-type="float" office:value="146" table:style-name="ce3">
            <text:p>146</text:p>
          </table:table-cell>
          <table:table-cell office:value-type="float" office:value="270.64999999999998" table:style-name="ce3">
            <text:p>270.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0390625" table:formula="of:=[.E112]/[.D112]" table:style-name="ce4">
            <text:p>2.039</text:p>
          </table:table-cell>
          <table:table-cell office:value-type="float" office:value="4.03125" table:formula="of:=[.F112]/[.D112]" table:style-name="ce4">
            <text:p>4.031</text:p>
          </table:table-cell>
          <table:table-cell office:value-type="float" office:value="1.9770114942528736" table:formula="of:=[.F112]/[.E112]" table:style-name="ce4">
            <text:p>1.977</text:p>
          </table:table-cell>
          <table:table-cell office:value-type="float" office:value="0.28515625" table:formula="of:=[.H112]/[.D112]" table:style-name="ce4">
            <text:p>0.28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024" table:style-name="ce3">
            <text:p>1024</text:p>
          </table:table-cell>
          <table:table-cell office:value-type="float" office:value="2113" table:style-name="ce3">
            <text:p>2113</text:p>
          </table:table-cell>
          <table:table-cell office:value-type="float" office:value="4280" table:style-name="ce3">
            <text:p>4280</text:p>
          </table:table-cell>
          <table:table-cell office:value-type="float" office:value="5899" table:style-name="ce3">
            <text:p>5899</text:p>
          </table:table-cell>
          <table:table-cell office:value-type="float" office:value="181" table:style-name="ce3">
            <text:p>181</text:p>
          </table:table-cell>
          <table:table-cell office:value-type="float" office:value="11.11" table:style-name="ce3">
            <text:p>11.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0634765625" table:formula="of:=[.E113]/[.D113]" table:style-name="ce4">
            <text:p>2.063</text:p>
          </table:table-cell>
          <table:table-cell office:value-type="float" office:value="4.1796875" table:formula="of:=[.F113]/[.D113]" table:style-name="ce4">
            <text:p>4.180</text:p>
          </table:table-cell>
          <table:table-cell office:value-type="float" office:value="2.0255560814008517" table:formula="of:=[.F113]/[.E113]" table:style-name="ce4">
            <text:p>2.026</text:p>
          </table:table-cell>
          <table:table-cell office:value-type="float" office:value="0.1767578125" table:formula="of:=[.H113]/[.D113]" table:style-name="ce4">
            <text:p>0.177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2048" table:style-name="ce3">
            <text:p>2048</text:p>
          </table:table-cell>
          <table:table-cell office:value-type="float" office:value="4471" table:style-name="ce3">
            <text:p>4471</text:p>
          </table:table-cell>
          <table:table-cell office:value-type="float" office:value="8741" table:style-name="ce3">
            <text:p>8741</text:p>
          </table:table-cell>
          <table:table-cell office:value-type="float" office:value="12213" table:style-name="ce3">
            <text:p>12213</text:p>
          </table:table-cell>
          <table:table-cell office:value-type="float" office:value="640" table:style-name="ce3">
            <text:p>640</text:p>
          </table:table-cell>
          <table:table-cell office:value-type="float" office:value="134.87" table:style-name="ce3">
            <text:p>134.87</text:p>
          </table:table-cell>
          <table:table-cell office:value-type="float" office:value="35" table:style-name="ce3">
            <text:p>35</text:p>
          </table:table-cell>
          <table:table-cell office:value-type="float" office:value="5.71" table:style-name="ce3">
            <text:p>5.71</text:p>
          </table:table-cell>
          <table:table-cell office:value-type="float" office:value="4" table:style-name="ce3">
            <text:p>4</text:p>
          </table:table-cell>
          <table:table-cell office:value-type="float" office:value="2.16" table:style-name="ce3">
            <text:p>2.16</text:p>
          </table:table-cell>
          <table:table-cell office:value-type="float" office:value="2.18310546875" table:formula="of:=[.E114]/[.D114]" table:style-name="ce4">
            <text:p>2.183</text:p>
          </table:table-cell>
          <table:table-cell office:value-type="float" office:value="4.26806640625" table:formula="of:=[.F114]/[.D114]" table:style-name="ce4">
            <text:p>4.268</text:p>
          </table:table-cell>
          <table:table-cell office:value-type="float" office:value="1.9550436144039365" table:formula="of:=[.F114]/[.E114]" table:style-name="ce4">
            <text:p>1.955</text:p>
          </table:table-cell>
          <table:table-cell office:value-type="float" office:value="0.3125" table:formula="of:=[.H114]/[.D114]" table:style-name="ce4">
            <text:p>0.3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4096" table:style-name="ce3">
            <text:p>4096</text:p>
          </table:table-cell>
          <table:table-cell office:value-type="float" office:value="11620" table:style-name="ce3">
            <text:p>11620</text:p>
          </table:table-cell>
          <table:table-cell office:value-type="float" office:value="16918" table:style-name="ce3">
            <text:p>16918</text:p>
          </table:table-cell>
          <table:table-cell office:value-type="float" office:value="23693" table:style-name="ce3">
            <text:p>23693</text:p>
          </table:table-cell>
          <table:table-cell office:value-type="float" office:value="4776" table:style-name="ce3">
            <text:p>4776</text:p>
          </table:table-cell>
          <table:table-cell office:value-type="float" office:value="325.32" table:style-name="ce3">
            <text:p>325.32</text:p>
          </table:table-cell>
          <table:table-cell office:value-type="float" office:value="365" table:style-name="ce3">
            <text:p>365</text:p>
          </table:table-cell>
          <table:table-cell office:value-type="float" office:value="11.84" table:style-name="ce3">
            <text:p>11.84</text:p>
          </table:table-cell>
          <table:table-cell office:value-type="float" office:value="176" table:style-name="ce3">
            <text:p>176</text:p>
          </table:table-cell>
          <table:table-cell office:value-type="float" office:value="94.37" table:style-name="ce3">
            <text:p>94.37</text:p>
          </table:table-cell>
          <table:table-cell office:value-type="float" office:value="2.8369140625" table:formula="of:=[.E115]/[.D115]" table:style-name="ce4">
            <text:p>2.837</text:p>
          </table:table-cell>
          <table:table-cell office:value-type="float" office:value="4.13037109375" table:formula="of:=[.F115]/[.D115]" table:style-name="ce4">
            <text:p>4.130</text:p>
          </table:table-cell>
          <table:table-cell office:value-type="float" office:value="1.4559380378657487" table:formula="of:=[.F115]/[.E115]" table:style-name="ce4">
            <text:p>1.456</text:p>
          </table:table-cell>
          <table:table-cell office:value-type="float" office:value="1.166015625" table:formula="of:=[.H115]/[.D115]" table:style-name="ce4">
            <text:p>1.166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lock filtering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8" table:formula="of:=[.C117]*[.B117]" table:style-name="ce2">
            <text:p>8</text:p>
          </table:table-cell>
          <table:table-cell office:value-type="float" office:value="56" table:style-name="ce2">
            <text:p>56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formula="of:=[.E117]/[.D117]" table:style-name="ce4">
            <text:p>7.000</text:p>
          </table:table-cell>
          <table:table-cell office:value-type="float" office:value="3.25" table:formula="of:=[.F117]/[.D117]" table:style-name="ce4">
            <text:p>3.250</text:p>
          </table:table-cell>
          <table:table-cell office:value-type="float" office:value="0.4642857142857143" table:formula="of:=[.F117]/[.E117]" table:style-name="ce4">
            <text:p>0.464</text:p>
          </table:table-cell>
          <table:table-cell office:value-type="float" office:value="0" table:formula="of:=[.H117]/[.D117]" table:style-name="ce4">
            <text:p>0.000</text:p>
          </table:table-cell>
          <table:table-cell table:number-columns-repeated="3" table:style-name="ce3"/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number-columns-repeated="3" table:style-name="ce3"/>
          <table:table-cell table:number-columns-repeated="16364"/>
        </table:table-row>
        <table:table-row table:style-name="ro1">
          <table:table-cell office:value-type="string" table:style-name="ce2">
            <text:p>scala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C119]*[.B119]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formula="of:=[.E119]/[.D119]" table:style-name="ce4">
            <text:p>9.000</text:p>
          </table:table-cell>
          <table:table-cell office:value-type="float" office:value="12" table:formula="of:=[.F119]/[.D119]" table:style-name="ce4">
            <text:p>12.000</text:p>
          </table:table-cell>
          <table:table-cell office:value-type="float" office:value="1.3333333333333333" table:formula="of:=[.F119]/[.E119]" table:style-name="ce4">
            <text:p>1.333</text:p>
          </table:table-cell>
          <table:table-cell office:value-type="float" office:value="0" table:formula="of:=[.H119]/[.D119]" table:style-name="ce4">
            <text:p>0.000</text:p>
          </table:table-cell>
          <table:table-cell table:number-columns-repeated="3" table:style-name="ce3"/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number-columns-repeated="3" table:style-name="ce3"/>
          <table:table-cell table:number-columns-repeated="16364"/>
        </table:table-row>
        <table:table-row table:style-name="ro1">
          <table:table-cell office:value-type="string" table:style-name="ce2">
            <text:p>filter ph 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362587" table:style-name="ce3">
            <text:p>362587</text:p>
          </table:table-cell>
          <table:table-cell office:value-type="float" office:value="399362" table:style-name="ce3">
            <text:p>399362</text:p>
          </table:table-cell>
          <table:table-cell office:value-type="float" office:value="468996" table:style-name="ce3">
            <text:p>468996</text:p>
          </table:table-cell>
          <table:table-cell office:value-type="float" office:value="261878" table:style-name="ce3">
            <text:p>261878</text:p>
          </table:table-cell>
          <table:table-cell office:value-type="float" office:value="1338.27" table:style-name="ce3">
            <text:p>1338.27</text:p>
          </table:table-cell>
          <table:table-cell office:value-type="float" office:value="5" table:style-name="ce3">
            <text:p>5</text:p>
          </table:table-cell>
          <table:table-cell office:value-type="float" office:value="3.36" table:style-name="ce3">
            <text:p>3.36</text:p>
          </table:table-cell>
          <table:table-cell office:value-type="float" office:value="0" table:style-name="ce3">
            <text:p>0</text:p>
          </table:table-cell>
          <table:table-cell office:value-type="float" office:value="1.69" table:style-name="ce3">
            <text:p>1.69</text:p>
          </table:table-cell>
          <table:table-cell office:value-type="float" office:value="2.7663192749023438" table:formula="of:=[.E121]/[.D121]" table:style-name="ce4">
            <text:p>2.766</text:p>
          </table:table-cell>
          <table:table-cell office:value-type="float" office:value="3.0468902587890625" table:formula="of:=[.F121]/[.D121]" table:style-name="ce4">
            <text:p>3.047</text:p>
          </table:table-cell>
          <table:table-cell office:value-type="float" office:value="1.1014239341178806" table:formula="of:=[.F121]/[.E121]" table:style-name="ce4">
            <text:p>1.101</text:p>
          </table:table-cell>
          <table:table-cell office:value-type="float" office:value="1.9979705810546875" table:formula="of:=[.H121]/[.D121]" table:style-name="ce4">
            <text:p>1.998</text:p>
          </table:table-cell>
          <table:table-cell office:value-type="float" office:value="109874.84848484849" table:formula="of:=[.N121]*[.D121]/3.3" table:style-name="ce7">
            <text:p>109875</text:p>
          </table:table-cell>
          <table:table-cell office:value-type="float" office:value="2.7690000000000001" table:style-name="ce3">
            <text:p>2.769</text:p>
          </table:table-cell>
          <table:table-cell office:value-type="float" office:value="110261" table:style-name="ce3">
            <text:p>11026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301575" table:style-name="ce3">
            <text:p>301575</text:p>
          </table:table-cell>
          <table:table-cell office:value-type="float" office:value="408580" table:style-name="ce3">
            <text:p>408580</text:p>
          </table:table-cell>
          <table:table-cell office:value-type="float" office:value="522276" table:style-name="ce3">
            <text:p>522276</text:p>
          </table:table-cell>
          <table:table-cell office:value-type="float" office:value="196192" table:style-name="ce3">
            <text:p>196192</text:p>
          </table:table-cell>
          <table:table-cell office:value-type="float" office:value="10282.120000000001" table:style-name="ce3">
            <text:p>10282.12</text:p>
          </table:table-cell>
          <table:table-cell office:value-type="float" office:value="16" table:style-name="ce3">
            <text:p>16</text:p>
          </table:table-cell>
          <table:table-cell office:value-type="float" office:value="8.08" table:style-name="ce3">
            <text:p>8.08</text:p>
          </table:table-cell>
          <table:table-cell office:value-type="float" office:value="0" table:style-name="ce3">
            <text:p>0</text:p>
          </table:table-cell>
          <table:table-cell office:value-type="float" office:value="3.72" table:style-name="ce3">
            <text:p>3.72</text:p>
          </table:table-cell>
          <table:table-cell office:value-type="float" office:value="2.3008346557617188" table:formula="of:=[.E122]/[.D122]" table:style-name="ce4">
            <text:p>2.301</text:p>
          </table:table-cell>
          <table:table-cell office:value-type="float" office:value="3.117218017578125" table:formula="of:=[.F122]/[.D122]" table:style-name="ce4">
            <text:p>3.117</text:p>
          </table:table-cell>
          <table:table-cell office:value-type="float" office:value="1.3548205255740695" table:formula="of:=[.F122]/[.E122]" table:style-name="ce4">
            <text:p>1.355</text:p>
          </table:table-cell>
          <table:table-cell office:value-type="float" office:value="1.496826171875" table:formula="of:=[.H122]/[.D122]" table:style-name="ce4">
            <text:p>1.497</text:p>
          </table:table-cell>
          <table:table-cell office:value-type="float" office:value="91386.363636363647" table:formula="of:=[.N122]*[.D122]/3.3" table:style-name="ce7">
            <text:p>91386</text:p>
          </table:table-cell>
          <table:table-cell office:value-type="float" office:value="2.2959999999999998" table:style-name="ce3">
            <text:p>2.296</text:p>
          </table:table-cell>
          <table:table-cell office:value-type="float" office:value="91413.8" table:style-name="ce7">
            <text:p>91414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290140" table:style-name="ce3">
            <text:p>290140</text:p>
          </table:table-cell>
          <table:table-cell office:value-type="float" office:value="495620" table:style-name="ce3">
            <text:p>495620</text:p>
          </table:table-cell>
          <table:table-cell office:value-type="float" office:value="672776" table:style-name="ce3">
            <text:p>672776</text:p>
          </table:table-cell>
          <table:table-cell office:value-type="float" office:value="161444" table:style-name="ce3">
            <text:p>161444</text:p>
          </table:table-cell>
          <table:table-cell office:value-type="float" office:value="22660.95" table:style-name="ce3">
            <text:p>22660.95</text:p>
          </table:table-cell>
          <table:table-cell office:value-type="float" office:value="21" table:style-name="ce3">
            <text:p>21</text:p>
          </table:table-cell>
          <table:table-cell office:value-type="float" office:value="9.15" table:style-name="ce3">
            <text:p>9.15</text:p>
          </table:table-cell>
          <table:table-cell office:value-type="float" office:value="0" table:style-name="ce3">
            <text:p>0</text:p>
          </table:table-cell>
          <table:table-cell office:value-type="float" office:value="6.92" table:style-name="ce3">
            <text:p>6.92</text:p>
          </table:table-cell>
          <table:table-cell office:value-type="float" office:value="2.213592529296875" table:formula="of:=[.E123]/[.D123]" table:style-name="ce4">
            <text:p>2.214</text:p>
          </table:table-cell>
          <table:table-cell office:value-type="float" office:value="3.781280517578125" table:formula="of:=[.F123]/[.D123]" table:style-name="ce4">
            <text:p>3.781</text:p>
          </table:table-cell>
          <table:table-cell office:value-type="float" office:value="1.7082098297373682" table:formula="of:=[.F123]/[.E123]" table:style-name="ce4">
            <text:p>1.708</text:p>
          </table:table-cell>
          <table:table-cell office:value-type="float" office:value="1.231719970703125" table:formula="of:=[.H123]/[.D123]" table:style-name="ce4">
            <text:p>1.232</text:p>
          </table:table-cell>
          <table:table-cell office:value-type="float" office:value="87921.212121212127" table:formula="of:=[.N123]*[.D123]/3.3" table:style-name="ce7">
            <text:p>87921</text:p>
          </table:table-cell>
          <table:table-cell office:value-type="float" office:value="2.2559999999999998" table:style-name="ce3">
            <text:p>2.256</text:p>
          </table:table-cell>
          <table:table-cell office:value-type="float" office:value="89330" table:style-name="ce7">
            <text:p>8933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328022" table:style-name="ce3">
            <text:p>328022</text:p>
          </table:table-cell>
          <table:table-cell office:value-type="float" office:value="537603" table:style-name="ce3">
            <text:p>537603</text:p>
          </table:table-cell>
          <table:table-cell office:value-type="float" office:value="743203" table:style-name="ce3">
            <text:p>743203</text:p>
          </table:table-cell>
          <table:table-cell office:value-type="float" office:value="130385" table:style-name="ce3">
            <text:p>130385</text:p>
          </table:table-cell>
          <table:table-cell office:value-type="float" office:value="66309.539999999994" table:style-name="ce3">
            <text:p>66309.54</text:p>
          </table:table-cell>
          <table:table-cell office:value-type="float" office:value="168" table:style-name="ce3">
            <text:p>168</text:p>
          </table:table-cell>
          <table:table-cell office:value-type="float" office:value="127.05" table:style-name="ce3">
            <text:p>127.05</text:p>
          </table:table-cell>
          <table:table-cell office:value-type="float" office:value="0" table:style-name="ce3">
            <text:p>0</text:p>
          </table:table-cell>
          <table:table-cell office:value-type="float" office:value="21.47" table:style-name="ce3">
            <text:p>21.47</text:p>
          </table:table-cell>
          <table:table-cell office:value-type="float" office:value="2.5026092529296875" table:formula="of:=[.E124]/[.D124]" table:style-name="ce4">
            <text:p>2.503</text:p>
          </table:table-cell>
          <table:table-cell office:value-type="float" office:value="4.1015853881835938" table:formula="of:=[.F124]/[.D124]" table:style-name="ce4">
            <text:p>4.102</text:p>
          </table:table-cell>
          <table:table-cell office:value-type="float" office:value="1.6389236087823378" table:formula="of:=[.F124]/[.E124]" table:style-name="ce4">
            <text:p>1.639</text:p>
          </table:table-cell>
          <table:table-cell office:value-type="float" office:value="0.99475860595703125" table:formula="of:=[.H124]/[.D124]" table:style-name="ce4">
            <text:p>0.995</text:p>
          </table:table-cell>
          <table:table-cell office:value-type="float" office:value="99400.606060606064" table:formula="of:=[.N124]*[.D124]/3.3" table:style-name="ce7">
            <text:p>99401</text:p>
          </table:table-cell>
          <table:table-cell office:value-type="float" office:value="2.6469999999999998" table:style-name="ce2">
            <text:p>2.647</text:p>
          </table:table-cell>
          <table:table-cell office:value-type="float" office:value="105391" table:style-name="ce2">
            <text:p>10539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355605" table:style-name="ce3">
            <text:p>355605</text:p>
          </table:table-cell>
          <table:table-cell office:value-type="float" office:value="550534" table:style-name="ce3">
            <text:p>550534</text:p>
          </table:table-cell>
          <table:table-cell office:value-type="float" office:value="784742" table:style-name="ce3">
            <text:p>784742</text:p>
          </table:table-cell>
          <table:table-cell office:value-type="float" office:value="111619" table:style-name="ce3">
            <text:p>111619</text:p>
          </table:table-cell>
          <table:table-cell office:value-type="float" office:value="3228.43" table:style-name="ce3">
            <text:p>3228.43</text:p>
          </table:table-cell>
          <table:table-cell office:value-type="float" office:value="539" table:style-name="ce3">
            <text:p>539</text:p>
          </table:table-cell>
          <table:table-cell office:value-type="float" office:value="520.57000000000005" table:style-name="ce3">
            <text:p>520.57</text:p>
          </table:table-cell>
          <table:table-cell office:value-type="float" office:value="1674" table:style-name="ce3">
            <text:p>1674</text:p>
          </table:table-cell>
          <table:table-cell office:value-type="float" office:value="92.54" table:style-name="ce3">
            <text:p>92.54</text:p>
          </table:table-cell>
          <table:table-cell office:value-type="float" office:value="2.7130508422851563" table:formula="of:=[.E125]/[.D125]" table:style-name="ce4">
            <text:p>2.713</text:p>
          </table:table-cell>
          <table:table-cell office:value-type="float" office:value="4.2002410888671875" table:formula="of:=[.F125]/[.D125]" table:style-name="ce4">
            <text:p>4.200</text:p>
          </table:table-cell>
          <table:table-cell office:value-type="float" office:value="1.5481615837797555" table:formula="of:=[.F125]/[.E125]" table:style-name="ce4">
            <text:p>1.548</text:p>
          </table:table-cell>
          <table:table-cell office:value-type="float" office:value="0.85158538818359375" table:formula="of:=[.H125]/[.D125]" table:style-name="ce4">
            <text:p>0.852</text:p>
          </table:table-cell>
          <table:table-cell office:value-type="float" office:value="107759.09090909091" table:formula="of:=[.N125]*[.D125]/3.3" table:style-name="ce7">
            <text:p>107759</text:p>
          </table:table-cell>
          <table:table-cell office:value-type="float" office:value="2.919" table:style-name="ce2">
            <text:p>2.919</text:p>
          </table:table-cell>
          <table:table-cell office:value-type="float" office:value="116246" table:style-name="ce2">
            <text:p>11624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396580" table:style-name="ce3">
            <text:p>396580</text:p>
          </table:table-cell>
          <table:table-cell office:value-type="float" office:value="562502" table:style-name="ce3">
            <text:p>562502</text:p>
          </table:table-cell>
          <table:table-cell office:value-type="float" office:value="802260" table:style-name="ce3">
            <text:p>802260</text:p>
          </table:table-cell>
          <table:table-cell office:value-type="float" office:value="164046" table:style-name="ce3">
            <text:p>164046</text:p>
          </table:table-cell>
          <table:table-cell office:value-type="float" office:value="6025.44" table:style-name="ce3">
            <text:p>6025.44</text:p>
          </table:table-cell>
          <table:table-cell office:value-type="float" office:value="13936" table:style-name="ce3">
            <text:p>13936</text:p>
          </table:table-cell>
          <table:table-cell office:value-type="float" office:value="445.57" table:style-name="ce3">
            <text:p>445.57</text:p>
          </table:table-cell>
          <table:table-cell office:value-type="float" office:value="4894" table:style-name="ce3">
            <text:p>4894</text:p>
          </table:table-cell>
          <table:table-cell office:value-type="float" office:value="399.22" table:style-name="ce3">
            <text:p>399.22</text:p>
          </table:table-cell>
          <table:table-cell office:value-type="float" office:value="3.025665283203125" table:formula="of:=[.E126]/[.D126]" table:style-name="ce4">
            <text:p>3.026</text:p>
          </table:table-cell>
          <table:table-cell office:value-type="float" office:value="4.2915496826171875" table:formula="of:=[.F126]/[.D126]" table:style-name="ce4">
            <text:p>4.292</text:p>
          </table:table-cell>
          <table:table-cell office:value-type="float" office:value="1.418382167532402" table:formula="of:=[.F126]/[.E126]" table:style-name="ce4">
            <text:p>1.418</text:p>
          </table:table-cell>
          <table:table-cell office:value-type="float" office:value="1.2515716552734375" table:formula="of:=[.H126]/[.D126]" table:style-name="ce4">
            <text:p>1.252</text:p>
          </table:table-cell>
          <table:table-cell office:value-type="float" office:value="120175.75757575758" table:formula="of:=[.N126]*[.D126]/3.3" table:style-name="ce7">
            <text:p>120176</text:p>
          </table:table-cell>
          <table:table-cell office:value-type="float" office:value="3.343" table:style-name="ce2">
            <text:p>3.343</text:p>
          </table:table-cell>
          <table:table-cell office:value-type="float" office:value="133102" table:style-name="ce2">
            <text:p>13310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491844" table:style-name="ce3">
            <text:p>491844</text:p>
          </table:table-cell>
          <table:table-cell office:value-type="float" office:value="508612" table:style-name="ce3">
            <text:p>508612</text:p>
          </table:table-cell>
          <table:table-cell office:value-type="float" office:value="716926" table:style-name="ce3">
            <text:p>716926</text:p>
          </table:table-cell>
          <table:table-cell office:value-type="float" office:value="253000" table:style-name="ce3">
            <text:p>253000</text:p>
          </table:table-cell>
          <table:table-cell office:value-type="float" office:value="8140.43" table:style-name="ce3">
            <text:p>8140.43</text:p>
          </table:table-cell>
          <table:table-cell office:value-type="float" office:value="41942" table:style-name="ce3">
            <text:p>41942</text:p>
          </table:table-cell>
          <table:table-cell office:value-type="float" office:value="258.83999999999997" table:style-name="ce3">
            <text:p>258.84</text:p>
          </table:table-cell>
          <table:table-cell office:value-type="float" office:value="11202" table:style-name="ce3">
            <text:p>11202</text:p>
          </table:table-cell>
          <table:table-cell office:value-type="float" office:value="1679.69" table:style-name="ce3">
            <text:p>1679.69</text:p>
          </table:table-cell>
          <table:table-cell office:value-type="float" office:value="3.752471923828125" table:formula="of:=[.E127]/[.D127]" table:style-name="ce4">
            <text:p>3.752</text:p>
          </table:table-cell>
          <table:table-cell office:value-type="float" office:value="3.880401611328125" table:formula="of:=[.F127]/[.D127]" table:style-name="ce4">
            <text:p>3.880</text:p>
          </table:table-cell>
          <table:table-cell office:value-type="float" office:value="1.0340921105065835" table:formula="of:=[.F127]/[.E127]" table:style-name="ce4">
            <text:p>1.034</text:p>
          </table:table-cell>
          <table:table-cell office:value-type="float" office:value="1.93023681640625" table:formula="of:=[.H127]/[.D127]" table:style-name="ce4">
            <text:p>1.930</text:p>
          </table:table-cell>
          <table:table-cell office:value-type="float" office:value="149043.63636363638" table:formula="of:=[.N127]*[.D127]/3.3" table:style-name="ce7">
            <text:p>149044</text:p>
          </table:table-cell>
          <table:table-cell office:value-type="float" office:value="3.9260000000000002" table:style-name="ce2">
            <text:p>3.926</text:p>
          </table:table-cell>
          <table:table-cell office:value-type="float" office:value="156317" table:style-name="ce8">
            <text:p>156317</text:p>
          </table:table-cell>
          <table:table-cell table:number-columns-repeated="16364"/>
        </table:table-row>
        <table:table-row table:style-name="ro1">
          <table:table-cell table:number-columns-repeated="6" table:style-name="ce2"/>
          <table:table-cell table:number-columns-repeated="3" table:style-name="ce3"/>
          <table:table-cell table:number-columns-repeated="4" table:style-name="ce2"/>
          <table:table-cell table:number-columns-repeated="4" table:style-name="ce4"/>
          <table:table-cell table:style-name="ce7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filter ph 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582859" table:style-name="ce3">
            <text:p>582859</text:p>
          </table:table-cell>
          <table:table-cell office:value-type="float" office:value="634884" table:style-name="ce3">
            <text:p>634884</text:p>
          </table:table-cell>
          <table:table-cell office:value-type="float" office:value="755750" table:style-name="ce3">
            <text:p>755750</text:p>
          </table:table-cell>
          <table:table-cell office:value-type="float" office:value="421902" table:style-name="ce3">
            <text:p>421902</text:p>
          </table:table-cell>
          <table:table-cell office:value-type="float" office:value="7340.8" table:style-name="ce3">
            <text:p>7340.8</text:p>
          </table:table-cell>
          <table:table-cell office:value-type="float" office:value="5" table:style-name="ce3">
            <text:p>5</text:p>
          </table:table-cell>
          <table:table-cell office:value-type="float" office:value="5.18" table:style-name="ce3">
            <text:p>5.18</text:p>
          </table:table-cell>
          <table:table-cell office:value-type="float" office:value="0" table:style-name="ce3">
            <text:p>0</text:p>
          </table:table-cell>
          <table:table-cell office:value-type="float" office:value="4.03" table:style-name="ce3">
            <text:p>4.03</text:p>
          </table:table-cell>
          <table:table-cell office:value-type="float" office:value="4.4468612670898438" table:formula="of:=[.E129]/[.D129]" table:style-name="ce4">
            <text:p>4.447</text:p>
          </table:table-cell>
          <table:table-cell office:value-type="float" office:value="4.843780517578125" table:formula="of:=[.F129]/[.D129]" table:style-name="ce4">
            <text:p>4.844</text:p>
          </table:table-cell>
          <table:table-cell office:value-type="float" office:value="1.0892582940299456" table:formula="of:=[.F129]/[.E129]" table:style-name="ce4">
            <text:p>1.089</text:p>
          </table:table-cell>
          <table:table-cell office:value-type="float" office:value="3.2188568115234375" table:formula="of:=[.H129]/[.D129]" table:style-name="ce4">
            <text:p>3.219</text:p>
          </table:table-cell>
          <table:table-cell office:value-type="float" office:value="176623.93939393939" table:formula="of:=[.N129]*[.D129]/3.3" table:style-name="ce7">
            <text:p>176624</text:p>
          </table:table-cell>
          <table:table-cell office:value-type="float" office:value="4.4569999999999999" table:style-name="ce2">
            <text:p>4.457</text:p>
          </table:table-cell>
          <table:table-cell office:value-type="float" office:value="177474" table:style-name="ce2">
            <text:p>177474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480567" table:style-name="ce3">
            <text:p>480567</text:p>
          </table:table-cell>
          <table:table-cell office:value-type="float" office:value="654342" table:style-name="ce3">
            <text:p>654342</text:p>
          </table:table-cell>
          <table:table-cell office:value-type="float" office:value="849958" table:style-name="ce3">
            <text:p>849958</text:p>
          </table:table-cell>
          <table:table-cell office:value-type="float" office:value="312422" table:style-name="ce3">
            <text:p>312422</text:p>
          </table:table-cell>
          <table:table-cell office:value-type="float" office:value="24555.99" table:style-name="ce3">
            <text:p>24555.99</text:p>
          </table:table-cell>
          <table:table-cell office:value-type="float" office:value="21" table:style-name="ce3">
            <text:p>21</text:p>
          </table:table-cell>
          <table:table-cell office:value-type="float" office:value="9.48" table:style-name="ce3">
            <text:p>9.48</text:p>
          </table:table-cell>
          <table:table-cell office:value-type="float" office:value="0" table:style-name="ce3">
            <text:p>0</text:p>
          </table:table-cell>
          <table:table-cell office:value-type="float" office:value="5.29" table:style-name="ce3">
            <text:p>5.29</text:p>
          </table:table-cell>
          <table:table-cell office:value-type="float" office:value="3.6664352416992188" table:formula="of:=[.E130]/[.D130]" table:style-name="ce4">
            <text:p>3.666</text:p>
          </table:table-cell>
          <table:table-cell office:value-type="float" office:value="4.9922332763671875" table:formula="of:=[.F130]/[.D130]" table:style-name="ce4">
            <text:p>4.992</text:p>
          </table:table-cell>
          <table:table-cell office:value-type="float" office:value="1.3616041051507906" table:formula="of:=[.F130]/[.E130]" table:style-name="ce4">
            <text:p>1.362</text:p>
          </table:table-cell>
          <table:table-cell office:value-type="float" office:value="2.3835906982421875" table:formula="of:=[.H130]/[.D130]" table:style-name="ce4">
            <text:p>2.384</text:p>
          </table:table-cell>
          <table:table-cell office:value-type="float" office:value="145626.36363636365" table:formula="of:=[.N130]*[.D130]/3.3" table:style-name="ce7">
            <text:p>145626</text:p>
          </table:table-cell>
          <table:table-cell office:value-type="float" office:value="3.66" table:style-name="ce3">
            <text:p>3.66</text:p>
          </table:table-cell>
          <table:table-cell office:value-type="float" office:value="145717" table:style-name="ce3">
            <text:p>145717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452370" table:style-name="ce3">
            <text:p>452370</text:p>
          </table:table-cell>
          <table:table-cell office:value-type="float" office:value="728070" table:style-name="ce3">
            <text:p>728070</text:p>
          </table:table-cell>
          <table:table-cell office:value-type="float" office:value="994342" table:style-name="ce3">
            <text:p>994342</text:p>
          </table:table-cell>
          <table:table-cell office:value-type="float" office:value="255776" table:style-name="ce3">
            <text:p>255776</text:p>
          </table:table-cell>
          <table:table-cell office:value-type="float" office:value="40469.370000000003" table:style-name="ce3">
            <text:p>40469.37</text:p>
          </table:table-cell>
          <table:table-cell office:value-type="float" office:value="21" table:style-name="ce3">
            <text:p>21</text:p>
          </table:table-cell>
          <table:table-cell office:value-type="float" office:value="12.22" table:style-name="ce3">
            <text:p>12.22</text:p>
          </table:table-cell>
          <table:table-cell office:value-type="float" office:value="0" table:style-name="ce3">
            <text:p>0</text:p>
          </table:table-cell>
          <table:table-cell office:value-type="float" office:value="14.14" table:style-name="ce3">
            <text:p>14.14</text:p>
          </table:table-cell>
          <table:table-cell office:value-type="float" office:value="3.4513092041015625" table:formula="of:=[.E131]/[.D131]" table:style-name="ce4">
            <text:p>3.451</text:p>
          </table:table-cell>
          <table:table-cell office:value-type="float" office:value="5.5547332763671875" table:formula="of:=[.F131]/[.D131]" table:style-name="ce4">
            <text:p>5.555</text:p>
          </table:table-cell>
          <table:table-cell office:value-type="float" office:value="1.6094568605345183" table:formula="of:=[.F131]/[.E131]" table:style-name="ce4">
            <text:p>1.609</text:p>
          </table:table-cell>
          <table:table-cell office:value-type="float" office:value="1.951416015625" table:formula="of:=[.H131]/[.D131]" table:style-name="ce4">
            <text:p>1.951</text:p>
          </table:table-cell>
          <table:table-cell office:value-type="float" office:value="137081.81818181818" table:formula="of:=[.N131]*[.D131]/3.3" table:style-name="ce7">
            <text:p>137082</text:p>
          </table:table-cell>
          <table:table-cell office:value-type="float" office:value="3.5369999999999999" table:style-name="ce3">
            <text:p>3.537</text:p>
          </table:table-cell>
          <table:table-cell office:value-type="float" office:value="140845" table:style-name="ce3">
            <text:p>140845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502971" table:style-name="ce3">
            <text:p>502971</text:p>
          </table:table-cell>
          <table:table-cell office:value-type="float" office:value="771334" table:style-name="ce3">
            <text:p>771334</text:p>
          </table:table-cell>
          <table:table-cell office:value-type="float" office:value="1070632" table:style-name="ce3">
            <text:p>1070632</text:p>
          </table:table-cell>
          <table:table-cell office:value-type="float" office:value="287181" table:style-name="ce3">
            <text:p>287181</text:p>
          </table:table-cell>
          <table:table-cell office:value-type="float" office:value="115992.44" table:style-name="ce3">
            <text:p>115992.44</text:p>
          </table:table-cell>
          <table:table-cell office:value-type="float" office:value="87" table:style-name="ce3">
            <text:p>87</text:p>
          </table:table-cell>
          <table:table-cell office:value-type="float" office:value="103.67" table:style-name="ce3">
            <text:p>103.67</text:p>
          </table:table-cell>
          <table:table-cell office:value-type="float" office:value="2" table:style-name="ce3">
            <text:p>2</text:p>
          </table:table-cell>
          <table:table-cell office:value-type="float" office:value="44.7" table:style-name="ce3">
            <text:p>44.7</text:p>
          </table:table-cell>
          <table:table-cell office:value-type="float" office:value="3.8373641967773438" table:formula="of:=[.E132]/[.D132]" table:style-name="ce4">
            <text:p>3.837</text:p>
          </table:table-cell>
          <table:table-cell office:value-type="float" office:value="5.8848114013671875" table:formula="of:=[.F132]/[.D132]" table:style-name="ce4">
            <text:p>5.885</text:p>
          </table:table-cell>
          <table:table-cell office:value-type="float" office:value="1.5335556125502265" table:formula="of:=[.F132]/[.E132]" table:style-name="ce4">
            <text:p>1.534</text:p>
          </table:table-cell>
          <table:table-cell office:value-type="float" office:value="2.1910171508789063" table:formula="of:=[.H132]/[.D132]" table:style-name="ce4">
            <text:p>2.191</text:p>
          </table:table-cell>
          <table:table-cell office:value-type="float" office:value="152415.45454545456" table:formula="of:=[.N132]*[.D132]/3.3" table:style-name="ce7">
            <text:p>152415</text:p>
          </table:table-cell>
          <table:table-cell office:value-type="float" office:value="3.8769999999999998" table:style-name="ce3">
            <text:p>3.877</text:p>
          </table:table-cell>
          <table:table-cell office:value-type="float" office:value="154356" table:style-name="ce3">
            <text:p>154356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531653" table:style-name="ce3">
            <text:p>531653</text:p>
          </table:table-cell>
          <table:table-cell office:value-type="float" office:value="784904" table:style-name="ce3">
            <text:p>784904</text:p>
          </table:table-cell>
          <table:table-cell office:value-type="float" office:value="1116197" table:style-name="ce3">
            <text:p>1116197</text:p>
          </table:table-cell>
          <table:table-cell office:value-type="float" office:value="173526" table:style-name="ce3">
            <text:p>173526</text:p>
          </table:table-cell>
          <table:table-cell office:value-type="float" office:value="8443.4500000000007" table:style-name="ce3">
            <text:p>8443.45</text:p>
          </table:table-cell>
          <table:table-cell office:value-type="float" office:value="552" table:style-name="ce3">
            <text:p>552</text:p>
          </table:table-cell>
          <table:table-cell office:value-type="float" office:value="526.34" table:style-name="ce3">
            <text:p>526.34</text:p>
          </table:table-cell>
          <table:table-cell office:value-type="float" office:value="4231" table:style-name="ce3">
            <text:p>4231</text:p>
          </table:table-cell>
          <table:table-cell office:value-type="float" office:value="146.77000000000001" table:style-name="ce3">
            <text:p>146.77</text:p>
          </table:table-cell>
          <table:table-cell office:value-type="float" office:value="4.0561904907226563" table:formula="of:=[.E133]/[.D133]" table:style-name="ce4">
            <text:p>4.056</text:p>
          </table:table-cell>
          <table:table-cell office:value-type="float" office:value="5.98834228515625" table:formula="of:=[.F133]/[.D133]" table:style-name="ce4">
            <text:p>5.988</text:p>
          </table:table-cell>
          <table:table-cell office:value-type="float" office:value="1.4763464139203579" table:formula="of:=[.F133]/[.E133]" table:style-name="ce4">
            <text:p>1.476</text:p>
          </table:table-cell>
          <table:table-cell office:value-type="float" office:value="1.3238983154296875" table:formula="of:=[.H133]/[.D133]" table:style-name="ce4">
            <text:p>1.324</text:p>
          </table:table-cell>
          <table:table-cell office:value-type="float" office:value="161106.9696969697" table:formula="of:=[.N133]*[.D133]/3.3" table:style-name="ce7">
            <text:p>161107</text:p>
          </table:table-cell>
          <table:table-cell office:value-type="float" office:value="4.2450000000000001" table:style-name="ce2">
            <text:p>4.245</text:p>
          </table:table-cell>
          <table:table-cell office:value-type="float" office:value="169009" table:style-name="ce2">
            <text:p>169009</text:p>
          </table:table-cell>
          <table:table-cell table:number-columns-repeated="3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570648" table:style-name="ce3">
            <text:p>570648</text:p>
          </table:table-cell>
          <table:table-cell office:value-type="float" office:value="795464" table:style-name="ce3">
            <text:p>795464</text:p>
          </table:table-cell>
          <table:table-cell office:value-type="float" office:value="1130144" table:style-name="ce3">
            <text:p>1130144</text:p>
          </table:table-cell>
          <table:table-cell office:value-type="float" office:value="219344" table:style-name="ce3">
            <text:p>219344</text:p>
          </table:table-cell>
          <table:table-cell office:value-type="float" office:value="6651.49" table:style-name="ce3">
            <text:p>6651.49</text:p>
          </table:table-cell>
          <table:table-cell office:value-type="float" office:value="13783" table:style-name="ce3">
            <text:p>13783</text:p>
          </table:table-cell>
          <table:table-cell office:value-type="float" office:value="477.64" table:style-name="ce3">
            <text:p>477.64</text:p>
          </table:table-cell>
          <table:table-cell office:value-type="float" office:value="6338" table:style-name="ce3">
            <text:p>6338</text:p>
          </table:table-cell>
          <table:table-cell office:value-type="float" office:value="1472.61" table:style-name="ce3">
            <text:p>1472.61</text:p>
          </table:table-cell>
          <table:table-cell office:value-type="float" office:value="4.35369873046875" table:formula="of:=[.E134]/[.D134]" table:style-name="ce4">
            <text:p>4.354</text:p>
          </table:table-cell>
          <table:table-cell office:value-type="float" office:value="6.06890869140625" table:formula="of:=[.F134]/[.D134]" table:style-name="ce4">
            <text:p>6.069</text:p>
          </table:table-cell>
          <table:table-cell office:value-type="float" office:value="1.3939661577715159" table:formula="of:=[.F134]/[.E134]" table:style-name="ce4">
            <text:p>1.394</text:p>
          </table:table-cell>
          <table:table-cell office:value-type="float" office:value="1.6734619140625" table:formula="of:=[.H134]/[.D134]" table:style-name="ce4">
            <text:p>1.673</text:p>
          </table:table-cell>
          <table:table-cell office:value-type="float" office:value="172923.63636363638" table:formula="of:=[.N134]*[.D134]/3.3" table:style-name="ce7">
            <text:p>172924</text:p>
          </table:table-cell>
          <table:table-cell office:value-type="float" office:value="4.6230000000000002" table:style-name="ce2">
            <text:p>4.623</text:p>
          </table:table-cell>
          <table:table-cell office:value-type="float" office:value="184067" table:style-name="ce2">
            <text:p>184067</text:p>
          </table:table-cell>
          <table:table-cell table:number-columns-repeated="3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704445" table:style-name="ce3">
            <text:p>704445</text:p>
          </table:table-cell>
          <table:table-cell office:value-type="float" office:value="706567" table:style-name="ce3">
            <text:p>706567</text:p>
          </table:table-cell>
          <table:table-cell office:value-type="float" office:value="993771" table:style-name="ce3">
            <text:p>993771</text:p>
          </table:table-cell>
          <table:table-cell office:value-type="float" office:value="326938" table:style-name="ce3">
            <text:p>326938</text:p>
          </table:table-cell>
          <table:table-cell office:value-type="float" office:value="11479.35" table:style-name="ce3">
            <text:p>11479.35</text:p>
          </table:table-cell>
          <table:table-cell office:value-type="float" office:value="67165" table:style-name="ce3">
            <text:p>67165</text:p>
          </table:table-cell>
          <table:table-cell office:value-type="float" office:value="369.58" table:style-name="ce3">
            <text:p>369.58</text:p>
          </table:table-cell>
          <table:table-cell office:value-type="float" office:value="26840" table:style-name="ce3">
            <text:p>26840</text:p>
          </table:table-cell>
          <table:table-cell office:value-type="float" office:value="1811.67" table:style-name="ce3">
            <text:p>1811.67</text:p>
          </table:table-cell>
          <table:table-cell office:value-type="float" office:value="5.3744888305664063" table:formula="of:=[.E135]/[.D135]" table:style-name="ce4">
            <text:p>5.374</text:p>
          </table:table-cell>
          <table:table-cell office:value-type="float" office:value="5.3906784057617188" table:formula="of:=[.F135]/[.D135]" table:style-name="ce4">
            <text:p>5.391</text:p>
          </table:table-cell>
          <table:table-cell office:value-type="float" office:value="1.0030123004634854" table:formula="of:=[.F135]/[.E135]" table:style-name="ce4">
            <text:p>1.003</text:p>
          </table:table-cell>
          <table:table-cell office:value-type="float" office:value="2.4943389892578125" table:formula="of:=[.H135]/[.D135]" table:style-name="ce4">
            <text:p>2.494</text:p>
          </table:table-cell>
          <table:table-cell office:value-type="float" office:value="213468.18181818182" table:formula="of:=[.N135]*[.D135]/3.3" table:style-name="ce7">
            <text:p>213468</text:p>
          </table:table-cell>
          <table:table-cell office:value-type="float" office:value="5.5990000000000002" table:style-name="ce2">
            <text:p>5.599</text:p>
          </table:table-cell>
          <table:table-cell office:value-type="float" office:value="222927" table:style-name="ce2">
            <text:p>222927</text:p>
          </table:table-cell>
          <table:table-cell table:number-columns-repeated="3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number-columns-repeated="5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office:value-type="string" table:style-name="ce2">
            <text:p>filter ph 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1031241" table:style-name="ce3">
            <text:p>1031241</text:p>
          </table:table-cell>
          <table:table-cell office:value-type="float" office:value="1062919" table:style-name="ce3">
            <text:p>1062919</text:p>
          </table:table-cell>
          <table:table-cell office:value-type="float" office:value="1339527" table:style-name="ce3">
            <text:p>1339527</text:p>
          </table:table-cell>
          <table:table-cell office:value-type="float" office:value="764114" table:style-name="ce3">
            <text:p>764114</text:p>
          </table:table-cell>
          <table:table-cell office:value-type="float" office:value="55030.87" table:style-name="ce3">
            <text:p>55030.87</text:p>
          </table:table-cell>
          <table:table-cell office:value-type="float" office:value="6" table:style-name="ce3">
            <text:p>6</text:p>
          </table:table-cell>
          <table:table-cell office:value-type="float" office:value="6.34" table:style-name="ce3">
            <text:p>6.34</text:p>
          </table:table-cell>
          <table:table-cell office:value-type="float" office:value="2" table:style-name="ce3">
            <text:p>2</text:p>
          </table:table-cell>
          <table:table-cell office:value-type="float" office:value="7.46" table:style-name="ce3">
            <text:p>7.46</text:p>
          </table:table-cell>
          <table:table-cell office:value-type="float" office:value="7.8677444458007813" table:formula="of:=[.E137]/[.D137]" table:style-name="ce4">
            <text:p>7.868</text:p>
          </table:table-cell>
          <table:table-cell office:value-type="float" office:value="8.1094284057617188" table:formula="of:=[.F137]/[.D137]" table:style-name="ce4">
            <text:p>8.109</text:p>
          </table:table-cell>
          <table:table-cell office:value-type="float" office:value="1.0307183286932928" table:formula="of:=[.F137]/[.E137]" table:style-name="ce4">
            <text:p>1.031</text:p>
          </table:table-cell>
          <table:table-cell office:value-type="float" office:value="5.8297271728515625" table:formula="of:=[.H137]/[.D137]" table:style-name="ce4">
            <text:p>5.830</text:p>
          </table:table-cell>
          <table:table-cell office:value-type="float" office:value="312497.27272727276" table:formula="of:=[.N137]*[.D137]/3.3" table:style-name="ce7">
            <text:p>312497</text:p>
          </table:table-cell>
          <table:table-cell office:value-type="float" office:value="7.968" table:style-name="ce2">
            <text:p>7.968</text:p>
          </table:table-cell>
          <table:table-cell office:value-type="float" office:value="317222" table:style-name="ce2">
            <text:p>317222</text:p>
          </table:table-cell>
          <table:table-cell table:number-columns-repeated="3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823131" table:style-name="ce3">
            <text:p>823131</text:p>
          </table:table-cell>
          <table:table-cell office:value-type="float" office:value="1096714" table:style-name="ce3">
            <text:p>1096714</text:p>
          </table:table-cell>
          <table:table-cell office:value-type="float" office:value="1437806" table:style-name="ce3">
            <text:p>1437806</text:p>
          </table:table-cell>
          <table:table-cell office:value-type="float" office:value="544067" table:style-name="ce3">
            <text:p>544067</text:p>
          </table:table-cell>
          <table:table-cell office:value-type="float" office:value="41619.89" table:style-name="ce3">
            <text:p>41619.89</text:p>
          </table:table-cell>
          <table:table-cell office:value-type="float" office:value="24" table:style-name="ce3">
            <text:p>24</text:p>
          </table:table-cell>
          <table:table-cell office:value-type="float" office:value="11.15" table:style-name="ce3">
            <text:p>11.15</text:p>
          </table:table-cell>
          <table:table-cell office:value-type="float" office:value="2" table:style-name="ce3">
            <text:p>2</text:p>
          </table:table-cell>
          <table:table-cell office:value-type="float" office:value="14.97" table:style-name="ce3">
            <text:p>14.97</text:p>
          </table:table-cell>
          <table:table-cell office:value-type="float" office:value="6.2799911499023438" table:formula="of:=[.E138]/[.D138]" table:style-name="ce4">
            <text:p>6.280</text:p>
          </table:table-cell>
          <table:table-cell office:value-type="float" office:value="8.3672637939453125" table:formula="of:=[.F138]/[.D138]" table:style-name="ce4">
            <text:p>8.367</text:p>
          </table:table-cell>
          <table:table-cell office:value-type="float" office:value="1.3323687238118842" table:formula="of:=[.F138]/[.E138]" table:style-name="ce4">
            <text:p>1.332</text:p>
          </table:table-cell>
          <table:table-cell office:value-type="float" office:value="4.1509017944335938" table:formula="of:=[.H138]/[.D138]" table:style-name="ce4">
            <text:p>4.151</text:p>
          </table:table-cell>
          <table:table-cell office:value-type="float" office:value="249433.63636363638" table:formula="of:=[.N138]*[.D138]/3.3" table:style-name="ce7">
            <text:p>249434</text:p>
          </table:table-cell>
          <table:table-cell office:value-type="float" office:value="6.2590000000000003" table:style-name="ce2">
            <text:p>6.259</text:p>
          </table:table-cell>
          <table:table-cell office:value-type="float" office:value="249199" table:style-name="ce2">
            <text:p>249199</text:p>
          </table:table-cell>
          <table:table-cell table:number-columns-repeated="3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771980" table:style-name="ce3">
            <text:p>771980</text:p>
          </table:table-cell>
          <table:table-cell office:value-type="float" office:value="1187338" table:style-name="ce3">
            <text:p>1187338</text:p>
          </table:table-cell>
          <table:table-cell office:value-type="float" office:value="1631882" table:style-name="ce3">
            <text:p>1631882</text:p>
          </table:table-cell>
          <table:table-cell office:value-type="float" office:value="450026" table:style-name="ce3">
            <text:p>450026</text:p>
          </table:table-cell>
          <table:table-cell office:value-type="float" office:value="66749.460000000006" table:style-name="ce3">
            <text:p>66749.46</text:p>
          </table:table-cell>
          <table:table-cell office:value-type="float" office:value="23" table:style-name="ce3">
            <text:p>23</text:p>
          </table:table-cell>
          <table:table-cell office:value-type="float" office:value="14.89" table:style-name="ce3">
            <text:p>14.89</text:p>
          </table:table-cell>
          <table:table-cell office:value-type="float" office:value="4" table:style-name="ce3">
            <text:p>4</text:p>
          </table:table-cell>
          <table:table-cell office:value-type="float" office:value="34.49" table:style-name="ce3">
            <text:p>34.49</text:p>
          </table:table-cell>
          <table:table-cell office:value-type="float" office:value="5.889739990234375" table:formula="of:=[.E139]/[.D139]" table:style-name="ce4">
            <text:p>5.890</text:p>
          </table:table-cell>
          <table:table-cell office:value-type="float" office:value="9.0586700439453125" table:formula="of:=[.F139]/[.D139]" table:style-name="ce4">
            <text:p>9.059</text:p>
          </table:table-cell>
          <table:table-cell office:value-type="float" office:value="1.5380424363325476" table:formula="of:=[.F139]/[.E139]" table:style-name="ce4">
            <text:p>1.538</text:p>
          </table:table-cell>
          <table:table-cell office:value-type="float" office:value="3.4334259033203125" table:formula="of:=[.H139]/[.D139]" table:style-name="ce4">
            <text:p>3.433</text:p>
          </table:table-cell>
          <table:table-cell office:value-type="float" office:value="233933.33333333334" table:formula="of:=[.N139]*[.D139]/3.3" table:style-name="ce7">
            <text:p>233933</text:p>
          </table:table-cell>
          <table:table-cell office:value-type="float" office:value="5.91" table:style-name="ce2">
            <text:p>5.91</text:p>
          </table:table-cell>
          <table:table-cell office:value-type="float" office:value="235291" table:style-name="ce2">
            <text:p>235291</text:p>
          </table:table-cell>
          <table:table-cell table:number-columns-repeated="3" table:style-name="ce2"/>
          <table:table-cell table:number-columns-repeated="4" table:style-name="ce4"/>
          <table:table-cell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828951" table:style-name="ce3">
            <text:p>828951</text:p>
          </table:table-cell>
          <table:table-cell office:value-type="float" office:value="1230857" table:style-name="ce3">
            <text:p>1230857</text:p>
          </table:table-cell>
          <table:table-cell office:value-type="float" office:value="1718426" table:style-name="ce3">
            <text:p>1718426</text:p>
          </table:table-cell>
          <table:table-cell office:value-type="float" office:value="347397" table:style-name="ce3">
            <text:p>347397</text:p>
          </table:table-cell>
          <table:table-cell office:value-type="float" office:value="188313.87" table:style-name="ce3">
            <text:p>188313.87</text:p>
          </table:table-cell>
          <table:table-cell office:value-type="float" office:value="124" table:style-name="ce3">
            <text:p>124</text:p>
          </table:table-cell>
          <table:table-cell office:value-type="float" office:value="107.04" table:style-name="ce3">
            <text:p>107.04</text:p>
          </table:table-cell>
          <table:table-cell office:value-type="float" office:value="4780" table:style-name="ce3">
            <text:p>4780</text:p>
          </table:table-cell>
          <table:table-cell office:value-type="float" office:value="1799.74" table:style-name="ce3">
            <text:p>1799.74</text:p>
          </table:table-cell>
          <table:table-cell office:value-type="float" office:value="6.3243942260742188" table:formula="of:=[.E140]/[.D140]" table:style-name="ce4">
            <text:p>6.324</text:p>
          </table:table-cell>
          <table:table-cell office:value-type="float" office:value="9.3906936645507813" table:formula="of:=[.F140]/[.D140]" table:style-name="ce4">
            <text:p>9.391</text:p>
          </table:table-cell>
          <table:table-cell office:value-type="float" office:value="1.4848368600797877" table:formula="of:=[.F140]/[.E140]" table:style-name="ce4">
            <text:p>1.485</text:p>
          </table:table-cell>
          <table:table-cell office:value-type="float" office:value="2.6504287719726563" table:formula="of:=[.H140]/[.D140]" table:style-name="ce4">
            <text:p>2.650</text:p>
          </table:table-cell>
          <table:table-cell office:value-type="float" office:value="251197.27272727274" table:formula="of:=[.N140]*[.D140]/3.3" table:style-name="ce7">
            <text:p>251197</text:p>
          </table:table-cell>
          <table:table-cell office:value-type="float" office:value="6.5309999999999997" table:style-name="ce3">
            <text:p>6.531</text:p>
          </table:table-cell>
          <table:table-cell office:value-type="float" office:value="260027" table:style-name="ce3">
            <text:p>260027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862048" table:style-name="ce3">
            <text:p>862048</text:p>
          </table:table-cell>
          <table:table-cell office:value-type="float" office:value="1242380" table:style-name="ce3">
            <text:p>1242380</text:p>
          </table:table-cell>
          <table:table-cell office:value-type="float" office:value="1768018" table:style-name="ce3">
            <text:p>1768018</text:p>
          </table:table-cell>
          <table:table-cell office:value-type="float" office:value="320420" table:style-name="ce3">
            <text:p>320420</text:p>
          </table:table-cell>
          <table:table-cell office:value-type="float" office:value="9034.7999999999993" table:style-name="ce3">
            <text:p>9034.8</text:p>
          </table:table-cell>
          <table:table-cell office:value-type="float" office:value="762" table:style-name="ce3">
            <text:p>762</text:p>
          </table:table-cell>
          <table:table-cell office:value-type="float" office:value="635.9" table:style-name="ce3">
            <text:p>635.9</text:p>
          </table:table-cell>
          <table:table-cell office:value-type="float" office:value="4287" table:style-name="ce3">
            <text:p>4287</text:p>
          </table:table-cell>
          <table:table-cell office:value-type="float" office:value="176.41" table:style-name="ce3">
            <text:p>176.41</text:p>
          </table:table-cell>
          <table:table-cell office:value-type="float" office:value="6.576904296875" table:formula="of:=[.E141]/[.D141]" table:style-name="ce4">
            <text:p>6.577</text:p>
          </table:table-cell>
          <table:table-cell office:value-type="float" office:value="9.478607177734375" table:formula="of:=[.F141]/[.D141]" table:style-name="ce4">
            <text:p>9.479</text:p>
          </table:table-cell>
          <table:table-cell office:value-type="float" office:value="1.4411958498830693" table:formula="of:=[.F141]/[.E141]" table:style-name="ce4">
            <text:p>1.441</text:p>
          </table:table-cell>
          <table:table-cell office:value-type="float" office:value="2.444610595703125" table:formula="of:=[.H141]/[.D141]" table:style-name="ce4">
            <text:p>2.445</text:p>
          </table:table-cell>
          <table:table-cell office:value-type="float" office:value="261226.66666666669" table:formula="of:=[.N141]*[.D141]/3.3" table:style-name="ce7">
            <text:p>261227</text:p>
          </table:table-cell>
          <table:table-cell office:value-type="float" office:value="6.7880000000000003" table:style-name="ce3">
            <text:p>6.788</text:p>
          </table:table-cell>
          <table:table-cell office:value-type="float" office:value="270279" table:style-name="ce3">
            <text:p>270279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994313" table:style-name="ce3">
            <text:p>994313</text:p>
          </table:table-cell>
          <table:table-cell office:value-type="float" office:value="1252172" table:style-name="ce3">
            <text:p>1252172</text:p>
          </table:table-cell>
          <table:table-cell office:value-type="float" office:value="1784956" table:style-name="ce3">
            <text:p>1784956</text:p>
          </table:table-cell>
          <table:table-cell office:value-type="float" office:value="351919" table:style-name="ce3">
            <text:p>351919</text:p>
          </table:table-cell>
          <table:table-cell office:value-type="float" office:value="16029.39" table:style-name="ce3">
            <text:p>16029.39</text:p>
          </table:table-cell>
          <table:table-cell office:value-type="float" office:value="13131" table:style-name="ce3">
            <text:p>13131</text:p>
          </table:table-cell>
          <table:table-cell office:value-type="float" office:value="575.94000000000005" table:style-name="ce3">
            <text:p>575.94</text:p>
          </table:table-cell>
          <table:table-cell office:value-type="float" office:value="21072" table:style-name="ce3">
            <text:p>21072</text:p>
          </table:table-cell>
          <table:table-cell office:value-type="float" office:value="4862.37" table:style-name="ce3">
            <text:p>4862.37</text:p>
          </table:table-cell>
          <table:table-cell office:value-type="float" office:value="7.5860061645507813" table:formula="of:=[.E142]/[.D142]" table:style-name="ce4">
            <text:p>7.586</text:p>
          </table:table-cell>
          <table:table-cell office:value-type="float" office:value="9.553314208984375" table:formula="of:=[.F142]/[.D142]" table:style-name="ce4">
            <text:p>9.553</text:p>
          </table:table-cell>
          <table:table-cell office:value-type="float" office:value="1.2593338314997391" table:formula="of:=[.F142]/[.E142]" table:style-name="ce4">
            <text:p>1.259</text:p>
          </table:table-cell>
          <table:table-cell office:value-type="float" office:value="2.6849288940429688" table:formula="of:=[.H142]/[.D142]" table:style-name="ce4">
            <text:p>2.685</text:p>
          </table:table-cell>
          <table:table-cell office:value-type="float" office:value="301306.96969696973" table:formula="of:=[.N142]*[.D142]/3.3" table:style-name="ce7">
            <text:p>301307</text:p>
          </table:table-cell>
          <table:table-cell office:value-type="float" office:value="7.827" table:style-name="ce3">
            <text:p>7.827</text:p>
          </table:table-cell>
          <table:table-cell office:value-type="float" office:value="311633" table:style-name="ce3">
            <text:p>311633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1187998" table:style-name="ce3">
            <text:p>1187998</text:p>
          </table:table-cell>
          <table:table-cell office:value-type="float" office:value="1131914" table:style-name="ce3">
            <text:p>1131914</text:p>
          </table:table-cell>
          <table:table-cell office:value-type="float" office:value="1653000" table:style-name="ce3">
            <text:p>1653000</text:p>
          </table:table-cell>
          <table:table-cell office:value-type="float" office:value="445577" table:style-name="ce3">
            <text:p>445577</text:p>
          </table:table-cell>
          <table:table-cell office:value-type="float" office:value="22656.13" table:style-name="ce3">
            <text:p>22656.13</text:p>
          </table:table-cell>
          <table:table-cell office:value-type="float" office:value="125056" table:style-name="ce3">
            <text:p>125056</text:p>
          </table:table-cell>
          <table:table-cell office:value-type="float" office:value="430.22" table:style-name="ce3">
            <text:p>430.22</text:p>
          </table:table-cell>
          <table:table-cell office:value-type="float" office:value="67172" table:style-name="ce3">
            <text:p>67172</text:p>
          </table:table-cell>
          <table:table-cell office:value-type="float" office:value="2511.54" table:style-name="ce3">
            <text:p>2511.54</text:p>
          </table:table-cell>
          <table:table-cell office:value-type="float" office:value="9.0637054443359375" table:formula="of:=[.E143]/[.D143]" table:style-name="ce4">
            <text:p>9.064</text:p>
          </table:table-cell>
          <table:table-cell office:value-type="float" office:value="8.6358184814453125" table:formula="of:=[.F143]/[.D143]" table:style-name="ce4">
            <text:p>8.636</text:p>
          </table:table-cell>
          <table:table-cell office:value-type="float" office:value="0.95279116631509486" table:formula="of:=[.F143]/[.E143]" table:style-name="ce4">
            <text:p>0.953</text:p>
          </table:table-cell>
          <table:table-cell office:value-type="float" office:value="3.3994827270507813" table:formula="of:=[.H143]/[.D143]" table:style-name="ce4">
            <text:p>3.399</text:p>
          </table:table-cell>
          <table:table-cell office:value-type="float" office:value="359999.39393939398" table:formula="of:=[.N143]*[.D143]/3.3" table:style-name="ce7">
            <text:p>359999</text:p>
          </table:table-cell>
          <table:table-cell office:value-type="float" office:value="9.1310000000000002" table:style-name="ce3">
            <text:p>9.131</text:p>
          </table:table-cell>
          <table:table-cell office:value-type="float" office:value="363551" table:style-name="ce3">
            <text:p>363551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number-columns-repeated="10" table:style-name="ce3"/>
          <table:table-cell table:number-columns-repeated="16356"/>
        </table:table-row>
        <table:table-row table:style-name="ro1">
          <table:table-cell office:value-type="string" table:style-name="ce2">
            <text:p>filter ph 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1901737" table:style-name="ce3">
            <text:p>1901737</text:p>
          </table:table-cell>
          <table:table-cell office:value-type="float" office:value="1939470" table:style-name="ce3">
            <text:p>1939470</text:p>
          </table:table-cell>
          <table:table-cell office:value-type="float" office:value="2586894" table:style-name="ce3">
            <text:p>2586894</text:p>
          </table:table-cell>
          <table:table-cell office:value-type="float" office:value="1414092" table:style-name="ce3">
            <text:p>1414092</text:p>
          </table:table-cell>
          <table:table-cell office:value-type="float" office:value="154645.28" table:style-name="ce3">
            <text:p>154645.28</text:p>
          </table:table-cell>
          <table:table-cell office:value-type="float" office:value="29" table:style-name="ce3">
            <text:p>29</text:p>
          </table:table-cell>
          <table:table-cell office:value-type="float" office:value="19.05" table:style-name="ce3">
            <text:p>19.05</text:p>
          </table:table-cell>
          <table:table-cell office:value-type="float" office:value="8" table:style-name="ce3">
            <text:p>8</text:p>
          </table:table-cell>
          <table:table-cell office:value-type="float" office:value="12.38" table:style-name="ce3">
            <text:p>12.38</text:p>
          </table:table-cell>
          <table:table-cell office:value-type="float" office:value="14.509101867675781" table:formula="of:=[.E145]/[.D145]" table:style-name="ce4">
            <text:p>14.509</text:p>
          </table:table-cell>
          <table:table-cell office:value-type="float" office:value="14.796981811523438" table:formula="of:=[.F145]/[.D145]" table:style-name="ce4">
            <text:p>14.797</text:p>
          </table:table-cell>
          <table:table-cell office:value-type="float" office:value="1.0198413345273294" table:formula="of:=[.F145]/[.E145]" table:style-name="ce4">
            <text:p>1.020</text:p>
          </table:table-cell>
          <table:table-cell office:value-type="float" office:value="10.788665771484375" table:formula="of:=[.H145]/[.D145]" table:style-name="ce4">
            <text:p>10.789</text:p>
          </table:table-cell>
          <table:table-cell office:value-type="float" office:value="576283.93939393945" table:formula="of:=[.N145]*[.D145]/3.3" table:style-name="ce7">
            <text:p>576284</text:p>
          </table:table-cell>
          <table:table-cell office:value-type="float" office:value="14.648999999999999" table:style-name="ce2">
            <text:p>14.649</text:p>
          </table:table-cell>
          <table:table-cell office:value-type="float" office:value="583212" table:style-name="ce2">
            <text:p>583212</text:p>
          </table:table-cell>
          <table:table-cell table:number-columns-repeated="3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1507946" table:style-name="ce3">
            <text:p>1507946</text:p>
          </table:table-cell>
          <table:table-cell office:value-type="float" office:value="1935378" table:style-name="ce3">
            <text:p>1935378</text:p>
          </table:table-cell>
          <table:table-cell office:value-type="float" office:value="2565340" table:style-name="ce3">
            <text:p>2565340</text:p>
          </table:table-cell>
          <table:table-cell office:value-type="float" office:value="1015896" table:style-name="ce3">
            <text:p>1015896</text:p>
          </table:table-cell>
          <table:table-cell office:value-type="float" office:value="78977.759999999995" table:style-name="ce3">
            <text:p>78977.76</text:p>
          </table:table-cell>
          <table:table-cell office:value-type="float" office:value="36" table:style-name="ce3">
            <text:p>36</text:p>
          </table:table-cell>
          <table:table-cell office:value-type="float" office:value="15.3" table:style-name="ce3">
            <text:p>15.3</text:p>
          </table:table-cell>
          <table:table-cell office:value-type="float" office:value="8" table:style-name="ce3">
            <text:p>8</text:p>
          </table:table-cell>
          <table:table-cell office:value-type="float" office:value="30.41" table:style-name="ce3">
            <text:p>30.41</text:p>
          </table:table-cell>
          <table:table-cell office:value-type="float" office:value="11.504714965820313" table:formula="of:=[.E146]/[.D146]" table:style-name="ce4">
            <text:p>11.505</text:p>
          </table:table-cell>
          <table:table-cell office:value-type="float" office:value="14.765762329101563" table:formula="of:=[.F146]/[.D146]" table:style-name="ce4">
            <text:p>14.766</text:p>
          </table:table-cell>
          <table:table-cell office:value-type="float" office:value="1.2834531210003541" table:formula="of:=[.F146]/[.E146]" table:style-name="ce4">
            <text:p>1.283</text:p>
          </table:table-cell>
          <table:table-cell office:value-type="float" office:value="7.75067138671875" table:formula="of:=[.H146]/[.D146]" table:style-name="ce4">
            <text:p>7.751</text:p>
          </table:table-cell>
          <table:table-cell office:value-type="float" office:value="456953.33333333337" table:formula="of:=[.N146]*[.D146]/3.3" table:style-name="ce7">
            <text:p>456953</text:p>
          </table:table-cell>
          <table:table-cell office:value-type="float" office:value="11.499000000000001" table:style-name="ce2">
            <text:p>11.499</text:p>
          </table:table-cell>
          <table:table-cell office:value-type="float" office:value="457812" table:style-name="ce2">
            <text:p>457812</text:p>
          </table:table-cell>
          <table:table-cell table:number-columns-repeated="3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1393451" table:style-name="ce3">
            <text:p>1393451</text:p>
          </table:table-cell>
          <table:table-cell office:value-type="float" office:value="2096657" table:style-name="ce3">
            <text:p>2096657</text:p>
          </table:table-cell>
          <table:table-cell office:value-type="float" office:value="2901685" table:style-name="ce3">
            <text:p>2901685</text:p>
          </table:table-cell>
          <table:table-cell office:value-type="float" office:value="834532" table:style-name="ce3">
            <text:p>834532</text:p>
          </table:table-cell>
          <table:table-cell office:value-type="float" office:value="122856.28" table:style-name="ce3">
            <text:p>122856.28</text:p>
          </table:table-cell>
          <table:table-cell office:value-type="float" office:value="39" table:style-name="ce3">
            <text:p>39</text:p>
          </table:table-cell>
          <table:table-cell office:value-type="float" office:value="22.67" table:style-name="ce3">
            <text:p>22.67</text:p>
          </table:table-cell>
          <table:table-cell office:value-type="float" office:value="16" table:style-name="ce3">
            <text:p>16</text:p>
          </table:table-cell>
          <table:table-cell office:value-type="float" office:value="111.6" table:style-name="ce3">
            <text:p>111.6</text:p>
          </table:table-cell>
          <table:table-cell office:value-type="float" office:value="10.631187438964844" table:formula="of:=[.E147]/[.D147]" table:style-name="ce4">
            <text:p>10.631</text:p>
          </table:table-cell>
          <table:table-cell office:value-type="float" office:value="15.996223449707031" table:formula="of:=[.F147]/[.D147]" table:style-name="ce4">
            <text:p>15.996</text:p>
          </table:table-cell>
          <table:table-cell office:value-type="float" office:value="1.5046506838058891" table:formula="of:=[.F147]/[.E147]" table:style-name="ce4">
            <text:p>1.505</text:p>
          </table:table-cell>
          <table:table-cell office:value-type="float" office:value="6.366973876953125" table:formula="of:=[.H147]/[.D147]" table:style-name="ce4">
            <text:p>6.367</text:p>
          </table:table-cell>
          <table:table-cell office:value-type="float" office:value="422257.87878787878" table:formula="of:=[.N147]*[.D147]/3.3" table:style-name="ce7">
            <text:p>422258</text:p>
          </table:table-cell>
          <table:table-cell office:value-type="float" office:value="10.631" table:style-name="ce2">
            <text:p>10.631</text:p>
          </table:table-cell>
          <table:table-cell office:value-type="float" office:value="423241" table:style-name="ce2">
            <text:p>423241</text:p>
          </table:table-cell>
          <table:table-cell table:number-columns-repeated="3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1477589" table:style-name="ce3">
            <text:p>1477589</text:p>
          </table:table-cell>
          <table:table-cell office:value-type="float" office:value="2149648" table:style-name="ce3">
            <text:p>2149648</text:p>
          </table:table-cell>
          <table:table-cell office:value-type="float" office:value="3015702" table:style-name="ce3">
            <text:p>3015702</text:p>
          </table:table-cell>
          <table:table-cell office:value-type="float" office:value="663239" table:style-name="ce3">
            <text:p>663239</text:p>
          </table:table-cell>
          <table:table-cell office:value-type="float" office:value="275676.88" table:style-name="ce3">
            <text:p>275676.88</text:p>
          </table:table-cell>
          <table:table-cell office:value-type="float" office:value="179" table:style-name="ce3">
            <text:p>179</text:p>
          </table:table-cell>
          <table:table-cell office:value-type="float" office:value="106.97" table:style-name="ce3">
            <text:p>106.97</text:p>
          </table:table-cell>
          <table:table-cell office:value-type="float" office:value="4841" table:style-name="ce3">
            <text:p>4841</text:p>
          </table:table-cell>
          <table:table-cell office:value-type="float" office:value="1873.49" table:style-name="ce3">
            <text:p>1873.49</text:p>
          </table:table-cell>
          <table:table-cell office:value-type="float" office:value="11.273109436035156" table:formula="of:=[.E148]/[.D148]" table:style-name="ce4">
            <text:p>11.273</text:p>
          </table:table-cell>
          <table:table-cell office:value-type="float" office:value="16.4005126953125" table:formula="of:=[.F148]/[.D148]" table:style-name="ce4">
            <text:p>16.401</text:p>
          </table:table-cell>
          <table:table-cell office:value-type="float" office:value="1.4548348695070146" table:formula="of:=[.F148]/[.E148]" table:style-name="ce4">
            <text:p>1.455</text:p>
          </table:table-cell>
          <table:table-cell office:value-type="float" office:value="5.0601119995117188" table:formula="of:=[.H148]/[.D148]" table:style-name="ce4">
            <text:p>5.060</text:p>
          </table:table-cell>
          <table:table-cell office:value-type="float" office:value="447754.24242424243" table:formula="of:=[.N148]*[.D148]/3.3" table:style-name="ce7">
            <text:p>447754</text:p>
          </table:table-cell>
          <table:table-cell office:value-type="float" office:value="11.454000000000001" table:style-name="ce3">
            <text:p>11.454</text:p>
          </table:table-cell>
          <table:table-cell office:value-type="float" office:value="456015" table:style-name="ce3">
            <text:p>456015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1536354" table:style-name="ce3">
            <text:p>1536354</text:p>
          </table:table-cell>
          <table:table-cell office:value-type="float" office:value="2162321" table:style-name="ce3">
            <text:p>2162321</text:p>
          </table:table-cell>
          <table:table-cell office:value-type="float" office:value="3074253" table:style-name="ce3">
            <text:p>3074253</text:p>
          </table:table-cell>
          <table:table-cell office:value-type="float" office:value="614477" table:style-name="ce3">
            <text:p>614477</text:p>
          </table:table-cell>
          <table:table-cell office:value-type="float" office:value="11038.22" table:style-name="ce3">
            <text:p>11038.22</text:p>
          </table:table-cell>
          <table:table-cell office:value-type="float" office:value="523" table:style-name="ce3">
            <text:p>523</text:p>
          </table:table-cell>
          <table:table-cell office:value-type="float" office:value="423.67" table:style-name="ce3">
            <text:p>423.67</text:p>
          </table:table-cell>
          <table:table-cell office:value-type="float" office:value="5901" table:style-name="ce3">
            <text:p>5901</text:p>
          </table:table-cell>
          <table:table-cell office:value-type="float" office:value="938.1" table:style-name="ce3">
            <text:p>938.1</text:p>
          </table:table-cell>
          <table:table-cell office:value-type="float" office:value="11.721450805664063" table:formula="of:=[.E149]/[.D149]" table:style-name="ce4">
            <text:p>11.721</text:p>
          </table:table-cell>
          <table:table-cell office:value-type="float" office:value="16.497200012207031" table:formula="of:=[.F149]/[.D149]" table:style-name="ce4">
            <text:p>16.497</text:p>
          </table:table-cell>
          <table:table-cell office:value-type="float" office:value="1.407436697531949" table:formula="of:=[.F149]/[.E149]" table:style-name="ce4">
            <text:p>1.407</text:p>
          </table:table-cell>
          <table:table-cell office:value-type="float" office:value="4.6880874633789063" table:formula="of:=[.H149]/[.D149]" table:style-name="ce4">
            <text:p>4.688</text:p>
          </table:table-cell>
          <table:table-cell office:value-type="float" office:value="465561.81818181823" table:formula="of:=[.N149]*[.D149]/3.3" table:style-name="ce7">
            <text:p>465562</text:p>
          </table:table-cell>
          <table:table-cell office:value-type="float" office:value="11.832000000000001" table:style-name="ce3">
            <text:p>11.832</text:p>
          </table:table-cell>
          <table:table-cell office:value-type="float" office:value="471079" table:style-name="ce3">
            <text:p>471079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1900240" table:style-name="ce3">
            <text:p>1900240</text:p>
          </table:table-cell>
          <table:table-cell office:value-type="float" office:value="2167186" table:style-name="ce3">
            <text:p>2167186</text:p>
          </table:table-cell>
          <table:table-cell office:value-type="float" office:value="3087167" table:style-name="ce3">
            <text:p>3087167</text:p>
          </table:table-cell>
          <table:table-cell office:value-type="float" office:value="576308" table:style-name="ce3">
            <text:p>576308</text:p>
          </table:table-cell>
          <table:table-cell office:value-type="float" office:value="13732.3" table:style-name="ce3">
            <text:p>13732.3</text:p>
          </table:table-cell>
          <table:table-cell office:value-type="float" office:value="13377" table:style-name="ce3">
            <text:p>13377</text:p>
          </table:table-cell>
          <table:table-cell office:value-type="float" office:value="611.72" table:style-name="ce3">
            <text:p>611.72</text:p>
          </table:table-cell>
          <table:table-cell office:value-type="float" office:value="88998" table:style-name="ce3">
            <text:p>88998</text:p>
          </table:table-cell>
          <table:table-cell office:value-type="float" office:value="6791.94" table:style-name="ce3">
            <text:p>6791.94</text:p>
          </table:table-cell>
          <table:table-cell office:value-type="float" office:value="14.4976806640625" table:formula="of:=[.E150]/[.D150]" table:style-name="ce4">
            <text:p>14.498</text:p>
          </table:table-cell>
          <table:table-cell office:value-type="float" office:value="16.534317016601563" table:formula="of:=[.F150]/[.D150]" table:style-name="ce4">
            <text:p>16.534</text:p>
          </table:table-cell>
          <table:table-cell office:value-type="float" office:value="1.1404801498758053" table:formula="of:=[.F150]/[.E150]" table:style-name="ce4">
            <text:p>1.140</text:p>
          </table:table-cell>
          <table:table-cell office:value-type="float" office:value="4.396881103515625" table:formula="of:=[.H150]/[.D150]" table:style-name="ce4">
            <text:p>4.397</text:p>
          </table:table-cell>
          <table:table-cell office:value-type="float" office:value="575830.3030303031" table:formula="of:=[.N150]*[.D150]/3.3" table:style-name="ce7">
            <text:p>575830</text:p>
          </table:table-cell>
          <table:table-cell office:value-type="float" office:value="15.555999999999999" table:style-name="ce3">
            <text:p>15.556</text:p>
          </table:table-cell>
          <table:table-cell office:value-type="float" office:value="619317" table:style-name="ce3">
            <text:p>619317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2100618" table:style-name="ce3">
            <text:p>2100618</text:p>
          </table:table-cell>
          <table:table-cell office:value-type="float" office:value="1958162" table:style-name="ce3">
            <text:p>1958162</text:p>
          </table:table-cell>
          <table:table-cell office:value-type="float" office:value="3007519" table:style-name="ce3">
            <text:p>3007519</text:p>
          </table:table-cell>
          <table:table-cell office:value-type="float" office:value="624965" table:style-name="ce3">
            <text:p>624965</text:p>
          </table:table-cell>
          <table:table-cell office:value-type="float" office:value="18984.990000000002" table:style-name="ce3">
            <text:p>18984.99</text:p>
          </table:table-cell>
          <table:table-cell office:value-type="float" office:value="239746" table:style-name="ce3">
            <text:p>239746</text:p>
          </table:table-cell>
          <table:table-cell office:value-type="float" office:value="564.25" table:style-name="ce3">
            <text:p>564.25</text:p>
          </table:table-cell>
          <table:table-cell office:value-type="float" office:value="148146" table:style-name="ce3">
            <text:p>148146</text:p>
          </table:table-cell>
          <table:table-cell office:value-type="float" office:value="2237.29" table:style-name="ce3">
            <text:p>2237.29</text:p>
          </table:table-cell>
          <table:table-cell office:value-type="float" office:value="16.026443481445313" table:formula="of:=[.E151]/[.D151]" table:style-name="ce4">
            <text:p>16.026</text:p>
          </table:table-cell>
          <table:table-cell office:value-type="float" office:value="14.939590454101563" table:formula="of:=[.F151]/[.D151]" table:style-name="ce4">
            <text:p>14.940</text:p>
          </table:table-cell>
          <table:table-cell office:value-type="float" office:value="0.93218376687241566" table:formula="of:=[.F151]/[.E151]" table:style-name="ce4">
            <text:p>0.932</text:p>
          </table:table-cell>
          <table:table-cell office:value-type="float" office:value="4.7681045532226563" table:formula="of:=[.H151]/[.D151]" table:style-name="ce4">
            <text:p>4.768</text:p>
          </table:table-cell>
          <table:table-cell office:value-type="float" office:value="636550.90909090918" table:formula="of:=[.N151]*[.D151]/3.3" table:style-name="ce7">
            <text:p>636551</text:p>
          </table:table-cell>
          <table:table-cell office:value-type="float" office:value="16.076000000000001" table:style-name="ce3">
            <text:p>16.076</text:p>
          </table:table-cell>
          <table:table-cell office:value-type="float" office:value="640042" table:style-name="ce3">
            <text:p>640042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number-columns-repeated="10" table:style-name="ce3"/>
          <table:table-cell table:number-columns-repeated="16356"/>
        </table:table-row>
        <table:table-row table:style-name="ro1">
          <table:table-cell office:value-type="string" table:style-name="ce2">
            <text:p>filter cr 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413610" table:style-name="ce3">
            <text:p>413610</text:p>
          </table:table-cell>
          <table:table-cell office:value-type="float" office:value="430082" table:style-name="ce3">
            <text:p>430082</text:p>
          </table:table-cell>
          <table:table-cell office:value-type="float" office:value="493572" table:style-name="ce3">
            <text:p>493572</text:p>
          </table:table-cell>
          <table:table-cell office:value-type="float" office:value="305271" table:style-name="ce3">
            <text:p>305271</text:p>
          </table:table-cell>
          <table:table-cell office:value-type="float" office:value="1112.95" table:style-name="ce3">
            <text:p>1112.95</text:p>
          </table:table-cell>
          <table:table-cell office:value-type="float" office:value="3" table:style-name="ce3">
            <text:p>3</text:p>
          </table:table-cell>
          <table:table-cell office:value-type="float" office:value="2.93" table:style-name="ce3">
            <text:p>2.93</text:p>
          </table:table-cell>
          <table:table-cell office:value-type="float" office:value="0" table:style-name="ce3">
            <text:p>0</text:p>
          </table:table-cell>
          <table:table-cell office:value-type="float" office:value="1.3" table:style-name="ce3">
            <text:p>1.3</text:p>
          </table:table-cell>
          <table:table-cell office:value-type="float" office:value="3.1555938720703125" table:formula="of:=[.E153]/[.D153]" table:style-name="ce4">
            <text:p>3.156</text:p>
          </table:table-cell>
          <table:table-cell office:value-type="float" office:value="3.2812652587890625" table:formula="of:=[.F153]/[.D153]" table:style-name="ce4">
            <text:p>3.281</text:p>
          </table:table-cell>
          <table:table-cell office:value-type="float" office:value="1.0398249558763086" table:formula="of:=[.F153]/[.E153]" table:style-name="ce4">
            <text:p>1.040</text:p>
          </table:table-cell>
          <table:table-cell office:value-type="float" office:value="2.3290328979492188" table:formula="of:=[.H153]/[.D153]" table:style-name="ce4">
            <text:p>2.329</text:p>
          </table:table-cell>
          <table:table-cell office:value-type="float" office:value="125336.36363636365" table:formula="of:=[.N153]*[.D153]/3.3" table:style-name="ce7">
            <text:p>125336</text:p>
          </table:table-cell>
          <table:table-cell office:value-type="float" office:value="3.2130000000000001" table:style-name="ce3">
            <text:p>3.213</text:p>
          </table:table-cell>
          <table:table-cell office:value-type="float" office:value="127934" table:style-name="ce3">
            <text:p>127934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300624" table:style-name="ce3">
            <text:p>300624</text:p>
          </table:table-cell>
          <table:table-cell office:value-type="float" office:value="424963" table:style-name="ce3">
            <text:p>424963</text:p>
          </table:table-cell>
          <table:table-cell office:value-type="float" office:value="527365" table:style-name="ce3">
            <text:p>527365</text:p>
          </table:table-cell>
          <table:table-cell office:value-type="float" office:value="194489" table:style-name="ce3">
            <text:p>194489</text:p>
          </table:table-cell>
          <table:table-cell office:value-type="float" office:value="13610.58" table:style-name="ce3">
            <text:p>13610.58</text:p>
          </table:table-cell>
          <table:table-cell office:value-type="float" office:value="12" table:style-name="ce3">
            <text:p>12</text:p>
          </table:table-cell>
          <table:table-cell office:value-type="float" office:value="5.25" table:style-name="ce3">
            <text:p>5.25</text:p>
          </table:table-cell>
          <table:table-cell office:value-type="float" office:value="0" table:style-name="ce3">
            <text:p>0</text:p>
          </table:table-cell>
          <table:table-cell office:value-type="float" office:value="2.12" table:style-name="ce3">
            <text:p>2.12</text:p>
          </table:table-cell>
          <table:table-cell office:value-type="float" office:value="2.2935791015625" table:formula="of:=[.E154]/[.D154]" table:style-name="ce4">
            <text:p>2.294</text:p>
          </table:table-cell>
          <table:table-cell office:value-type="float" office:value="3.2422103881835938" table:formula="of:=[.F154]/[.D154]" table:style-name="ce4">
            <text:p>3.242</text:p>
          </table:table-cell>
          <table:table-cell office:value-type="float" office:value="1.4136030390121881" table:formula="of:=[.F154]/[.E154]" table:style-name="ce4">
            <text:p>1.414</text:p>
          </table:table-cell>
          <table:table-cell office:value-type="float" office:value="1.4838333129882813" table:formula="of:=[.H154]/[.D154]" table:style-name="ce4">
            <text:p>1.484</text:p>
          </table:table-cell>
          <table:table-cell office:value-type="float" office:value="91098.181818181823" table:formula="of:=[.N154]*[.D154]/3.3" table:style-name="ce7">
            <text:p>91098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91440" table:style-name="ce3">
            <text:p>91440</text:p>
          </table:table-cell>
          <table:table-cell table:number-columns-repeated="8" table:style-name="ce3"/>
          <table:table-cell table:number-columns-repeated="16356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263121" table:style-name="ce3">
            <text:p>263121</text:p>
          </table:table-cell>
          <table:table-cell office:value-type="float" office:value="502275" table:style-name="ce3">
            <text:p>502275</text:p>
          </table:table-cell>
          <table:table-cell office:value-type="float" office:value="654341" table:style-name="ce3">
            <text:p>654341</text:p>
          </table:table-cell>
          <table:table-cell office:value-type="float" office:value="132424" table:style-name="ce3">
            <text:p>132424</text:p>
          </table:table-cell>
          <table:table-cell office:value-type="float" office:value="27486.37" table:style-name="ce3">
            <text:p>27486.37</text:p>
          </table:table-cell>
          <table:table-cell office:value-type="float" office:value="19" table:style-name="ce3">
            <text:p>19</text:p>
          </table:table-cell>
          <table:table-cell office:value-type="float" office:value="7.59" table:style-name="ce3">
            <text:p>7.59</text:p>
          </table:table-cell>
          <table:table-cell office:value-type="float" office:value="0" table:style-name="ce3">
            <text:p>0</text:p>
          </table:table-cell>
          <table:table-cell office:value-type="float" office:value="5.08" table:style-name="ce3">
            <text:p>5.08</text:p>
          </table:table-cell>
          <table:table-cell office:value-type="float" office:value="2.0074539184570313" table:formula="of:=[.E155]/[.D155]" table:style-name="ce4">
            <text:p>2.007</text:p>
          </table:table-cell>
          <table:table-cell office:value-type="float" office:value="3.8320541381835938" table:formula="of:=[.F155]/[.D155]" table:style-name="ce4">
            <text:p>3.832</text:p>
          </table:table-cell>
          <table:table-cell office:value-type="float" office:value="1.9089126295506631" table:formula="of:=[.F155]/[.E155]" table:style-name="ce4">
            <text:p>1.909</text:p>
          </table:table-cell>
          <table:table-cell office:value-type="float" office:value="1.01031494140625" table:formula="of:=[.H155]/[.D155]" table:style-name="ce4">
            <text:p>1.010</text:p>
          </table:table-cell>
          <table:table-cell office:value-type="float" office:value="79733.636363636368" table:formula="of:=[.N155]*[.D155]/3.3" table:style-name="ce7">
            <text:p>79734</text:p>
          </table:table-cell>
          <table:table-cell office:value-type="float" office:value="2.1110000000000002" table:style-name="ce2">
            <text:p>2.111</text:p>
          </table:table-cell>
          <table:table-cell office:value-type="float" office:value="84059" table:style-name="ce2">
            <text:p>84059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275369" table:style-name="ce3">
            <text:p>275369</text:p>
          </table:table-cell>
          <table:table-cell office:value-type="float" office:value="534787" table:style-name="ce3">
            <text:p>534787</text:p>
          </table:table-cell>
          <table:table-cell office:value-type="float" office:value="714275" table:style-name="ce3">
            <text:p>714275</text:p>
          </table:table-cell>
          <table:table-cell office:value-type="float" office:value="84707" table:style-name="ce3">
            <text:p>84707</text:p>
          </table:table-cell>
          <table:table-cell office:value-type="float" office:value="59868.51" table:style-name="ce3">
            <text:p>59868.51</text:p>
          </table:table-cell>
          <table:table-cell office:value-type="float" office:value="25" table:style-name="ce3">
            <text:p>25</text:p>
          </table:table-cell>
          <table:table-cell office:value-type="float" office:value="10.94" table:style-name="ce3">
            <text:p>10.94</text:p>
          </table:table-cell>
          <table:table-cell office:value-type="float" office:value="0" table:style-name="ce3">
            <text:p>0</text:p>
          </table:table-cell>
          <table:table-cell office:value-type="float" office:value="18.829999999999998" table:style-name="ce3">
            <text:p>18.83</text:p>
          </table:table-cell>
          <table:table-cell office:value-type="float" office:value="2.1008987426757813" table:formula="of:=[.E156]/[.D156]" table:style-name="ce4">
            <text:p>2.101</text:p>
          </table:table-cell>
          <table:table-cell office:value-type="float" office:value="4.0801010131835938" table:formula="of:=[.F156]/[.D156]" table:style-name="ce4">
            <text:p>4.080</text:p>
          </table:table-cell>
          <table:table-cell office:value-type="float" office:value="1.9420740896760347" table:formula="of:=[.F156]/[.E156]" table:style-name="ce4">
            <text:p>1.942</text:p>
          </table:table-cell>
          <table:table-cell office:value-type="float" office:value="0.64626312255859375" table:formula="of:=[.H156]/[.D156]" table:style-name="ce4">
            <text:p>0.646</text:p>
          </table:table-cell>
          <table:table-cell office:value-type="float" office:value="83445.15151515152" table:formula="of:=[.N156]*[.D156]/3.3" table:style-name="ce7">
            <text:p>83445</text:p>
          </table:table-cell>
          <table:table-cell office:value-type="float" office:value="2.2679999999999998" table:style-name="ce2">
            <text:p>2.268</text:p>
          </table:table-cell>
          <table:table-cell office:value-type="float" office:value="90293" table:style-name="ce2">
            <text:p>90293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295130" table:style-name="ce3">
            <text:p>295130</text:p>
          </table:table-cell>
          <table:table-cell office:value-type="float" office:value="554245" table:style-name="ce3">
            <text:p>554245</text:p>
          </table:table-cell>
          <table:table-cell office:value-type="float" office:value="757003" table:style-name="ce3">
            <text:p>757003</text:p>
          </table:table-cell>
          <table:table-cell office:value-type="float" office:value="71658" table:style-name="ce3">
            <text:p>71658</text:p>
          </table:table-cell>
          <table:table-cell office:value-type="float" office:value="1504.59" table:style-name="ce3">
            <text:p>1504.59</text:p>
          </table:table-cell>
          <table:table-cell office:value-type="float" office:value="25" table:style-name="ce3">
            <text:p>25</text:p>
          </table:table-cell>
          <table:table-cell office:value-type="float" office:value="30.11" table:style-name="ce3">
            <text:p>30.11</text:p>
          </table:table-cell>
          <table:table-cell office:value-type="float" office:value="31" table:style-name="ce3">
            <text:p>31</text:p>
          </table:table-cell>
          <table:table-cell office:value-type="float" office:value="26.19" table:style-name="ce3">
            <text:p>26.19</text:p>
          </table:table-cell>
          <table:table-cell office:value-type="float" office:value="2.2516632080078125" table:formula="of:=[.E157]/[.D157]" table:style-name="ce4">
            <text:p>2.252</text:p>
          </table:table-cell>
          <table:table-cell office:value-type="float" office:value="4.2285537719726563" table:formula="of:=[.F157]/[.D157]" table:style-name="ce4">
            <text:p>4.229</text:p>
          </table:table-cell>
          <table:table-cell office:value-type="float" office:value="1.8779690305966863" table:formula="of:=[.F157]/[.E157]" table:style-name="ce4">
            <text:p>1.878</text:p>
          </table:table-cell>
          <table:table-cell office:value-type="float" office:value="0.5467071533203125" table:formula="of:=[.H157]/[.D157]" table:style-name="ce4">
            <text:p>0.547</text:p>
          </table:table-cell>
          <table:table-cell office:value-type="float" office:value="89433.333333333343" table:formula="of:=[.N157]*[.D157]/3.3" table:style-name="ce7">
            <text:p>89433</text:p>
          </table:table-cell>
          <table:table-cell office:value-type="float" office:value="2.4510000000000001" table:style-name="ce2">
            <text:p>2.451</text:p>
          </table:table-cell>
          <table:table-cell office:value-type="float" office:value="97596" table:style-name="ce2">
            <text:p>97596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327855" table:style-name="ce3">
            <text:p>327855</text:p>
          </table:table-cell>
          <table:table-cell office:value-type="float" office:value="563973" table:style-name="ce3">
            <text:p>563973</text:p>
          </table:table-cell>
          <table:table-cell office:value-type="float" office:value="787848" table:style-name="ce3">
            <text:p>787848</text:p>
          </table:table-cell>
          <table:table-cell office:value-type="float" office:value="84701" table:style-name="ce3">
            <text:p>84701</text:p>
          </table:table-cell>
          <table:table-cell office:value-type="float" office:value="4148.24" table:style-name="ce3">
            <text:p>4148.24</text:p>
          </table:table-cell>
          <table:table-cell office:value-type="float" office:value="1313" table:style-name="ce3">
            <text:p>1313</text:p>
          </table:table-cell>
          <table:table-cell office:value-type="float" office:value="360.09" table:style-name="ce3">
            <text:p>360.09</text:p>
          </table:table-cell>
          <table:table-cell office:value-type="float" office:value="3173" table:style-name="ce3">
            <text:p>3173</text:p>
          </table:table-cell>
          <table:table-cell office:value-type="float" office:value="232.42" table:style-name="ce3">
            <text:p>232.42</text:p>
          </table:table-cell>
          <table:table-cell office:value-type="float" office:value="2.5013351440429688" table:formula="of:=[.E158]/[.D158]" table:style-name="ce4">
            <text:p>2.501</text:p>
          </table:table-cell>
          <table:table-cell office:value-type="float" office:value="4.3027725219726563" table:formula="of:=[.F158]/[.D158]" table:style-name="ce4">
            <text:p>4.303</text:p>
          </table:table-cell>
          <table:table-cell office:value-type="float" office:value="1.7201903280413597" table:formula="of:=[.F158]/[.E158]" table:style-name="ce4">
            <text:p>1.720</text:p>
          </table:table-cell>
          <table:table-cell office:value-type="float" office:value="0.64621734619140625" table:formula="of:=[.H158]/[.D158]" table:style-name="ce4">
            <text:p>0.646</text:p>
          </table:table-cell>
          <table:table-cell office:value-type="float" office:value="99350" table:formula="of:=[.N158]*[.D158]/3.3" table:style-name="ce7">
            <text:p>99350</text:p>
          </table:table-cell>
          <table:table-cell office:value-type="float" office:value="2.694" table:style-name="ce2">
            <text:p>2.694</text:p>
          </table:table-cell>
          <table:table-cell office:value-type="float" office:value="107274" table:style-name="ce2">
            <text:p>107274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382236" table:style-name="ce3">
            <text:p>382236</text:p>
          </table:table-cell>
          <table:table-cell office:value-type="float" office:value="542885" table:style-name="ce3">
            <text:p>542885</text:p>
          </table:table-cell>
          <table:table-cell office:value-type="float" office:value="775729" table:style-name="ce3">
            <text:p>775729</text:p>
          </table:table-cell>
          <table:table-cell office:value-type="float" office:value="133967" table:style-name="ce3">
            <text:p>133967</text:p>
          </table:table-cell>
          <table:table-cell office:value-type="float" office:value="6287.36" table:style-name="ce3">
            <text:p>6287.36</text:p>
          </table:table-cell>
          <table:table-cell office:value-type="float" office:value="4614" table:style-name="ce3">
            <text:p>4614</text:p>
          </table:table-cell>
          <table:table-cell office:value-type="float" office:value="241.97" table:style-name="ce3">
            <text:p>241.97</text:p>
          </table:table-cell>
          <table:table-cell office:value-type="float" office:value="4699" table:style-name="ce3">
            <text:p>4699</text:p>
          </table:table-cell>
          <table:table-cell office:value-type="float" office:value="780.33" table:style-name="ce3">
            <text:p>780.33</text:p>
          </table:table-cell>
          <table:table-cell office:value-type="float" office:value="2.916229248046875" table:formula="of:=[.E159]/[.D159]" table:style-name="ce4">
            <text:p>2.916</text:p>
          </table:table-cell>
          <table:table-cell office:value-type="float" office:value="4.1418838500976563" table:formula="of:=[.F159]/[.D159]" table:style-name="ce4">
            <text:p>4.142</text:p>
          </table:table-cell>
          <table:table-cell office:value-type="float" office:value="1.4202874663820257" table:formula="of:=[.F159]/[.E159]" table:style-name="ce4">
            <text:p>1.420</text:p>
          </table:table-cell>
          <table:table-cell office:value-type="float" office:value="1.0220870971679688" table:formula="of:=[.H159]/[.D159]" table:style-name="ce4">
            <text:p>1.022</text:p>
          </table:table-cell>
          <table:table-cell office:value-type="float" office:value="115829.09090909091" table:formula="of:=[.N159]*[.D159]/3.3" table:style-name="ce7">
            <text:p>115829</text:p>
          </table:table-cell>
          <table:table-cell office:value-type="float" office:value="3.4020000000000001" table:style-name="ce2">
            <text:p>3.402</text:p>
          </table:table-cell>
          <table:table-cell office:value-type="float" office:value="135465" table:style-name="ce2">
            <text:p>135465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table:number-columns-repeated="12" table:style-name="ce2"/>
          <table:table-cell table:style-name="ce5"/>
          <table:table-cell table:number-columns-repeated="4" table:style-name="ce4"/>
          <table:table-cell table:style-name="ce7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filter cr 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697332" table:style-name="ce3">
            <text:p>697332</text:p>
          </table:table-cell>
          <table:table-cell office:value-type="float" office:value="722949" table:style-name="ce3">
            <text:p>722949</text:p>
          </table:table-cell>
          <table:table-cell office:value-type="float" office:value="817221" table:style-name="ce3">
            <text:p>817221</text:p>
          </table:table-cell>
          <table:table-cell office:value-type="float" office:value="514873" table:style-name="ce3">
            <text:p>514873</text:p>
          </table:table-cell>
          <table:table-cell office:value-type="float" office:value="9668.65" table:style-name="ce3">
            <text:p>9668.65</text:p>
          </table:table-cell>
          <table:table-cell office:value-type="float" office:value="5" table:style-name="ce3">
            <text:p>5</text:p>
          </table:table-cell>
          <table:table-cell office:value-type="float" office:value="4.7699999999999996" table:style-name="ce3">
            <text:p>4.77</text:p>
          </table:table-cell>
          <table:table-cell office:value-type="float" office:value="0" table:style-name="ce3">
            <text:p>0</text:p>
          </table:table-cell>
          <table:table-cell office:value-type="float" office:value="3.57" table:style-name="ce3">
            <text:p>3.57</text:p>
          </table:table-cell>
          <table:table-cell office:value-type="float" office:value="5.320220947265625" table:formula="of:=[.E161]/[.D161]" table:style-name="ce4">
            <text:p>5.320</text:p>
          </table:table-cell>
          <table:table-cell office:value-type="float" office:value="5.5156631469726563" table:formula="of:=[.F161]/[.D161]" table:style-name="ce4">
            <text:p>5.516</text:p>
          </table:table-cell>
          <table:table-cell office:value-type="float" office:value="1.036735729896233" table:formula="of:=[.F161]/[.E161]" table:style-name="ce4">
            <text:p>1.037</text:p>
          </table:table-cell>
          <table:table-cell office:value-type="float" office:value="3.9281692504882813" table:formula="of:=[.H161]/[.D161]" table:style-name="ce4">
            <text:p>3.928</text:p>
          </table:table-cell>
          <table:table-cell office:value-type="float" office:value="211312.72727272729" table:formula="of:=[.N161]*[.D161]/3.3" table:style-name="ce7">
            <text:p>211313</text:p>
          </table:table-cell>
          <table:table-cell office:value-type="float" office:value="5.33" table:style-name="ce2">
            <text:p>5.33</text:p>
          </table:table-cell>
          <table:table-cell office:value-type="float" office:value="212211" table:style-name="ce2">
            <text:p>21221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476355" table:style-name="ce3">
            <text:p>476355</text:p>
          </table:table-cell>
          <table:table-cell office:value-type="float" office:value="694278" table:style-name="ce3">
            <text:p>694278</text:p>
          </table:table-cell>
          <table:table-cell office:value-type="float" office:value="831528" table:style-name="ce3">
            <text:p>831528</text:p>
          </table:table-cell>
          <table:table-cell office:value-type="float" office:value="300824" table:style-name="ce3">
            <text:p>300824</text:p>
          </table:table-cell>
          <table:table-cell office:value-type="float" office:value="22600.32" table:style-name="ce3">
            <text:p>22600.32</text:p>
          </table:table-cell>
          <table:table-cell office:value-type="float" office:value="16" table:style-name="ce3">
            <text:p>16</text:p>
          </table:table-cell>
          <table:table-cell office:value-type="float" office:value="7.08" table:style-name="ce3">
            <text:p>7.08</text:p>
          </table:table-cell>
          <table:table-cell office:value-type="float" office:value="0" table:style-name="ce3">
            <text:p>0</text:p>
          </table:table-cell>
          <table:table-cell office:value-type="float" office:value="5.8" table:style-name="ce3">
            <text:p>5.8</text:p>
          </table:table-cell>
          <table:table-cell office:value-type="float" office:value="3.6343002319335938" table:formula="of:=[.E162]/[.D162]" table:style-name="ce4">
            <text:p>3.634</text:p>
          </table:table-cell>
          <table:table-cell office:value-type="float" office:value="5.2969207763671875" table:formula="of:=[.F162]/[.D162]" table:style-name="ce4">
            <text:p>5.297</text:p>
          </table:table-cell>
          <table:table-cell office:value-type="float" office:value="1.4574802405768807" table:formula="of:=[.F162]/[.E162]" table:style-name="ce4">
            <text:p>1.457</text:p>
          </table:table-cell>
          <table:table-cell office:value-type="float" office:value="2.29510498046875" table:formula="of:=[.H162]/[.D162]" table:style-name="ce4">
            <text:p>2.295</text:p>
          </table:table-cell>
          <table:table-cell office:value-type="float" office:value="144350" table:formula="of:=[.N162]*[.D162]/3.3" table:style-name="ce7">
            <text:p>144350</text:p>
          </table:table-cell>
          <table:table-cell office:value-type="float" office:value="3.6469999999999998" table:style-name="ce2">
            <text:p>3.647</text:p>
          </table:table-cell>
          <table:table-cell office:value-type="float" office:value="145228" table:style-name="ce2">
            <text:p>145228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394679" table:style-name="ce3">
            <text:p>394679</text:p>
          </table:table-cell>
          <table:table-cell office:value-type="float" office:value="754694" table:style-name="ce3">
            <text:p>754694</text:p>
          </table:table-cell>
          <table:table-cell office:value-type="float" office:value="960038" table:style-name="ce3">
            <text:p>960038</text:p>
          </table:table-cell>
          <table:table-cell office:value-type="float" office:value="184858" table:style-name="ce3">
            <text:p>184858</text:p>
          </table:table-cell>
          <table:table-cell office:value-type="float" office:value="40400.28" table:style-name="ce3">
            <text:p>40400.28</text:p>
          </table:table-cell>
          <table:table-cell office:value-type="float" office:value="19" table:style-name="ce3">
            <text:p>19</text:p>
          </table:table-cell>
          <table:table-cell office:value-type="float" office:value="8.69" table:style-name="ce3">
            <text:p>8.69</text:p>
          </table:table-cell>
          <table:table-cell office:value-type="float" office:value="0" table:style-name="ce3">
            <text:p>0</text:p>
          </table:table-cell>
          <table:table-cell office:value-type="float" office:value="10.74" table:style-name="ce3">
            <text:p>10.74</text:p>
          </table:table-cell>
          <table:table-cell office:value-type="float" office:value="3.0111618041992188" table:formula="of:=[.E163]/[.D163]" table:style-name="ce4">
            <text:p>3.011</text:p>
          </table:table-cell>
          <table:table-cell office:value-type="float" office:value="5.7578582763671875" table:formula="of:=[.F163]/[.D163]" table:style-name="ce4">
            <text:p>5.758</text:p>
          </table:table-cell>
          <table:table-cell office:value-type="float" office:value="1.9121716635544328" table:formula="of:=[.F163]/[.E163]" table:style-name="ce4">
            <text:p>1.912</text:p>
          </table:table-cell>
          <table:table-cell office:value-type="float" office:value="1.4103546142578125" table:formula="of:=[.H163]/[.D163]" table:style-name="ce4">
            <text:p>1.410</text:p>
          </table:table-cell>
          <table:table-cell office:value-type="float" office:value="119599.69696969698" table:formula="of:=[.N163]*[.D163]/3.3" table:style-name="ce7">
            <text:p>119600</text:p>
          </table:table-cell>
          <table:table-cell office:value-type="float" office:value="3.1230000000000002" table:style-name="ce2">
            <text:p>3.123</text:p>
          </table:table-cell>
          <table:table-cell office:value-type="float" office:value="124353" table:style-name="ce2">
            <text:p>12435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404733" table:style-name="ce3">
            <text:p>404733</text:p>
          </table:table-cell>
          <table:table-cell office:value-type="float" office:value="782342" table:style-name="ce3">
            <text:p>782342</text:p>
          </table:table-cell>
          <table:table-cell office:value-type="float" office:value="1024070" table:style-name="ce3">
            <text:p>1024070</text:p>
          </table:table-cell>
          <table:table-cell office:value-type="float" office:value="112784" table:style-name="ce3">
            <text:p>112784</text:p>
          </table:table-cell>
          <table:table-cell office:value-type="float" office:value="98216.08" table:style-name="ce3">
            <text:p>98216.08</text:p>
          </table:table-cell>
          <table:table-cell office:value-type="float" office:value="27" table:style-name="ce3">
            <text:p>27</text:p>
          </table:table-cell>
          <table:table-cell office:value-type="float" office:value="12.63" table:style-name="ce3">
            <text:p>12.63</text:p>
          </table:table-cell>
          <table:table-cell office:value-type="float" office:value="2" table:style-name="ce3">
            <text:p>2</text:p>
          </table:table-cell>
          <table:table-cell office:value-type="float" office:value="38.08" table:style-name="ce3">
            <text:p>38.08</text:p>
          </table:table-cell>
          <table:table-cell office:value-type="float" office:value="3.0878677368164063" table:formula="of:=[.E164]/[.D164]" table:style-name="ce4">
            <text:p>3.088</text:p>
          </table:table-cell>
          <table:table-cell office:value-type="float" office:value="5.9687957763671875" table:formula="of:=[.F164]/[.D164]" table:style-name="ce4">
            <text:p>5.969</text:p>
          </table:table-cell>
          <table:table-cell office:value-type="float" office:value="1.9329829789021404" table:formula="of:=[.F164]/[.E164]" table:style-name="ce4">
            <text:p>1.933</text:p>
          </table:table-cell>
          <table:table-cell office:value-type="float" office:value="0.8604736328125" table:formula="of:=[.H164]/[.D164]" table:style-name="ce4">
            <text:p>0.860</text:p>
          </table:table-cell>
          <table:table-cell office:value-type="float" office:value="122646.36363636365" table:formula="of:=[.N164]*[.D164]/3.3" table:style-name="ce7">
            <text:p>122646</text:p>
          </table:table-cell>
          <table:table-cell office:value-type="float" office:value="3.2080000000000002" table:style-name="ce2">
            <text:p>3.208</text:p>
          </table:table-cell>
          <table:table-cell office:value-type="float" office:value="127745" table:style-name="ce2">
            <text:p>12774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428608" table:style-name="ce3">
            <text:p>428608</text:p>
          </table:table-cell>
          <table:table-cell office:value-type="float" office:value="797576" table:style-name="ce3">
            <text:p>797576</text:p>
          </table:table-cell>
          <table:table-cell office:value-type="float" office:value="1077776" table:style-name="ce3">
            <text:p>1077776</text:p>
          </table:table-cell>
          <table:table-cell office:value-type="float" office:value="59573" table:style-name="ce3">
            <text:p>59573</text:p>
          </table:table-cell>
          <table:table-cell office:value-type="float" office:value="8262.18" table:style-name="ce3">
            <text:p>8262.18</text:p>
          </table:table-cell>
          <table:table-cell office:value-type="float" office:value="38" table:style-name="ce3">
            <text:p>38</text:p>
          </table:table-cell>
          <table:table-cell office:value-type="float" office:value="35.799999999999997" table:style-name="ce3">
            <text:p>35.8</text:p>
          </table:table-cell>
          <table:table-cell office:value-type="float" office:value="4120" table:style-name="ce3">
            <text:p>4120</text:p>
          </table:table-cell>
          <table:table-cell office:value-type="float" office:value="222.79" table:style-name="ce3">
            <text:p>222.79</text:p>
          </table:table-cell>
          <table:table-cell office:value-type="float" office:value="3.27001953125" table:formula="of:=[.E165]/[.D165]" table:style-name="ce4">
            <text:p>3.270</text:p>
          </table:table-cell>
          <table:table-cell office:value-type="float" office:value="6.08502197265625" table:formula="of:=[.F165]/[.D165]" table:style-name="ce4">
            <text:p>6.085</text:p>
          </table:table-cell>
          <table:table-cell office:value-type="float" office:value="1.860851873973421" table:formula="of:=[.F165]/[.E165]" table:style-name="ce4">
            <text:p>1.861</text:p>
          </table:table-cell>
          <table:table-cell office:value-type="float" office:value="0.45450592041015625" table:formula="of:=[.H165]/[.D165]" table:style-name="ce4">
            <text:p>0.455</text:p>
          </table:table-cell>
          <table:table-cell office:value-type="float" office:value="129881.21212121213" table:formula="of:=[.N165]*[.D165]/3.3" table:style-name="ce7">
            <text:p>129881</text:p>
          </table:table-cell>
          <table:table-cell office:value-type="float" office:value="3.4940000000000002" table:style-name="ce2">
            <text:p>3.494</text:p>
          </table:table-cell>
          <table:table-cell office:value-type="float" office:value="139133" table:style-name="ce2">
            <text:p>13913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454502" table:style-name="ce3">
            <text:p>454502</text:p>
          </table:table-cell>
          <table:table-cell office:value-type="float" office:value="806600" table:style-name="ce3">
            <text:p>806600</text:p>
          </table:table-cell>
          <table:table-cell office:value-type="float" office:value="1111624" table:style-name="ce3">
            <text:p>1111624</text:p>
          </table:table-cell>
          <table:table-cell office:value-type="float" office:value="68435" table:style-name="ce3">
            <text:p>68435</text:p>
          </table:table-cell>
          <table:table-cell office:value-type="float" office:value="6709.68" table:style-name="ce3">
            <text:p>6709.68</text:p>
          </table:table-cell>
          <table:table-cell office:value-type="float" office:value="2928" table:style-name="ce3">
            <text:p>2928</text:p>
          </table:table-cell>
          <table:table-cell office:value-type="float" office:value="381.24" table:style-name="ce3">
            <text:p>381.24</text:p>
          </table:table-cell>
          <table:table-cell office:value-type="float" office:value="4464" table:style-name="ce3">
            <text:p>4464</text:p>
          </table:table-cell>
          <table:table-cell office:value-type="float" office:value="290.22000000000003" table:style-name="ce3">
            <text:p>290.22</text:p>
          </table:table-cell>
          <table:table-cell office:value-type="float" office:value="3.4675750732421875" table:formula="of:=[.E166]/[.D166]" table:style-name="ce4">
            <text:p>3.468</text:p>
          </table:table-cell>
          <table:table-cell office:value-type="float" office:value="6.15386962890625" table:formula="of:=[.F166]/[.D166]" table:style-name="ce4">
            <text:p>6.154</text:p>
          </table:table-cell>
          <table:table-cell office:value-type="float" office:value="1.7746896603315276" table:formula="of:=[.F166]/[.E166]" table:style-name="ce4">
            <text:p>1.775</text:p>
          </table:table-cell>
          <table:table-cell office:value-type="float" office:value="0.52211761474609375" table:formula="of:=[.H166]/[.D166]" table:style-name="ce4">
            <text:p>0.522</text:p>
          </table:table-cell>
          <table:table-cell office:value-type="float" office:value="137727.87878787878" table:formula="of:=[.N166]*[.D166]/3.3" table:style-name="ce7">
            <text:p>137728</text:p>
          </table:table-cell>
          <table:table-cell office:value-type="float" office:value="3.7919999999999998" table:style-name="ce2">
            <text:p>3.792</text:p>
          </table:table-cell>
          <table:table-cell office:value-type="float" office:value="151000" table:style-name="ce2">
            <text:p>1510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575255" table:style-name="ce3">
            <text:p>575255</text:p>
          </table:table-cell>
          <table:table-cell office:value-type="float" office:value="792616" table:style-name="ce3">
            <text:p>792616</text:p>
          </table:table-cell>
          <table:table-cell office:value-type="float" office:value="1125921" table:style-name="ce3">
            <text:p>1125921</text:p>
          </table:table-cell>
          <table:table-cell office:value-type="float" office:value="90108" table:style-name="ce3">
            <text:p>90108</text:p>
          </table:table-cell>
          <table:table-cell office:value-type="float" office:value="9510.3799999999992" table:style-name="ce3">
            <text:p>9510.38</text:p>
          </table:table-cell>
          <table:table-cell office:value-type="float" office:value="5027" table:style-name="ce3">
            <text:p>5027</text:p>
          </table:table-cell>
          <table:table-cell office:value-type="float" office:value="228.25" table:style-name="ce3">
            <text:p>228.25</text:p>
          </table:table-cell>
          <table:table-cell office:value-type="float" office:value="23576" table:style-name="ce3">
            <text:p>23576</text:p>
          </table:table-cell>
          <table:table-cell office:value-type="float" office:value="1694.77" table:style-name="ce3">
            <text:p>1694.77</text:p>
          </table:table-cell>
          <table:table-cell office:value-type="float" office:value="4.3888473510742188" table:formula="of:=[.E167]/[.D167]" table:style-name="ce4">
            <text:p>4.389</text:p>
          </table:table-cell>
          <table:table-cell office:value-type="float" office:value="6.04718017578125" table:formula="of:=[.F167]/[.D167]" table:style-name="ce4">
            <text:p>6.047</text:p>
          </table:table-cell>
          <table:table-cell office:value-type="float" office:value="1.37785156148143" table:formula="of:=[.F167]/[.E167]" table:style-name="ce4">
            <text:p>1.378</text:p>
          </table:table-cell>
          <table:table-cell office:value-type="float" office:value="0.687469482421875" table:formula="of:=[.H167]/[.D167]" table:style-name="ce4">
            <text:p>0.687</text:p>
          </table:table-cell>
          <table:table-cell office:value-type="float" office:value="174319.69696969699" table:formula="of:=[.N167]*[.D167]/3.3" table:style-name="ce7">
            <text:p>174320</text:p>
          </table:table-cell>
          <table:table-cell office:value-type="float" office:value="4.6029999999999998" table:style-name="ce2">
            <text:p>4.603</text:p>
          </table:table-cell>
          <table:table-cell office:value-type="float" office:value="183290" table:style-name="ce2">
            <text:p>183290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filter cr 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1249817" table:style-name="ce3">
            <text:p>1249817</text:p>
          </table:table-cell>
          <table:table-cell office:value-type="float" office:value="1202183" table:style-name="ce3">
            <text:p>1202183</text:p>
          </table:table-cell>
          <table:table-cell office:value-type="float" office:value="1468529" table:style-name="ce3">
            <text:p>1468529</text:p>
          </table:table-cell>
          <table:table-cell office:value-type="float" office:value="943159" table:style-name="ce3">
            <text:p>943159</text:p>
          </table:table-cell>
          <table:table-cell office:value-type="float" office:value="23588.66" table:style-name="ce3">
            <text:p>23588.66</text:p>
          </table:table-cell>
          <table:table-cell office:value-type="float" office:value="15" table:style-name="ce3">
            <text:p>15</text:p>
          </table:table-cell>
          <table:table-cell office:value-type="float" office:value="11.07" table:style-name="ce3">
            <text:p>11.07</text:p>
          </table:table-cell>
          <table:table-cell office:value-type="float" office:value="2" table:style-name="ce3">
            <text:p>2</text:p>
          </table:table-cell>
          <table:table-cell office:value-type="float" office:value="6.4" table:style-name="ce3">
            <text:p>6.4</text:p>
          </table:table-cell>
          <table:table-cell office:value-type="float" office:value="9.5353469848632813" table:formula="of:=[.E169]/[.D169]" table:style-name="ce4">
            <text:p>9.535</text:p>
          </table:table-cell>
          <table:table-cell office:value-type="float" office:value="9.1719284057617188" table:formula="of:=[.F169]/[.D169]" table:style-name="ce4">
            <text:p>9.172</text:p>
          </table:table-cell>
          <table:table-cell office:value-type="float" office:value="0.96188722028905027" table:formula="of:=[.F169]/[.E169]" table:style-name="ce4">
            <text:p>0.962</text:p>
          </table:table-cell>
          <table:table-cell office:value-type="float" office:value="7.1957321166992188" table:formula="of:=[.H169]/[.D169]" table:style-name="ce4">
            <text:p>7.196</text:p>
          </table:table-cell>
          <table:table-cell office:value-type="float" office:value="378732.42424242425" table:formula="of:=[.N169]*[.D169]/3.3" table:style-name="ce7">
            <text:p>378732</text:p>
          </table:table-cell>
          <table:table-cell office:value-type="float" office:value="9.5719999999999992" table:style-name="ce2">
            <text:p>9.572</text:p>
          </table:table-cell>
          <table:table-cell office:value-type="float" office:value="381101" table:style-name="ce2">
            <text:p>38110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833788" table:style-name="ce3">
            <text:p>833788</text:p>
          </table:table-cell>
          <table:table-cell office:value-type="float" office:value="1195018" table:style-name="ce3">
            <text:p>1195018</text:p>
          </table:table-cell>
          <table:table-cell office:value-type="float" office:value="1448074" table:style-name="ce3">
            <text:p>1448074</text:p>
          </table:table-cell>
          <table:table-cell office:value-type="float" office:value="534610" table:style-name="ce3">
            <text:p>534610</text:p>
          </table:table-cell>
          <table:table-cell office:value-type="float" office:value="50798.42" table:style-name="ce3">
            <text:p>50798.42</text:p>
          </table:table-cell>
          <table:table-cell office:value-type="float" office:value="24" table:style-name="ce3">
            <text:p>24</text:p>
          </table:table-cell>
          <table:table-cell office:value-type="float" office:value="12.11" table:style-name="ce3">
            <text:p>12.11</text:p>
          </table:table-cell>
          <table:table-cell office:value-type="float" office:value="2" table:style-name="ce3">
            <text:p>2</text:p>
          </table:table-cell>
          <table:table-cell office:value-type="float" office:value="14.97" table:style-name="ce3">
            <text:p>14.97</text:p>
          </table:table-cell>
          <table:table-cell office:value-type="float" office:value="6.361297607421875" table:formula="of:=[.E170]/[.D170]" table:style-name="ce4">
            <text:p>6.361</text:p>
          </table:table-cell>
          <table:table-cell office:value-type="float" office:value="9.1172637939453125" table:formula="of:=[.F170]/[.D170]" table:style-name="ce4">
            <text:p>9.117</text:p>
          </table:table-cell>
          <table:table-cell office:value-type="float" office:value="1.433239624460894" table:formula="of:=[.F170]/[.E170]" table:style-name="ce4">
            <text:p>1.433</text:p>
          </table:table-cell>
          <table:table-cell office:value-type="float" office:value="4.0787506103515625" table:formula="of:=[.H170]/[.D170]" table:style-name="ce4">
            <text:p>4.079</text:p>
          </table:table-cell>
          <table:table-cell office:value-type="float" office:value="252663.0303030303" table:formula="of:=[.N170]*[.D170]/3.3" table:style-name="ce7">
            <text:p>252663</text:p>
          </table:table-cell>
          <table:table-cell office:value-type="float" office:value="6.3630000000000004" table:style-name="ce2">
            <text:p>6.363</text:p>
          </table:table-cell>
          <table:table-cell office:value-type="float" office:value="253356" table:style-name="ce2">
            <text:p>25335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661127" table:style-name="ce3">
            <text:p>661127</text:p>
          </table:table-cell>
          <table:table-cell office:value-type="float" office:value="1247754" table:style-name="ce3">
            <text:p>1247754</text:p>
          </table:table-cell>
          <table:table-cell office:value-type="float" office:value="1573484" table:style-name="ce3">
            <text:p>1573484</text:p>
          </table:table-cell>
          <table:table-cell office:value-type="float" office:value="300928" table:style-name="ce3">
            <text:p>300928</text:p>
          </table:table-cell>
          <table:table-cell office:value-type="float" office:value="71794.679999999993" table:style-name="ce3">
            <text:p>71794.68</text:p>
          </table:table-cell>
          <table:table-cell office:value-type="float" office:value="25" table:style-name="ce3">
            <text:p>25</text:p>
          </table:table-cell>
          <table:table-cell office:value-type="float" office:value="16.03" table:style-name="ce3">
            <text:p>16.03</text:p>
          </table:table-cell>
          <table:table-cell office:value-type="float" office:value="4" table:style-name="ce3">
            <text:p>4</text:p>
          </table:table-cell>
          <table:table-cell office:value-type="float" office:value="29.61" table:style-name="ce3">
            <text:p>29.61</text:p>
          </table:table-cell>
          <table:table-cell office:value-type="float" office:value="5.0439987182617188" table:formula="of:=[.E171]/[.D171]" table:style-name="ce4">
            <text:p>5.044</text:p>
          </table:table-cell>
          <table:table-cell office:value-type="float" office:value="9.5196075439453125" table:formula="of:=[.F171]/[.D171]" table:style-name="ce4">
            <text:p>9.520</text:p>
          </table:table-cell>
          <table:table-cell office:value-type="float" office:value="1.8873136326303419" table:formula="of:=[.F171]/[.E171]" table:style-name="ce4">
            <text:p>1.887</text:p>
          </table:table-cell>
          <table:table-cell office:value-type="float" office:value="2.2958984375" table:formula="of:=[.H171]/[.D171]" table:style-name="ce4">
            <text:p>2.296</text:p>
          </table:table-cell>
          <table:table-cell office:value-type="float" office:value="200341.51515151517" table:formula="of:=[.N171]*[.D171]/3.3" table:style-name="ce7">
            <text:p>200342</text:p>
          </table:table-cell>
          <table:table-cell office:value-type="float" office:value="5.1970000000000001" table:style-name="ce2">
            <text:p>5.197</text:p>
          </table:table-cell>
          <table:table-cell office:value-type="float" office:value="206924" table:style-name="ce2">
            <text:p>206924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664129" table:style-name="ce3">
            <text:p>664129</text:p>
          </table:table-cell>
          <table:table-cell office:value-type="float" office:value="1268746" table:style-name="ce3">
            <text:p>1268746</text:p>
          </table:table-cell>
          <table:table-cell office:value-type="float" office:value="1651872" table:style-name="ce3">
            <text:p>1651872</text:p>
          </table:table-cell>
          <table:table-cell office:value-type="float" office:value="131968" table:style-name="ce3">
            <text:p>131968</text:p>
          </table:table-cell>
          <table:table-cell office:value-type="float" office:value="166670.79" table:style-name="ce3">
            <text:p>166670.79</text:p>
          </table:table-cell>
          <table:table-cell office:value-type="float" office:value="34" table:style-name="ce3">
            <text:p>34</text:p>
          </table:table-cell>
          <table:table-cell office:value-type="float" office:value="20.440000000000001" table:style-name="ce3">
            <text:p>20.44</text:p>
          </table:table-cell>
          <table:table-cell office:value-type="float" office:value="4614" table:style-name="ce3">
            <text:p>4614</text:p>
          </table:table-cell>
          <table:table-cell office:value-type="float" office:value="1730.21" table:style-name="ce3">
            <text:p>1730.21</text:p>
          </table:table-cell>
          <table:table-cell office:value-type="float" office:value="5.0669021606445313" table:formula="of:=[.E172]/[.D172]" table:style-name="ce4">
            <text:p>5.067</text:p>
          </table:table-cell>
          <table:table-cell office:value-type="float" office:value="9.6797637939453125" table:formula="of:=[.F172]/[.D172]" table:style-name="ce4">
            <text:p>9.680</text:p>
          </table:table-cell>
          <table:table-cell office:value-type="float" office:value="1.9103909029721635" table:formula="of:=[.F172]/[.E172]" table:style-name="ce4">
            <text:p>1.910</text:p>
          </table:table-cell>
          <table:table-cell office:value-type="float" office:value="1.0068359375" table:formula="of:=[.H172]/[.D172]" table:style-name="ce4">
            <text:p>1.007</text:p>
          </table:table-cell>
          <table:table-cell office:value-type="float" office:value="201251.21212121213" table:formula="of:=[.N172]*[.D172]/3.3" table:style-name="ce7">
            <text:p>201251</text:p>
          </table:table-cell>
          <table:table-cell office:value-type="float" office:value="5.25" table:style-name="ce2">
            <text:p>5.25</text:p>
          </table:table-cell>
          <table:table-cell office:value-type="float" office:value="209046" table:style-name="ce2">
            <text:p>20904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676111" table:style-name="ce3">
            <text:p>676111</text:p>
          </table:table-cell>
          <table:table-cell office:value-type="float" office:value="1294987" table:style-name="ce3">
            <text:p>1294987</text:p>
          </table:table-cell>
          <table:table-cell office:value-type="float" office:value="1731703" table:style-name="ce3">
            <text:p>1731703</text:p>
          </table:table-cell>
          <table:table-cell office:value-type="float" office:value="86951" table:style-name="ce3">
            <text:p>86951</text:p>
          </table:table-cell>
          <table:table-cell office:value-type="float" office:value="10749.86" table:style-name="ce3">
            <text:p>10749.86</text:p>
          </table:table-cell>
          <table:table-cell office:value-type="float" office:value="556" table:style-name="ce3">
            <text:p>556</text:p>
          </table:table-cell>
          <table:table-cell office:value-type="float" office:value="337.4" table:style-name="ce3">
            <text:p>337.4</text:p>
          </table:table-cell>
          <table:table-cell office:value-type="float" office:value="4355" table:style-name="ce3">
            <text:p>4355</text:p>
          </table:table-cell>
          <table:table-cell office:value-type="float" office:value="264.25" table:style-name="ce3">
            <text:p>264.25</text:p>
          </table:table-cell>
          <table:table-cell office:value-type="float" office:value="5.1583175659179688" table:formula="of:=[.E173]/[.D173]" table:style-name="ce4">
            <text:p>5.158</text:p>
          </table:table-cell>
          <table:table-cell office:value-type="float" office:value="9.8799667358398438" table:formula="of:=[.F173]/[.D173]" table:style-name="ce4">
            <text:p>9.880</text:p>
          </table:table-cell>
          <table:table-cell office:value-type="float" office:value="1.9153467404020936" table:formula="of:=[.F173]/[.E173]" table:style-name="ce4">
            <text:p>1.915</text:p>
          </table:table-cell>
          <table:table-cell office:value-type="float" office:value="0.66338348388671875" table:formula="of:=[.H173]/[.D173]" table:style-name="ce4">
            <text:p>0.663</text:p>
          </table:table-cell>
          <table:table-cell office:value-type="float" office:value="204882.12121212122" table:formula="of:=[.N173]*[.D173]/3.3" table:style-name="ce7">
            <text:p>204882</text:p>
          </table:table-cell>
          <table:table-cell office:value-type="float" office:value="5.3369999999999997" table:style-name="ce2">
            <text:p>5.337</text:p>
          </table:table-cell>
          <table:table-cell office:value-type="float" office:value="212509" table:style-name="ce2">
            <text:p>212509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711262" table:style-name="ce3">
            <text:p>711262</text:p>
          </table:table-cell>
          <table:table-cell office:value-type="float" office:value="1301771" table:style-name="ce3">
            <text:p>1301771</text:p>
          </table:table-cell>
          <table:table-cell office:value-type="float" office:value="1779059" table:style-name="ce3">
            <text:p>1779059</text:p>
          </table:table-cell>
          <table:table-cell office:value-type="float" office:value="84051" table:style-name="ce3">
            <text:p>84051</text:p>
          </table:table-cell>
          <table:table-cell office:value-type="float" office:value="7570.36" table:style-name="ce3">
            <text:p>7570.36</text:p>
          </table:table-cell>
          <table:table-cell office:value-type="float" office:value="4955" table:style-name="ce3">
            <text:p>4955</text:p>
          </table:table-cell>
          <table:table-cell office:value-type="float" office:value="544.28" table:style-name="ce3">
            <text:p>544.28</text:p>
          </table:table-cell>
          <table:table-cell office:value-type="float" office:value="5772" table:style-name="ce3">
            <text:p>5772</text:p>
          </table:table-cell>
          <table:table-cell office:value-type="float" office:value="1147.83" table:style-name="ce3">
            <text:p>1147.83</text:p>
          </table:table-cell>
          <table:table-cell office:value-type="float" office:value="5.4264984130859375" table:formula="of:=[.E174]/[.D174]" table:style-name="ce4">
            <text:p>5.426</text:p>
          </table:table-cell>
          <table:table-cell office:value-type="float" office:value="9.9317245483398438" table:formula="of:=[.F174]/[.D174]" table:style-name="ce4">
            <text:p>9.932</text:p>
          </table:table-cell>
          <table:table-cell office:value-type="float" office:value="1.8302271174335196" table:formula="of:=[.F174]/[.E174]" table:style-name="ce4">
            <text:p>1.830</text:p>
          </table:table-cell>
          <table:table-cell office:value-type="float" office:value="0.64125823974609375" table:formula="of:=[.H174]/[.D174]" table:style-name="ce4">
            <text:p>0.641</text:p>
          </table:table-cell>
          <table:table-cell office:value-type="float" office:value="215533.93939393939" table:formula="of:=[.N174]*[.D174]/3.3" table:style-name="ce7">
            <text:p>215534</text:p>
          </table:table-cell>
          <table:table-cell office:value-type="float" office:value="5.8550000000000004" table:style-name="ce2">
            <text:p>5.855</text:p>
          </table:table-cell>
          <table:table-cell office:value-type="float" office:value="233130" table:style-name="ce2">
            <text:p>23313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1128726" table:style-name="ce3">
            <text:p>1128726</text:p>
          </table:table-cell>
          <table:table-cell office:value-type="float" office:value="1285291" table:style-name="ce3">
            <text:p>1285291</text:p>
          </table:table-cell>
          <table:table-cell office:value-type="float" office:value="1819797" table:style-name="ce3">
            <text:p>1819797</text:p>
          </table:table-cell>
          <table:table-cell office:value-type="float" office:value="77340" table:style-name="ce3">
            <text:p>77340</text:p>
          </table:table-cell>
          <table:table-cell office:value-type="float" office:value="8273.61" table:style-name="ce3">
            <text:p>8273.61</text:p>
          </table:table-cell>
          <table:table-cell office:value-type="float" office:value="6863" table:style-name="ce3">
            <text:p>6863</text:p>
          </table:table-cell>
          <table:table-cell office:value-type="float" office:value="279.63" table:style-name="ce3">
            <text:p>279.63</text:p>
          </table:table-cell>
          <table:table-cell office:value-type="float" office:value="80241" table:style-name="ce3">
            <text:p>80241</text:p>
          </table:table-cell>
          <table:table-cell office:value-type="float" office:value="2813.05" table:style-name="ce3">
            <text:p>2813.05</text:p>
          </table:table-cell>
          <table:table-cell office:value-type="float" office:value="8.6114959716796875" table:formula="of:=[.E175]/[.D175]" table:style-name="ce4">
            <text:p>8.611</text:p>
          </table:table-cell>
          <table:table-cell office:value-type="float" office:value="9.8059921264648438" table:formula="of:=[.F175]/[.D175]" table:style-name="ce4">
            <text:p>9.806</text:p>
          </table:table-cell>
          <table:table-cell office:value-type="float" office:value="1.1387094830809248" table:formula="of:=[.F175]/[.E175]" table:style-name="ce4">
            <text:p>1.139</text:p>
          </table:table-cell>
          <table:table-cell office:value-type="float" office:value="0.590057373046875" table:formula="of:=[.H175]/[.D175]" table:style-name="ce4">
            <text:p>0.590</text:p>
          </table:table-cell>
          <table:table-cell office:value-type="float" office:value="342038.18181818182" table:formula="of:=[.N175]*[.D175]/3.3" table:style-name="ce7">
            <text:p>342038</text:p>
          </table:table-cell>
          <table:table-cell office:value-type="float" office:value="8.8610000000000007" table:style-name="ce2">
            <text:p>8.861</text:p>
          </table:table-cell>
          <table:table-cell office:value-type="float" office:value="352808" table:style-name="ce2">
            <text:p>352808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filter cr 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1072" table:style-name="ce2">
            <text:p>131072</text:p>
          </table:table-cell>
          <table:table-cell office:value-type="float" office:value="2376035" table:style-name="ce3">
            <text:p>2376035</text:p>
          </table:table-cell>
          <table:table-cell office:value-type="float" office:value="2197516" table:style-name="ce3">
            <text:p>2197516</text:p>
          </table:table-cell>
          <table:table-cell office:value-type="float" office:value="2767116" table:style-name="ce3">
            <text:p>2767116</text:p>
          </table:table-cell>
          <table:table-cell office:value-type="float" office:value="1812255" table:style-name="ce3">
            <text:p>1812255</text:p>
          </table:table-cell>
          <table:table-cell office:value-type="float" office:value="113268.76" table:style-name="ce3">
            <text:p>113268.76</text:p>
          </table:table-cell>
          <table:table-cell office:value-type="float" office:value="31" table:style-name="ce3">
            <text:p>31</text:p>
          </table:table-cell>
          <table:table-cell office:value-type="float" office:value="18.84" table:style-name="ce3">
            <text:p>18.84</text:p>
          </table:table-cell>
          <table:table-cell office:value-type="float" office:value="8" table:style-name="ce3">
            <text:p>8</text:p>
          </table:table-cell>
          <table:table-cell office:value-type="float" office:value="16.190000000000001" table:style-name="ce3">
            <text:p>16.19</text:p>
          </table:table-cell>
          <table:table-cell office:value-type="float" office:value="18.127708435058594" table:formula="of:=[.E177]/[.D177]" table:style-name="ce4">
            <text:p>18.128</text:p>
          </table:table-cell>
          <table:table-cell office:value-type="float" office:value="16.765716552734375" table:formula="of:=[.F177]/[.D177]" table:style-name="ce4">
            <text:p>16.766</text:p>
          </table:table-cell>
          <table:table-cell office:value-type="float" office:value="0.92486684750014203" table:formula="of:=[.F177]/[.E177]" table:style-name="ce4">
            <text:p>0.925</text:p>
          </table:table-cell>
          <table:table-cell office:value-type="float" office:value="13.826408386230469" table:formula="of:=[.H177]/[.D177]" table:style-name="ce4">
            <text:p>13.826</text:p>
          </table:table-cell>
          <table:table-cell office:value-type="float" office:value="720010.60606060608" table:formula="of:=[.N177]*[.D177]/3.3" table:style-name="ce7">
            <text:p>720011</text:p>
          </table:table-cell>
          <table:table-cell office:value-type="float" office:value="18.167000000000002" table:style-name="ce2">
            <text:p>18.167</text:p>
          </table:table-cell>
          <table:table-cell office:value-type="float" office:value="723300" table:style-name="ce2">
            <text:p>7233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1072" table:style-name="ce2">
            <text:p>131072</text:p>
          </table:table-cell>
          <table:table-cell office:value-type="float" office:value="1530982" table:style-name="ce3">
            <text:p>1530982</text:p>
          </table:table-cell>
          <table:table-cell office:value-type="float" office:value="2162706" table:style-name="ce3">
            <text:p>2162706</text:p>
          </table:table-cell>
          <table:table-cell office:value-type="float" office:value="2646226" table:style-name="ce3">
            <text:p>2646226</text:p>
          </table:table-cell>
          <table:table-cell office:value-type="float" office:value="997905" table:style-name="ce3">
            <text:p>997905</text:p>
          </table:table-cell>
          <table:table-cell office:value-type="float" office:value="94573.119999999995" table:style-name="ce3">
            <text:p>94573.12</text:p>
          </table:table-cell>
          <table:table-cell office:value-type="float" office:value="40" table:style-name="ce3">
            <text:p>40</text:p>
          </table:table-cell>
          <table:table-cell office:value-type="float" office:value="17.97" table:style-name="ce3">
            <text:p>17.97</text:p>
          </table:table-cell>
          <table:table-cell office:value-type="float" office:value="6" table:style-name="ce3">
            <text:p>6</text:p>
          </table:table-cell>
          <table:table-cell office:value-type="float" office:value="30.42" table:style-name="ce3">
            <text:p>30.42</text:p>
          </table:table-cell>
          <table:table-cell office:value-type="float" office:value="11.680465698242188" table:formula="of:=[.E178]/[.D178]" table:style-name="ce4">
            <text:p>11.680</text:p>
          </table:table-cell>
          <table:table-cell office:value-type="float" office:value="16.500137329101563" table:formula="of:=[.F178]/[.D178]" table:style-name="ce4">
            <text:p>16.500</text:p>
          </table:table-cell>
          <table:table-cell office:value-type="float" office:value="1.4126266670672809" table:formula="of:=[.F178]/[.E178]" table:style-name="ce4">
            <text:p>1.413</text:p>
          </table:table-cell>
          <table:table-cell office:value-type="float" office:value="7.6134109497070313" table:formula="of:=[.H178]/[.D178]" table:style-name="ce4">
            <text:p>7.613</text:p>
          </table:table-cell>
          <table:table-cell office:value-type="float" office:value="463933.93939393939" table:formula="of:=[.N178]*[.D178]/3.3" table:style-name="ce7">
            <text:p>463934</text:p>
          </table:table-cell>
          <table:table-cell office:value-type="float" office:value="11.77" table:style-name="ce2">
            <text:p>11.77</text:p>
          </table:table-cell>
          <table:table-cell office:value-type="float" office:value="468603" table:style-name="ce2">
            <text:p>46860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31072" table:style-name="ce2">
            <text:p>131072</text:p>
          </table:table-cell>
          <table:table-cell office:value-type="float" office:value="1188165" table:style-name="ce3">
            <text:p>1188165</text:p>
          </table:table-cell>
          <table:table-cell office:value-type="float" office:value="2245138" table:style-name="ce3">
            <text:p>2245138</text:p>
          </table:table-cell>
          <table:table-cell office:value-type="float" office:value="2832502" table:style-name="ce3">
            <text:p>2832502</text:p>
          </table:table-cell>
          <table:table-cell office:value-type="float" office:value="528789" table:style-name="ce3">
            <text:p>528789</text:p>
          </table:table-cell>
          <table:table-cell office:value-type="float" office:value="134363.43" table:style-name="ce3">
            <text:p>134363.43</text:p>
          </table:table-cell>
          <table:table-cell office:value-type="float" office:value="33" table:style-name="ce3">
            <text:p>33</text:p>
          </table:table-cell>
          <table:table-cell office:value-type="float" office:value="18.34" table:style-name="ce3">
            <text:p>18.34</text:p>
          </table:table-cell>
          <table:table-cell office:value-type="float" office:value="6" table:style-name="ce3">
            <text:p>6</text:p>
          </table:table-cell>
          <table:table-cell office:value-type="float" office:value="111.16" table:style-name="ce3">
            <text:p>111.16</text:p>
          </table:table-cell>
          <table:table-cell office:value-type="float" office:value="9.0649795532226563" table:formula="of:=[.E179]/[.D179]" table:style-name="ce4">
            <text:p>9.065</text:p>
          </table:table-cell>
          <table:table-cell office:value-type="float" office:value="17.129043579101563" table:formula="of:=[.F179]/[.D179]" table:style-name="ce4">
            <text:p>17.129</text:p>
          </table:table-cell>
          <table:table-cell office:value-type="float" office:value="1.8895843590747077" table:formula="of:=[.F179]/[.E179]" table:style-name="ce4">
            <text:p>1.890</text:p>
          </table:table-cell>
          <table:table-cell office:value-type="float" office:value="4.0343399047851563" table:formula="of:=[.H179]/[.D179]" table:style-name="ce4">
            <text:p>4.034</text:p>
          </table:table-cell>
          <table:table-cell office:value-type="float" office:value="360050" table:formula="of:=[.N179]*[.D179]/3.3" table:style-name="ce7">
            <text:p>360050</text:p>
          </table:table-cell>
          <table:table-cell office:value-type="float" office:value="9.1150000000000002" table:style-name="ce2">
            <text:p>9.115</text:p>
          </table:table-cell>
          <table:table-cell office:value-type="float" office:value="362902" table:style-name="ce2">
            <text:p>36290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131072" table:style-name="ce2">
            <text:p>131072</text:p>
          </table:table-cell>
          <table:table-cell office:value-type="float" office:value="1190004" table:style-name="ce3">
            <text:p>1190004</text:p>
          </table:table-cell>
          <table:table-cell office:value-type="float" office:value="2248978" table:style-name="ce3">
            <text:p>2248978</text:p>
          </table:table-cell>
          <table:table-cell office:value-type="float" office:value="2907889" table:style-name="ce3">
            <text:p>2907889</text:p>
          </table:table-cell>
          <table:table-cell office:value-type="float" office:value="246604" table:style-name="ce3">
            <text:p>246604</text:p>
          </table:table-cell>
          <table:table-cell office:value-type="float" office:value="315754.49" table:style-name="ce3">
            <text:p>315754.49</text:p>
          </table:table-cell>
          <table:table-cell office:value-type="float" office:value="43" table:style-name="ce3">
            <text:p>43</text:p>
          </table:table-cell>
          <table:table-cell office:value-type="float" office:value="42.39" table:style-name="ce3">
            <text:p>42.39</text:p>
          </table:table-cell>
          <table:table-cell office:value-type="float" office:value="4763" table:style-name="ce3">
            <text:p>4763</text:p>
          </table:table-cell>
          <table:table-cell office:value-type="float" office:value="1936.5" table:style-name="ce3">
            <text:p>1936.5</text:p>
          </table:table-cell>
          <table:table-cell office:value-type="float" office:value="9.079010009765625" table:formula="of:=[.E180]/[.D180]" table:style-name="ce4">
            <text:p>9.079</text:p>
          </table:table-cell>
          <table:table-cell office:value-type="float" office:value="17.158340454101563" table:formula="of:=[.F180]/[.D180]" table:style-name="ce4">
            <text:p>17.158</text:p>
          </table:table-cell>
          <table:table-cell office:value-type="float" office:value="1.8898911264163818" table:formula="of:=[.F180]/[.E180]" table:style-name="ce4">
            <text:p>1.890</text:p>
          </table:table-cell>
          <table:table-cell office:value-type="float" office:value="1.881439208984375" table:formula="of:=[.H180]/[.D180]" table:style-name="ce4">
            <text:p>1.881</text:p>
          </table:table-cell>
          <table:table-cell office:value-type="float" office:value="360607.27272727276" table:formula="of:=[.N180]*[.D180]/3.3" table:style-name="ce7">
            <text:p>360607</text:p>
          </table:table-cell>
          <table:table-cell office:value-type="float" office:value="9.1159999999999997" table:style-name="ce2">
            <text:p>9.116</text:p>
          </table:table-cell>
          <table:table-cell office:value-type="float" office:value="363000" table:style-name="ce2">
            <text:p>3630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2">
            <text:p>128</text:p>
          </table:table-cell>
          <table:table-cell office:value-type="float" office:value="131072" table:style-name="ce2">
            <text:p>131072</text:p>
          </table:table-cell>
          <table:table-cell office:value-type="float" office:value="1234551" table:style-name="ce3">
            <text:p>1234551</text:p>
          </table:table-cell>
          <table:table-cell office:value-type="float" office:value="2278285" table:style-name="ce3">
            <text:p>2278285</text:p>
          </table:table-cell>
          <table:table-cell office:value-type="float" office:value="3025661" table:style-name="ce3">
            <text:p>3025661</text:p>
          </table:table-cell>
          <table:table-cell office:value-type="float" office:value="127708" table:style-name="ce3">
            <text:p>127708</text:p>
          </table:table-cell>
          <table:table-cell office:value-type="float" office:value="10575.3" table:style-name="ce3">
            <text:p>10575.3</text:p>
          </table:table-cell>
          <table:table-cell office:value-type="float" office:value="6882" table:style-name="ce3">
            <text:p>6882</text:p>
          </table:table-cell>
          <table:table-cell office:value-type="float" office:value="2245.5" table:style-name="ce3">
            <text:p>2245.5</text:p>
          </table:table-cell>
          <table:table-cell office:value-type="float" office:value="19007" table:style-name="ce3">
            <text:p>19007</text:p>
          </table:table-cell>
          <table:table-cell office:value-type="float" office:value="8447.4" table:style-name="ce3">
            <text:p>8447.4</text:p>
          </table:table-cell>
          <table:table-cell office:value-type="float" office:value="9.4188766479492188" table:formula="of:=[.E181]/[.D181]" table:style-name="ce4">
            <text:p>9.419</text:p>
          </table:table-cell>
          <table:table-cell office:value-type="float" office:value="17.381935119628906" table:formula="of:=[.F181]/[.D181]" table:style-name="ce4">
            <text:p>17.382</text:p>
          </table:table-cell>
          <table:table-cell office:value-type="float" office:value="1.845436114020401" table:formula="of:=[.F181]/[.E181]" table:style-name="ce4">
            <text:p>1.845</text:p>
          </table:table-cell>
          <table:table-cell office:value-type="float" office:value="0.974334716796875" table:formula="of:=[.H181]/[.D181]" table:style-name="ce4">
            <text:p>0.974</text:p>
          </table:table-cell>
          <table:table-cell office:value-type="float" office:value="374106.36363636365" table:formula="of:=[.N181]*[.D181]/3.3" table:style-name="ce7">
            <text:p>374106</text:p>
          </table:table-cell>
          <table:table-cell office:value-type="float" office:value="9.9209999999999994" table:style-name="ce2">
            <text:p>9.921</text:p>
          </table:table-cell>
          <table:table-cell office:value-type="float" office:value="395012" table:style-name="ce2">
            <text:p>39501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256" table:style-name="ce2">
            <text:p>256</text:p>
          </table:table-cell>
          <table:table-cell office:value-type="float" office:value="131072" table:style-name="ce2">
            <text:p>131072</text:p>
          </table:table-cell>
          <table:table-cell office:value-type="float" office:value="1350815" table:style-name="ce3">
            <text:p>1350815</text:p>
          </table:table-cell>
          <table:table-cell office:value-type="float" office:value="2290190" table:style-name="ce3">
            <text:p>2290190</text:p>
          </table:table-cell>
          <table:table-cell office:value-type="float" office:value="3105312" table:style-name="ce3">
            <text:p>3105312</text:p>
          </table:table-cell>
          <table:table-cell office:value-type="float" office:value="63848" table:style-name="ce3">
            <text:p>63848</text:p>
          </table:table-cell>
          <table:table-cell office:value-type="float" office:value="9067.84" table:style-name="ce3">
            <text:p>9067.84</text:p>
          </table:table-cell>
          <table:table-cell office:value-type="float" office:value="12805" table:style-name="ce3">
            <text:p>12805</text:p>
          </table:table-cell>
          <table:table-cell office:value-type="float" office:value="609.19000000000005" table:style-name="ce3">
            <text:p>609.19</text:p>
          </table:table-cell>
          <table:table-cell office:value-type="float" office:value="114455" table:style-name="ce3">
            <text:p>114455</text:p>
          </table:table-cell>
          <table:table-cell office:value-type="float" office:value="5739.72" table:style-name="ce3">
            <text:p>5739.72</text:p>
          </table:table-cell>
          <table:table-cell office:value-type="float" office:value="10.305900573730469" table:formula="of:=[.E182]/[.D182]" table:style-name="ce4">
            <text:p>10.306</text:p>
          </table:table-cell>
          <table:table-cell office:value-type="float" office:value="17.472763061523438" table:formula="of:=[.F182]/[.D182]" table:style-name="ce4">
            <text:p>17.473</text:p>
          </table:table-cell>
          <table:table-cell office:value-type="float" office:value="1.6954135096219689" table:formula="of:=[.F182]/[.E182]" table:style-name="ce4">
            <text:p>1.695</text:p>
          </table:table-cell>
          <table:table-cell office:value-type="float" office:value="0.48712158203125" table:formula="of:=[.H182]/[.D182]" table:style-name="ce4">
            <text:p>0.487</text:p>
          </table:table-cell>
          <table:table-cell office:value-type="float" office:value="409337.87878787878" table:formula="of:=[.N182]*[.D182]/3.3" table:style-name="ce7">
            <text:p>409338</text:p>
          </table:table-cell>
          <table:table-cell office:value-type="float" office:value="14.125" table:style-name="ce2">
            <text:p>14.125</text:p>
          </table:table-cell>
          <table:table-cell office:value-type="float" office:value="562369" table:style-name="ce2">
            <text:p>562369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float" office:value="8" table:style-name="ce6">
            <text:p>8</text:p>
          </table:table-cell>
          <table:table-cell office:value-type="float" office:value="512" table:style-name="ce2">
            <text:p>512</text:p>
          </table:table-cell>
          <table:table-cell office:value-type="float" office:value="131072" table:style-name="ce2">
            <text:p>131072</text:p>
          </table:table-cell>
          <table:table-cell office:value-type="float" office:value="2117732" table:style-name="ce3">
            <text:p>2117732</text:p>
          </table:table-cell>
          <table:table-cell office:value-type="float" office:value="2280047" table:style-name="ce3">
            <text:p>2280047</text:p>
          </table:table-cell>
          <table:table-cell office:value-type="float" office:value="3220437" table:style-name="ce3">
            <text:p>3220437</text:p>
          </table:table-cell>
          <table:table-cell office:value-type="float" office:value="83981" table:style-name="ce3">
            <text:p>83981</text:p>
          </table:table-cell>
          <table:table-cell office:value-type="float" office:value="6307.54" table:style-name="ce3">
            <text:p>6307.54</text:p>
          </table:table-cell>
          <table:table-cell office:value-type="float" office:value="13412" table:style-name="ce3">
            <text:p>13412</text:p>
          </table:table-cell>
          <table:table-cell office:value-type="float" office:value="352.94" table:style-name="ce3">
            <text:p>352.94</text:p>
          </table:table-cell>
          <table:table-cell office:value-type="float" office:value="172749" table:style-name="ce3">
            <text:p>172749</text:p>
          </table:table-cell>
          <table:table-cell office:value-type="float" office:value="619.71" table:style-name="ce3">
            <text:p>619.71</text:p>
          </table:table-cell>
          <table:table-cell office:value-type="float" office:value="16.157012939453125" table:formula="of:=[.E183]/[.D183]" table:style-name="ce4">
            <text:p>16.157</text:p>
          </table:table-cell>
          <table:table-cell office:value-type="float" office:value="17.395378112792969" table:formula="of:=[.F183]/[.D183]" table:style-name="ce4">
            <text:p>17.395</text:p>
          </table:table-cell>
          <table:table-cell office:value-type="float" office:value="1.0766456756567875" table:formula="of:=[.F183]/[.E183]" table:style-name="ce4">
            <text:p>1.077</text:p>
          </table:table-cell>
          <table:table-cell office:value-type="float" office:value="0.64072418212890625" table:formula="of:=[.H183]/[.D183]" table:style-name="ce4">
            <text:p>0.641</text:p>
          </table:table-cell>
          <table:table-cell office:value-type="float" office:value="641736.96969696973" table:formula="of:=[.N183]*[.D183]/3.3" table:style-name="ce7">
            <text:p>641737</text:p>
          </table:table-cell>
          <table:table-cell office:value-type="float" office:value="16.425000000000001" table:style-name="ce2">
            <text:p>16.425</text:p>
          </table:table-cell>
          <table:table-cell office:value-type="float" office:value="653933" table:style-name="ce2">
            <text:p>653933</text:p>
          </table:table-cell>
          <table:table-cell table:number-columns-repeated="16364"/>
        </table:table-row>
        <table:table-row table:style-name="ro1">
          <table:table-cell table:style-name="ce2"/>
          <table:table-cell table:style-name="ce6"/>
          <table:table-cell table:number-columns-repeated="11" table:style-name="ce2"/>
          <table:table-cell table:number-columns-repeated="4" table:style-name="ce4"/>
          <table:table-cell table:style-name="ce7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">
            <text:p>filter bf 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233989" table:style-name="ce2">
            <text:p>233989</text:p>
          </table:table-cell>
          <table:table-cell office:value-type="float" office:value="491522" table:style-name="ce2">
            <text:p>491522</text:p>
          </table:table-cell>
          <table:table-cell office:value-type="float" office:value="540698" table:style-name="ce2">
            <text:p>540698</text:p>
          </table:table-cell>
          <table:table-cell office:value-type="float" office:value="102693" table:style-name="ce2">
            <text:p>102693</text:p>
          </table:table-cell>
          <table:table-cell office:value-type="float" office:value="407.2" table:style-name="ce2">
            <text:p>407.2</text:p>
          </table:table-cell>
          <table:table-cell office:value-type="float" office:value="1" table:style-name="ce2">
            <text:p>1</text:p>
          </table:table-cell>
          <table:table-cell office:value-type="float" office:value="0.8" table:style-name="ce2">
            <text:p>0.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7851943969726563" table:formula="of:=[.E185]/[.D185]" table:style-name="ce4">
            <text:p>1.785</text:p>
          </table:table-cell>
          <table:table-cell office:value-type="float" office:value="3.7500152587890625" table:formula="of:=[.F185]/[.D185]" table:style-name="ce4">
            <text:p>3.750</text:p>
          </table:table-cell>
          <table:table-cell office:value-type="float" office:value="2.1006201146207726" table:formula="of:=[.F185]/[.E185]" table:style-name="ce4">
            <text:p>2.101</text:p>
          </table:table-cell>
          <table:table-cell office:value-type="float" office:value="0.78348541259765625" table:formula="of:=[.H185]/[.D185]" table:style-name="ce4">
            <text:p>0.783</text:p>
          </table:table-cell>
          <table:table-cell office:value-type="float" office:value="70905.757575757583" table:formula="of:=[.N185]*[.D185]/3.3" table:style-name="ce7">
            <text:p>70906</text:p>
          </table:table-cell>
          <table:table-cell office:value-type="float" office:value="1.7150000000000001" table:style-name="ce4">
            <text:p>1.715</text:p>
          </table:table-cell>
          <table:table-cell office:value-type="float" office:value="68308" table:style-name="ce2">
            <text:p>68308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9"/>
          <table:table-cell table:style-name="ce1"/>
          <table:table-cell table:number-columns-repeated="16364"/>
        </table:table-row>
        <table:table-row table:style-name="ro1">
          <table:table-cell office:value-type="string" table:style-name="ce2">
            <text:p>filter bf 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731391" table:style-name="ce2">
            <text:p>731391</text:p>
          </table:table-cell>
          <table:table-cell office:value-type="float" office:value="1359874" table:style-name="ce2">
            <text:p>1359874</text:p>
          </table:table-cell>
          <table:table-cell office:value-type="float" office:value="1474596" table:style-name="ce2">
            <text:p>1474596</text:p>
          </table:table-cell>
          <table:table-cell office:value-type="float" office:value="390840" table:style-name="ce2">
            <text:p>390840</text:p>
          </table:table-cell>
          <table:table-cell office:value-type="float" office:value="21705.8" table:style-name="ce2">
            <text:p>21705.8</text:p>
          </table:table-cell>
          <table:table-cell office:value-type="float" office:value="2" table:style-name="ce2">
            <text:p>2</text:p>
          </table:table-cell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.5800704956054688" table:formula="of:=[.E187]/[.D187]" table:style-name="ce4">
            <text:p>5.580</text:p>
          </table:table-cell>
          <table:table-cell office:value-type="float" office:value="10.375015258789063" table:formula="of:=[.F187]/[.D187]" table:style-name="ce4">
            <text:p>10.375</text:p>
          </table:table-cell>
          <table:table-cell office:value-type="float" office:value="1.859298241296379" table:formula="of:=[.F187]/[.E187]" table:style-name="ce4">
            <text:p>1.859</text:p>
          </table:table-cell>
          <table:table-cell office:value-type="float" office:value="2.98187255859375" table:formula="of:=[.H187]/[.D187]" table:style-name="ce4">
            <text:p>2.982</text:p>
          </table:table-cell>
          <table:table-cell office:value-type="float" office:value="221633.63636363638" table:formula="of:=[.N187]*[.D187]/3.3" table:style-name="ce7">
            <text:p>221634</text:p>
          </table:table-cell>
          <table:table-cell office:value-type="float" office:value="5.1989999999999998" table:style-name="ce4">
            <text:p>5.199</text:p>
          </table:table-cell>
          <table:table-cell office:value-type="float" office:value="206984" table:style-name="ce2">
            <text:p>206984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4"/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filter bf 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2333307" table:style-name="ce2">
            <text:p>2333307</text:p>
          </table:table-cell>
          <table:table-cell office:value-type="float" office:value="2310146" table:style-name="ce2">
            <text:p>2310146</text:p>
          </table:table-cell>
          <table:table-cell office:value-type="float" office:value="2851018" table:style-name="ce2">
            <text:p>2851018</text:p>
          </table:table-cell>
          <table:table-cell office:value-type="float" office:value="1751983" table:style-name="ce2">
            <text:p>1751983</text:p>
          </table:table-cell>
          <table:table-cell office:value-type="float" office:value="44548.7" table:style-name="ce2">
            <text:p>44548.7</text:p>
          </table:table-cell>
          <table:table-cell office:value-type="float" office:value="5" table:style-name="ce2">
            <text:p>5</text:p>
          </table:table-cell>
          <table:table-cell office:value-type="float" office:value="3.8" table:style-name="ce2">
            <text:p>3.8</text:p>
          </table:table-cell>
          <table:table-cell office:value-type="float" office:value="3" table:style-name="ce2">
            <text:p>3</text:p>
          </table:table-cell>
          <table:table-cell office:value-type="float" office:value="3.3" table:style-name="ce2">
            <text:p>3.3</text:p>
          </table:table-cell>
          <table:table-cell office:value-type="float" office:value="17.801719665527344" table:formula="of:=[.E189]/[.D189]" table:style-name="ce4">
            <text:p>17.802</text:p>
          </table:table-cell>
          <table:table-cell office:value-type="float" office:value="17.625015258789063" table:formula="of:=[.F189]/[.D189]" table:style-name="ce4">
            <text:p>17.625</text:p>
          </table:table-cell>
          <table:table-cell office:value-type="float" office:value="0.99007374511798063" table:formula="of:=[.F189]/[.E189]" table:style-name="ce4">
            <text:p>0.990</text:p>
          </table:table-cell>
          <table:table-cell office:value-type="float" office:value="13.366569519042969" table:formula="of:=[.H189]/[.D189]" table:style-name="ce4">
            <text:p>13.367</text:p>
          </table:table-cell>
          <table:table-cell office:value-type="float" office:value="707062.72727272729" table:formula="of:=[.N189]*[.D189]/3.3" table:style-name="ce7">
            <text:p>707063</text:p>
          </table:table-cell>
          <table:table-cell office:value-type="float" office:value="16.606999999999999" table:style-name="ce4">
            <text:p>16.607</text:p>
          </table:table-cell>
          <table:table-cell office:value-type="float" office:value="661181" table:style-name="ce2">
            <text:p>661181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4"/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filter bf 1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6459269" table:style-name="ce2">
            <text:p>6459269</text:p>
          </table:table-cell>
          <table:table-cell office:value-type="float" office:value="4767748" table:style-name="ce2">
            <text:p>4767748</text:p>
          </table:table-cell>
          <table:table-cell office:value-type="float" office:value="5980780" table:style-name="ce2">
            <text:p>5980780</text:p>
          </table:table-cell>
          <table:table-cell office:value-type="float" office:value="5262631" table:style-name="ce2">
            <text:p>5262631</text:p>
          </table:table-cell>
          <table:table-cell office:value-type="float" office:value="105013.3" table:style-name="ce2">
            <text:p>105013.3</text:p>
          </table:table-cell>
          <table:table-cell office:value-type="float" office:value="12" table:style-name="ce2">
            <text:p>12</text:p>
          </table:table-cell>
          <table:table-cell office:value-type="float" office:value="7.9" table:style-name="ce2">
            <text:p>7.9</text:p>
          </table:table-cell>
          <table:table-cell office:value-type="float" office:value="9" table:style-name="ce2">
            <text:p>9</text:p>
          </table:table-cell>
          <table:table-cell office:value-type="float" office:value="10.5" table:style-name="ce2">
            <text:p>10.5</text:p>
          </table:table-cell>
          <table:table-cell office:value-type="float" office:value="49.280311584472656" table:formula="of:=[.E191]/[.D191]" table:style-name="ce4">
            <text:p>49.280</text:p>
          </table:table-cell>
          <table:table-cell office:value-type="float" office:value="36.375030517578125" table:formula="of:=[.F191]/[.D191]" table:style-name="ce4">
            <text:p>36.375</text:p>
          </table:table-cell>
          <table:table-cell office:value-type="float" office:value="0.73812501074037939" table:formula="of:=[.F191]/[.E191]" table:style-name="ce4">
            <text:p>0.738</text:p>
          </table:table-cell>
          <table:table-cell office:value-type="float" office:value="40.150688171386719" table:formula="of:=[.H191]/[.D191]" table:style-name="ce4">
            <text:p>40.151</text:p>
          </table:table-cell>
          <table:table-cell office:value-type="float" office:value="1957354.2424242424" table:formula="of:=[.N191]*[.D191]/3.3" table:style-name="ce7">
            <text:p>1957354</text:p>
          </table:table-cell>
          <table:table-cell office:value-type="float" office:value="44.631" table:style-name="ce4">
            <text:p>44.631</text:p>
          </table:table-cell>
          <table:table-cell office:value-type="float" office:value="1776850" table:style-name="ce2">
            <text:p>1776850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office:value-type="string" table:style-name="ce2">
            <text:p>filter sc 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3619436" table:style-name="ce2">
            <text:p>3619436</text:p>
          </table:table-cell>
          <table:table-cell office:value-type="float" office:value="2752514" table:style-name="ce2">
            <text:p>2752514</text:p>
          </table:table-cell>
          <table:table-cell office:value-type="float" office:value="2883586" table:style-name="ce2">
            <text:p>2883586</text:p>
          </table:table-cell>
          <table:table-cell office:value-type="float" office:value="2898229" table:style-name="ce2">
            <text:p>2898229</text:p>
          </table:table-cell>
          <table:table-cell office:value-type="float" office:value="623.79999999999995" table:style-name="ce2">
            <text:p>623.8</text:p>
          </table:table-cell>
          <table:table-cell office:value-type="float" office:value="2" table:style-name="ce2">
            <text:p>2</text:p>
          </table:table-cell>
          <table:table-cell office:value-type="float" office:value="1.7" table:style-name="ce2">
            <text:p>1.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.614105224609375" table:formula="of:=[.E193]/[.D193]" table:style-name="ce4">
            <text:p>27.614</text:p>
          </table:table-cell>
          <table:table-cell office:value-type="float" office:value="21.000015258789063" table:formula="of:=[.F193]/[.D193]" table:style-name="ce4">
            <text:p>21.000</text:p>
          </table:table-cell>
          <table:table-cell office:value-type="float" office:value="0.76048146727832733" table:formula="of:=[.F193]/[.E193]" table:style-name="ce4">
            <text:p>0.760</text:p>
          </table:table-cell>
          <table:table-cell office:value-type="float" office:value="22.111732482910156" table:formula="of:=[.H193]/[.D193]" table:style-name="ce4">
            <text:p>22.112</text:p>
          </table:table-cell>
          <table:table-cell office:value-type="float" office:value="1096798.7878787878" table:formula="of:=[.N193]*[.D193]/3.3" table:style-name="ce7">
            <text:p>1096799</text:p>
          </table:table-cell>
          <table:table-cell office:value-type="float" office:value="24.553999999999998" table:style-name="ce4">
            <text:p>24.554</text:p>
          </table:table-cell>
          <table:table-cell office:value-type="float" office:value="977576" table:style-name="ce8">
            <text:p>977576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4"/>
          <table:table-cell table:style-name="ce8"/>
          <table:table-cell table:number-columns-repeated="16364"/>
        </table:table-row>
        <table:table-row table:style-name="ro1">
          <table:table-cell office:value-type="string" table:style-name="ce2">
            <text:p>filter sc 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4193046" table:style-name="ce2">
            <text:p>4193046</text:p>
          </table:table-cell>
          <table:table-cell office:value-type="float" office:value="5373954" table:style-name="ce2">
            <text:p>5373954</text:p>
          </table:table-cell>
          <table:table-cell office:value-type="float" office:value="5505450" table:style-name="ce2">
            <text:p>5505450</text:p>
          </table:table-cell>
          <table:table-cell office:value-type="float" office:value="2748882" table:style-name="ce2">
            <text:p>2748882</text:p>
          </table:table-cell>
          <table:table-cell office:value-type="float" office:value="634.20000000000005" table:style-name="ce2">
            <text:p>634.2</text:p>
          </table:table-cell>
          <table:table-cell office:value-type="float" office:value="6" table:style-name="ce2">
            <text:p>6</text:p>
          </table:table-cell>
          <table:table-cell office:value-type="float" office:value="3.1" table:style-name="ce2">
            <text:p>3.1</text:p>
          </table:table-cell>
          <table:table-cell office:value-type="float" office:value="2" table:style-name="ce2">
            <text:p>2</text:p>
          </table:table-cell>
          <table:table-cell office:value-type="float" office:value="2.1" table:style-name="ce2">
            <text:p>2.1</text:p>
          </table:table-cell>
          <table:table-cell office:value-type="float" office:value="31.990402221679688" table:formula="of:=[.E195]/[.D195]" table:style-name="ce4">
            <text:p>31.990</text:p>
          </table:table-cell>
          <table:table-cell office:value-type="float" office:value="41.000015258789063" table:formula="of:=[.F195]/[.D195]" table:style-name="ce4">
            <text:p>41.000</text:p>
          </table:table-cell>
          <table:table-cell office:value-type="float" office:value="1.2816348783199611" table:formula="of:=[.F195]/[.E195]" table:style-name="ce4">
            <text:p>1.282</text:p>
          </table:table-cell>
          <table:table-cell office:value-type="float" office:value="20.972305297851563" table:formula="of:=[.H195]/[.D195]" table:style-name="ce4">
            <text:p>20.972</text:p>
          </table:table-cell>
          <table:table-cell office:value-type="float" office:value="1270620" table:formula="of:=[.N195]*[.D195]/3.3" table:style-name="ce7">
            <text:p>1270620</text:p>
          </table:table-cell>
          <table:table-cell office:value-type="float" office:value="31.96" table:style-name="ce4">
            <text:p>31.960</text:p>
          </table:table-cell>
          <table:table-cell office:value-type="float" office:value="1262550" table:style-name="ce8">
            <text:p>1262550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4"/>
          <table:table-cell table:style-name="ce8"/>
          <table:table-cell table:number-columns-repeated="16364"/>
        </table:table-row>
        <table:table-row table:style-name="ro1">
          <table:table-cell office:value-type="string" table:style-name="ce2">
            <text:p>filter sc 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6216509" table:style-name="ce2">
            <text:p>6216509</text:p>
          </table:table-cell>
          <table:table-cell office:value-type="float" office:value="11403266" table:style-name="ce2">
            <text:p>11403266</text:p>
          </table:table-cell>
          <table:table-cell office:value-type="float" office:value="11928426" table:style-name="ce2">
            <text:p>11928426</text:p>
          </table:table-cell>
          <table:table-cell office:value-type="float" office:value="3359267" table:style-name="ce2">
            <text:p>3359267</text:p>
          </table:table-cell>
          <table:table-cell office:value-type="float" office:value="14965" table:style-name="ce2">
            <text:p>14965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4.5999999999999996" table:style-name="ce2">
            <text:p>4.6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47.428199768066406" table:formula="of:=[.E197]/[.D197]" table:style-name="ce4">
            <text:p>47.428</text:p>
          </table:table-cell>
          <table:table-cell office:value-type="float" office:value="87.000015258789063" table:formula="of:=[.F197]/[.D197]" table:style-name="ce4">
            <text:p>87.000</text:p>
          </table:table-cell>
          <table:table-cell office:value-type="float" office:value="1.834352045496918" table:formula="of:=[.F197]/[.E197]" table:style-name="ce4">
            <text:p>1.834</text:p>
          </table:table-cell>
          <table:table-cell office:value-type="float" office:value="25.629173278808594" table:formula="of:=[.H197]/[.D197]" table:style-name="ce4">
            <text:p>25.629</text:p>
          </table:table-cell>
          <table:table-cell office:value-type="float" office:value="1883790.6060606062" table:formula="of:=[.N197]*[.D197]/3.3" table:style-name="ce7">
            <text:p>1883791</text:p>
          </table:table-cell>
          <table:table-cell office:value-type="float" office:value="46.618000000000002" table:style-name="ce4">
            <text:p>46.618</text:p>
          </table:table-cell>
          <table:table-cell office:value-type="float" office:value="1780990" table:style-name="ce8">
            <text:p>1780990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4" table:style-name="ce4"/>
          <table:table-cell table:style-name="ce7"/>
          <table:table-cell table:style-name="ce4"/>
          <table:table-cell table:style-name="ce8"/>
          <table:table-cell table:number-columns-repeated="16364"/>
        </table:table-row>
        <table:table-row table:style-name="ro1">
          <table:table-cell office:value-type="string" table:style-name="ce2">
            <text:p>filter sc 1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31072" table:style-name="ce2">
            <text:p>131072</text:p>
          </table:table-cell>
          <table:table-cell office:value-type="float" office:value="11490935" table:style-name="ce2">
            <text:p>11490935</text:p>
          </table:table-cell>
          <table:table-cell office:value-type="float" office:value="22675468" table:style-name="ce2">
            <text:p>22675468</text:p>
          </table:table-cell>
          <table:table-cell office:value-type="float" office:value="24774043" table:style-name="ce2">
            <text:p>24774043</text:p>
          </table:table-cell>
          <table:table-cell office:value-type="float" office:value="5812593" table:style-name="ce2">
            <text:p>5812593</text:p>
          </table:table-cell>
          <table:table-cell office:value-type="float" office:value="246446.7" table:style-name="ce2">
            <text:p>246446.7</text:p>
          </table:table-cell>
          <table:table-cell office:value-type="float" office:value="87" table:style-name="ce2">
            <text:p>87</text:p>
          </table:table-cell>
          <table:table-cell office:value-type="float" office:value="45.1" table:style-name="ce2">
            <text:p>45.1</text:p>
          </table:table-cell>
          <table:table-cell office:value-type="float" office:value="17" table:style-name="ce2">
            <text:p>17</text:p>
          </table:table-cell>
          <table:table-cell office:value-type="float" office:value="13.6" table:style-name="ce2">
            <text:p>13.6</text:p>
          </table:table-cell>
          <table:table-cell office:value-type="float" office:value="87.668876647949219" table:formula="of:=[.E199]/[.D199]" table:style-name="ce4">
            <text:p>87.669</text:p>
          </table:table-cell>
          <table:table-cell office:value-type="float" office:value="173.00009155273438" table:formula="of:=[.F199]/[.D199]" table:style-name="ce4">
            <text:p>173.000</text:p>
          </table:table-cell>
          <table:table-cell office:value-type="float" office:value="1.973335329109424" table:formula="of:=[.F199]/[.E199]" table:style-name="ce4">
            <text:p>1.973</text:p>
          </table:table-cell>
          <table:table-cell office:value-type="float" office:value="44.346565246582031" table:formula="of:=[.H199]/[.D199]" table:style-name="ce4">
            <text:p>44.347</text:p>
          </table:table-cell>
          <table:table-cell office:value-type="float" office:value="3482101.5151515151" table:formula="of:=[.N199]*[.D199]/3.3" table:style-name="ce7">
            <text:p>3482102</text:p>
          </table:table-cell>
          <table:table-cell office:value-type="float" office:value="87.613" table:style-name="ce4">
            <text:p>87.613</text:p>
          </table:table-cell>
          <table:table-cell office:value-type="float" office:value="3480050" table:style-name="ce8">
            <text:p>3480050</text:p>
          </table:table-cell>
          <table:table-cell table:number-columns-repeated="16364"/>
        </table:table-row>
        <table:table-row table:style-name="ro1">
          <table:table-cell table:number-columns-repeated="13" table:style-name="ce2"/>
          <table:table-cell table:number-columns-repeated="7" table:style-name="ce5"/>
          <table:table-cell table:number-columns-repeated="1636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6" table:style-name="ce2"/>
          <table:table-cell table:number-columns-repeated="2" table:style-name="ce10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14" table:style-name="ce2"/>
          <table:table-cell table:style-name="ce10"/>
          <table:table-cell table:number-columns-repeated="1009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number-rows-repeated="10" table:style-name="ro1">
          <table:table-cell table:number-columns-repeated="20"/>
          <table:table-cell table:number-columns-repeated="1004" table:style-name="ce2"/>
          <table:table-cell table:number-columns-repeated="15360"/>
        </table:table-row>
        <table:table-row table:number-rows-repeated="6" table:style-name="ro1">
          <table:table-cell table:number-columns-repeated="20"/>
          <table:table-cell table:style-name="ce5"/>
          <table:table-cell table:number-columns-repeated="16363"/>
        </table:table-row>
        <table:table-row table:number-rows-repeated="3" table:style-name="ro1">
          <table:table-cell table:number-columns-repeated="4"/>
          <table:table-cell table:number-columns-repeated="16" table:style-name="ce2"/>
          <table:table-cell table:style-name="ce5"/>
          <table:table-cell table:number-columns-repeated="16363"/>
        </table:table-row>
        <table:table-row table:number-rows-repeated="2" table:style-name="ro1">
          <table:table-cell table:number-columns-repeated="4"/>
          <table:table-cell table:number-columns-repeated="9" table:style-name="ce2"/>
          <table:table-cell table:number-columns-repeated="8" table:style-name="ce5"/>
          <table:table-cell table:number-columns-repeated="16363"/>
        </table:table-row>
        <table:table-row table:number-rows-repeated="2" table:style-name="ro1">
          <table:table-cell table:number-columns-repeated="4"/>
          <table:table-cell table:number-columns-repeated="9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3" table:style-name="ro1">
          <table:table-cell table:number-columns-repeated="4"/>
          <table:table-cell table:number-columns-repeated="9" table:style-name="ce3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3" table:style-name="ro1">
          <table:table-cell table:number-columns-repeated="4"/>
          <table:table-cell table:number-columns-repeated="9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3" table:style-name="ro1">
          <table:table-cell table:number-columns-repeated="4"/>
          <table:table-cell table:number-columns-repeated="9" table:style-name="ce3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3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3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6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8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6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6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6" table:style-name="ce3"/>
          <table:table-cell table:number-columns-repeated="16360"/>
        </table:table-row>
        <table:table-row table:number-rows-repeated="2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6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6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6366"/>
        </table:table-row>
        <table:table-row table:number-rows-repeated="3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6366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3" table:style-name="ce2"/>
          <table:table-cell table:style-name="ce3"/>
          <table:table-cell table:number-columns-repeated="7" table:style-name="ce2"/>
          <table:table-cell table:number-columns-repeated="5" table:style-name="ce5"/>
          <table:table-cell table:number-columns-repeated="16366"/>
        </table:table-row>
        <table:table-row table:style-name="ro1">
          <table:table-cell/>
          <table:table-cell table:number-columns-repeated="4" table:style-name="ce2"/>
          <table:table-cell table:style-name="ce3"/>
          <table:table-cell table:number-columns-repeated="7" table:style-name="ce2"/>
          <table:table-cell table:number-columns-repeated="5" table:style-name="ce5"/>
          <table:table-cell table:number-columns-repeated="16366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6366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2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3" table:style-name="ce2"/>
          <table:table-cell table:number-columns-repeated="9" table:style-name="ce3"/>
          <table:table-cell table:number-columns-repeated="5" table:style-name="ce5"/>
          <table:table-cell table:number-columns-repeated="1006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style-name="ce2"/>
          <table:table-cell table:style-name="ce8"/>
          <table:table-cell table:number-columns-repeated="16363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style-name="ce2"/>
          <table:table-cell table:style-name="ce8"/>
          <table:table-cell table:number-columns-repeated="2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4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3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3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style-name="ce10"/>
          <table:table-cell table:number-columns-repeated="16364"/>
        </table:table-row>
        <table:table-row table:number-rows-repeated="6" table:style-name="ro1">
          <table:table-cell/>
          <table:table-cell table:number-columns-repeated="3" table:style-name="ce2"/>
          <table:table-cell table:style-name="ce3"/>
          <table:table-cell table:number-columns-repeated="8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6"/>
          <table:table-cell table:number-columns-repeated="11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style-name="ce5"/>
          <table:table-cell table:number-columns-repeated="16364"/>
        </table:table-row>
        <table:table-row table:number-rows-repeated="2" table:style-name="ro1">
          <table:table-cell/>
          <table:table-cell table:number-columns-repeated="12" table:style-name="ce2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8" table:style-name="ro1">
          <table:table-cell table:number-columns-repeated="13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number-columns-repeated="5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3" table:style-name="ro1">
          <table:table-cell table:number-columns-repeated="13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style-name="ce5"/>
          <table:table-cell table:number-columns-repeated="4" table:style-name="ce2"/>
          <table:table-cell table:style-name="ce8"/>
          <table:table-cell table:style-name="ce5"/>
          <table:table-cell table:number-columns-repeated="16364"/>
        </table:table-row>
        <table:table-row table:number-rows-repeated="3" table:style-name="ro1">
          <table:table-cell table:number-columns-repeated="13"/>
          <table:table-cell table:style-name="ce5"/>
          <table:table-cell table:number-columns-repeated="4" table:style-name="ce2"/>
          <table:table-cell table:style-name="ce8"/>
          <table:table-cell table:number-columns-repeated="1005" table:style-name="ce2"/>
          <table:table-cell table:number-columns-repeated="15360"/>
        </table:table-row>
        <table:table-row table:number-rows-repeated="4" table:style-name="ro1">
          <table:table-cell table:number-columns-repeated="13"/>
          <table:table-cell table:style-name="ce5"/>
          <table:table-cell table:number-columns-repeated="4" table:style-name="ce2"/>
          <table:table-cell table:style-name="ce8"/>
          <table:table-cell table:number-columns-repeated="16365"/>
        </table:table-row>
        <table:table-row table:number-rows-repeated="3" table:style-name="ro1">
          <table:table-cell table:number-columns-repeated="13"/>
          <table:table-cell table:number-columns-repeated="1011" table:style-name="ce2"/>
          <table:table-cell table:number-columns-repeated="15360"/>
        </table:table-row>
        <table:table-row table:number-rows-repeated="2" table:style-name="ro1">
          <table:table-cell table:number-columns-repeated="13"/>
          <table:table-cell table:number-columns-repeated="5" table:style-name="ce2"/>
          <table:table-cell table:style-name="ce10"/>
          <table:table-cell table:number-columns-repeated="16365"/>
        </table:table-row>
        <table:table-row table:number-rows-repeated="2" table:style-name="ro1">
          <table:table-cell table:number-columns-repeated="13"/>
          <table:table-cell table:number-columns-repeated="1011" table:style-name="ce2"/>
          <table:table-cell table:number-columns-repeated="15360"/>
        </table:table-row>
        <table:table-row table:number-rows-repeated="2" table:style-name="ro1">
          <table:table-cell table:number-columns-repeated="13"/>
          <table:table-cell table:number-columns-repeated="4" table:style-name="ce2"/>
          <table:table-cell table:style-name="ce10"/>
          <table:table-cell table:number-columns-repeated="1006" table:style-name="ce2"/>
          <table:table-cell table:number-columns-repeated="15360"/>
        </table:table-row>
        <table:table-row table:number-rows-repeated="104801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ngXian" svg:font-family="DengXian"/>
    <style:font-face style:name="Microsoft YaHei" svg:font-family="&quot;Microsoft YaHei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4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haotian zhai</dc:creator>
    <meta:creation-date>2025-05-27T23:21:24Z</meta:creation-date>
    <dc:date>2025-06-28T21:12:31Z</dc:date>
    <meta:editing-cycles>277</meta:editing-cycles>
    <meta:editing-duration>PT270765S</meta:editing-duration>
  </office:meta>
</office:document-meta>
</file>